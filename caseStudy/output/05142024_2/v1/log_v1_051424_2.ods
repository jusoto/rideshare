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4319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283in"/>
    </style:style>
    <style:style style:name="co17" style:family="table-column">
      <style:table-column-properties fo:break-before="auto" style:column-width="0.3457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og_v1_051424_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3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15S" calcext:value-type="time">
            <text:p>07:57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53" calcext:value-type="percentage">
            <text:p>22.5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3.69" calcext:value-type="float">
            <text:p>3.69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8/1.954/2.186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20S" calcext:value-type="time">
            <text:p>07:57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7" calcext:value-type="percentage">
            <text:p>97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59" calcext:value-type="percentage">
            <text:p>22.5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16" calcext:value-type="float">
            <text:p>6.16</text:p>
          </table:table-cell>
          <table:table-cell/>
          <table:table-cell office:value-type="float" office:value="3.63" calcext:value-type="float">
            <text:p>3.63</text:p>
          </table:table-cell>
          <table:table-cell/>
          <table:table-cell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1/1.637/1.754/0.0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26S" calcext:value-type="time">
            <text:p>07:57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75" calcext:value-type="percentage">
            <text:p>22.7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6.15" calcext:value-type="float">
            <text:p>6.15</text:p>
          </table:table-cell>
          <table:table-cell/>
          <table:table-cell office:value-type="float" office:value="3.67" calcext:value-type="float">
            <text:p>3.67</text:p>
          </table:table-cell>
          <table:table-cell/>
          <table:table-cell office:value-type="float" office:value="2.19" calcext:value-type="float">
            <text:p>2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0/1.921/2.015/0.13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31S" calcext:value-type="time">
            <text:p>07:57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78" calcext:value-type="percentage">
            <text:p>77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76" calcext:value-type="percentage">
            <text:p>22.7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5.73" calcext:value-type="float">
            <text:p>5.73</text:p>
          </table:table-cell>
          <table:table-cell/>
          <table:table-cell office:value-type="float" office:value="3.62" calcext:value-type="float">
            <text:p>3.62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2/1.803/1.999/0.2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36S" calcext:value-type="time">
            <text:p>07:57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29" calcext:value-type="percentage">
            <text:p>4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78" calcext:value-type="percentage">
            <text:p>22.7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5.35" calcext:value-type="float">
            <text:p>5.35</text:p>
          </table:table-cell>
          <table:table-cell/>
          <table:table-cell office:value-type="float" office:value="3.58" calcext:value-type="float">
            <text:p>3.58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1/1.567/1.675/0.08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41S" calcext:value-type="time">
            <text:p>07:57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8" calcext:value-type="percentage">
            <text:p>22.8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92" calcext:value-type="float">
            <text:p>4.92</text:p>
          </table:table-cell>
          <table:table-cell/>
          <table:table-cell office:value-type="float" office:value="3.52" calcext:value-type="float">
            <text:p>3.52</text:p>
          </table:table-cell>
          <table:table-cell/>
          <table:table-cell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4/1.580/1.694/0.0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47S" calcext:value-type="time">
            <text:p>07:57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8" calcext:value-type="percentage">
            <text:p>22.8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85" calcext:value-type="float">
            <text:p>4.85</text:p>
          </table:table-cell>
          <table:table-cell/>
          <table:table-cell office:value-type="float" office:value="3.53" calcext:value-type="float">
            <text:p>3.53</text:p>
          </table:table-cell>
          <table:table-cell/>
          <table:table-cell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9/1.809/2.132/0.2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52S" calcext:value-type="time">
            <text:p>07:57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71" calcext:value-type="percentage">
            <text:p>9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81" calcext:value-type="percentage">
            <text:p>22.8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86" calcext:value-type="float">
            <text:p>4.86</text:p>
          </table:table-cell>
          <table:table-cell/>
          <table:table-cell office:value-type="float" office:value="3.55" calcext:value-type="float">
            <text:p>3.55</text:p>
          </table:table-cell>
          <table:table-cell/>
          <table:table-cell office:value-type="float" office:value="2.19" calcext:value-type="float">
            <text:p>2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5/1.585/1.788/0.1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7M57S" calcext:value-type="time">
            <text:p>07:57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53" calcext:value-type="percentage">
            <text:p>35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63" calcext:value-type="float">
            <text:p>4.63</text:p>
          </table:table-cell>
          <table:table-cell/>
          <table:table-cell office:value-type="float" office:value="3.52" calcext:value-type="float">
            <text:p>3.52</text:p>
          </table:table-cell>
          <table:table-cell/>
          <table:table-cell office:value-type="float" office:value="2.19" calcext:value-type="float">
            <text:p>2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3/1.636/1.896/0.2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02S" calcext:value-type="time">
            <text:p>07:58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286" calcext:value-type="percentage">
            <text:p>22.8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3.52" calcext:value-type="float">
            <text:p>3.52</text:p>
          </table:table-cell>
          <table:table-cell/>
          <table:table-cell office:value-type="float" office:value="2.19" calcext:value-type="float">
            <text:p>2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80/1.611/1.816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08S" calcext:value-type="time">
            <text:p>07:58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44" calcext:value-type="percentage">
            <text:p>94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11" calcext:value-type="percentage">
            <text:p>23.1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3.49" calcext:value-type="float">
            <text:p>3.49</text:p>
          </table:table-cell>
          <table:table-cell/>
          <table:table-cell office:value-type="float" office:value="2.19" calcext:value-type="float">
            <text:p>2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4/1.722/1.959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13S" calcext:value-type="time">
            <text:p>07:58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" calcext:value-type="percentage">
            <text:p>3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27" calcext:value-type="percentage">
            <text:p>23.2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3.45" calcext:value-type="float">
            <text:p>3.45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7/1.599/1.723/0.13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18S" calcext:value-type="time">
            <text:p>07:58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29" calcext:value-type="percentage">
            <text:p>23.2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79" calcext:value-type="float">
            <text:p>3.79</text:p>
          </table:table-cell>
          <table:table-cell/>
          <table:table-cell office:value-type="float" office:value="3.41" calcext:value-type="float">
            <text:p>3.41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2/1.750/1.940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23S" calcext:value-type="time">
            <text:p>07:58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14" calcext:value-type="percentage">
            <text:p>31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3" calcext:value-type="percentage">
            <text:p>23.3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65" calcext:value-type="float">
            <text:p>3.65</text:p>
          </table:table-cell>
          <table:table-cell/>
          <table:table-cell office:value-type="float" office:value="3.38" calcext:value-type="float">
            <text:p>3.38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4/1.699/2.127/0.2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29S" calcext:value-type="time">
            <text:p>07:58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11" calcext:value-type="percentage">
            <text:p>61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32" calcext:value-type="percentage">
            <text:p>23.3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36" calcext:value-type="float">
            <text:p>3.36</text:p>
          </table:table-cell>
          <table:table-cell/>
          <table:table-cell office:value-type="float" office:value="3.33" calcext:value-type="float">
            <text:p>3.33</text:p>
          </table:table-cell>
          <table:table-cell/>
          <table:table-cell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4/1.796/2.224/0.2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34S" calcext:value-type="time">
            <text:p>07:58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9" calcext:value-type="percentage">
            <text:p>29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32" calcext:value-type="percentage">
            <text:p>23.3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16" calcext:value-type="float">
            <text:p>3.16</text:p>
          </table:table-cell>
          <table:table-cell/>
          <table:table-cell office:value-type="float" office:value="3.28" calcext:value-type="float">
            <text:p>3.28</text:p>
          </table:table-cell>
          <table:table-cell/>
          <table:table-cell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2/1.609/1.775/0.11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39S" calcext:value-type="time">
            <text:p>07:58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81" calcext:value-type="percentage">
            <text:p>2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31" calcext:value-type="percentage">
            <text:p>23.3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07" calcext:value-type="float">
            <text:p>3.07</text:p>
          </table:table-cell>
          <table:table-cell/>
          <table:table-cell office:value-type="float" office:value="3.26" calcext:value-type="float">
            <text:p>3.26</text:p>
          </table:table-cell>
          <table:table-cell/>
          <table:table-cell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0/1.657/1.909/0.17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44S" calcext:value-type="time">
            <text:p>07:58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03" calcext:value-type="percentage">
            <text:p>30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33" calcext:value-type="percentage">
            <text:p>23.3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06" calcext:value-type="float">
            <text:p>3.06</text:p>
          </table:table-cell>
          <table:table-cell/>
          <table:table-cell office:value-type="float" office:value="3.26" calcext:value-type="float">
            <text:p>3.26</text:p>
          </table:table-cell>
          <table:table-cell/>
          <table:table-cell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8/1.592/1.831/0.15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50S" calcext:value-type="time">
            <text:p>07:58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24" calcext:value-type="percentage">
            <text:p>32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32" calcext:value-type="percentage">
            <text:p>23.3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82" calcext:value-type="float">
            <text:p>2.82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4/1.629/1.885/0.1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8M55S" calcext:value-type="time">
            <text:p>07:58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9" calcext:value-type="percentage">
            <text:p>29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5" calcext:value-type="percentage">
            <text:p>23.5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83" calcext:value-type="float">
            <text:p>2.83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4/1.675/1.955/0.1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00S" calcext:value-type="time">
            <text:p>07:59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9" calcext:value-type="percentage">
            <text:p>29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396" calcext:value-type="percentage">
            <text:p>23.9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09" calcext:value-type="float">
            <text:p>3.09</text:p>
          </table:table-cell>
          <table:table-cell/>
          <table:table-cell office:value-type="float" office:value="3.25" calcext:value-type="float">
            <text:p>3.25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4/1.641/1.931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05S" calcext:value-type="time">
            <text:p>07:59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87" calcext:value-type="percentage">
            <text:p>38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45" calcext:value-type="percentage">
            <text:p>24.5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3.08" calcext:value-type="float">
            <text:p>3.08</text:p>
          </table:table-cell>
          <table:table-cell/>
          <table:table-cell office:value-type="float" office:value="3.24" calcext:value-type="float">
            <text:p>3.24</text:p>
          </table:table-cell>
          <table:table-cell/>
          <table:table-cell office:value-type="float" office:value="2.19" calcext:value-type="float">
            <text:p>2.1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7/1.632/1.815/0.1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11S" calcext:value-type="time">
            <text:p>07:59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12" calcext:value-type="percentage">
            <text:p>31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484" calcext:value-type="percentage">
            <text:p>24.8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91" calcext:value-type="float">
            <text:p>2.91</text:p>
          </table:table-cell>
          <table:table-cell/>
          <table:table-cell office:value-type="float" office:value="3.21" calcext:value-type="float">
            <text:p>3.21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1/1.611/1.806/0.1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16S" calcext:value-type="time">
            <text:p>07:59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58" calcext:value-type="percentage">
            <text:p>75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02" calcext:value-type="percentage">
            <text:p>25.0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84" calcext:value-type="float">
            <text:p>2.84</text:p>
          </table:table-cell>
          <table:table-cell/>
          <table:table-cell office:value-type="float" office:value="3.19" calcext:value-type="float">
            <text:p>3.19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7/1.662/1.817/0.1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21S" calcext:value-type="time">
            <text:p>07:59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81" calcext:value-type="percentage">
            <text:p>2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21" calcext:value-type="percentage">
            <text:p>25.2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69" calcext:value-type="float">
            <text:p>2.69</text:p>
          </table:table-cell>
          <table:table-cell/>
          <table:table-cell office:value-type="float" office:value="3.15" calcext:value-type="float">
            <text:p>3.15</text:p>
          </table:table-cell>
          <table:table-cell/>
          <table:table-cell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5/1.743/1.891/0.0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26S" calcext:value-type="time">
            <text:p>07:59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86" calcext:value-type="percentage">
            <text:p>6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37" calcext:value-type="percentage">
            <text:p>25.3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56" calcext:value-type="float">
            <text:p>2.56</text:p>
          </table:table-cell>
          <table:table-cell/>
          <table:table-cell office:value-type="float" office:value="3.11" calcext:value-type="float">
            <text:p>3.11</text:p>
          </table:table-cell>
          <table:table-cell/>
          <table:table-cell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6/1.626/1.781/0.1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32S" calcext:value-type="time">
            <text:p>07:59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03" calcext:value-type="percentage">
            <text:p>30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45" calcext:value-type="percentage">
            <text:p>25.4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43" calcext:value-type="float">
            <text:p>2.43</text:p>
          </table:table-cell>
          <table:table-cell/>
          <table:table-cell office:value-type="float" office:value="3.08" calcext:value-type="float">
            <text:p>3.08</text:p>
          </table:table-cell>
          <table:table-cell/>
          <table:table-cell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9/1.739/2.111/0.2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37S" calcext:value-type="time">
            <text:p>07:59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81" calcext:value-type="percentage">
            <text:p>2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47" calcext:value-type="percentage">
            <text:p>25.4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24" calcext:value-type="float">
            <text:p>2.24</text:p>
          </table:table-cell>
          <table:table-cell/>
          <table:table-cell office:value-type="float" office:value="3.03" calcext:value-type="float">
            <text:p>3.03</text:p>
          </table:table-cell>
          <table:table-cell/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6/1.595/1.736/0.1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number-columns-repeated="4"/>
          <table:table-cell table:formula="of:=AVERAGE([.E1:.E28])" office:value-type="percentage" office:value="0.4985" calcext:value-type="percentage">
            <text:p>49.85%</text:p>
          </table:table-cell>
          <table:table-cell table:number-columns-repeated="4"/>
          <table:table-cell table:formula="of:=AVERAGE([.J1:.J28])" office:value-type="percentage" office:value="0.235857142857143" calcext:value-type="percentage">
            <text:p>23.59%</text:p>
          </table:table-cell>
          <table:table-cell table:number-columns-repeated="6"/>
          <table:table-cell table:formula="of:=AVERAGE([.Q1:.Q28])" office:value-type="float" office:value="3.37" calcext:value-type="float">
            <text:p>3.37</text:p>
          </table:table-cell>
          <table:table-cell table:formula="of:=AVERAGE([.R1:.R28])" office:value-type="float" office:value="8.2775" calcext:value-type="float">
            <text:p>8.2775</text:p>
          </table:table-cell>
          <table:table-cell table:number-columns-repeated="39"/>
        </table:table-row>
        <table:table-row table:style-name="ro1">
          <table:table-cell table:number-columns-repeated="57"/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42S" calcext:value-type="time">
            <text:p>07:59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73" calcext:value-type="percentage">
            <text:p>27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49" calcext:value-type="percentage">
            <text:p>25.4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14" calcext:value-type="float">
            <text:p>2.14</text:p>
          </table:table-cell>
          <table:table-cell/>
          <table:table-cell office:value-type="float" office:value="2.99" calcext:value-type="float">
            <text:p>2.99</text:p>
          </table:table-cell>
          <table:table-cell/>
          <table:table-cell office:value-type="float" office:value="2.14" calcext:value-type="float">
            <text:p>2.1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9/1.546/1.716/0.09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47S" calcext:value-type="time">
            <text:p>07:59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82" calcext:value-type="percentage">
            <text:p>18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49" calcext:value-type="percentage">
            <text:p>25.4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21" calcext:value-type="float">
            <text:p>2.21</text:p>
          </table:table-cell>
          <table:table-cell/>
          <table:table-cell office:value-type="float" office:value="2.99" calcext:value-type="float">
            <text:p>2.99</text:p>
          </table:table-cell>
          <table:table-cell/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0/1.571/1.898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52S" calcext:value-type="time">
            <text:p>07:59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75" calcext:value-type="percentage">
            <text:p>37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1" calcext:value-type="percentage">
            <text:p>25.5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3" calcext:value-type="float">
            <text:p>2.03</text:p>
          </table:table-cell>
          <table:table-cell/>
          <table:table-cell office:value-type="float" office:value="2.94" calcext:value-type="float">
            <text:p>2.94</text:p>
          </table:table-cell>
          <table:table-cell/>
          <table:table-cell office:value-type="float" office:value="2.13" calcext:value-type="float">
            <text:p>2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74/1.628/1.975/0.23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19H59M58S" calcext:value-type="time">
            <text:p>07:59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47" calcext:value-type="percentage">
            <text:p>64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4" calcext:value-type="percentage">
            <text:p>25.5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7" calcext:value-type="float">
            <text:p>1.87</text:p>
          </table:table-cell>
          <table:table-cell/>
          <table:table-cell office:value-type="float" office:value="2.89" calcext:value-type="float">
            <text:p>2.89</text:p>
          </table:table-cell>
          <table:table-cell/>
          <table:table-cell office:value-type="float" office:value="2.12" calcext:value-type="float">
            <text:p>2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5/1.638/2.044/0.2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03S" calcext:value-type="time">
            <text:p>08:00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35" calcext:value-type="percentage">
            <text:p>23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4" calcext:value-type="percentage">
            <text:p>25.5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2.86" calcext:value-type="float">
            <text:p>2.86</text:p>
          </table:table-cell>
          <table:table-cell/>
          <table:table-cell office:value-type="float" office:value="2.12" calcext:value-type="float">
            <text:p>2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9/1.654/1.838/0.12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08S" calcext:value-type="time">
            <text:p>08:00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29" calcext:value-type="percentage">
            <text:p>1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3" calcext:value-type="percentage">
            <text:p>25.5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2.13" calcext:value-type="float">
            <text:p>2.1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3/1.471/1.679/0.11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13S" calcext:value-type="time">
            <text:p>08:00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5" calcext:value-type="percentage">
            <text:p>25.5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9" calcext:value-type="float">
            <text:p>1.89</text:p>
          </table:table-cell>
          <table:table-cell/>
          <table:table-cell office:value-type="float" office:value="2.85" calcext:value-type="float">
            <text:p>2.85</text:p>
          </table:table-cell>
          <table:table-cell/>
          <table:table-cell office:value-type="float" office:value="2.12" calcext:value-type="float">
            <text:p>2.1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15/1.658/2.003/0.25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19S" calcext:value-type="time">
            <text:p>08:00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29" calcext:value-type="percentage">
            <text:p>1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6" calcext:value-type="percentage">
            <text:p>25.5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2.11" calcext:value-type="float">
            <text:p>2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9/1.528/1.616/0.0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24S" calcext:value-type="time">
            <text:p>08:00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42" calcext:value-type="percentage">
            <text:p>24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6" calcext:value-type="percentage">
            <text:p>25.5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2.81" calcext:value-type="float">
            <text:p>2.81</text:p>
          </table:table-cell>
          <table:table-cell/>
          <table:table-cell office:value-type="float" office:value="2.11" calcext:value-type="float">
            <text:p>2.1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4/1.756/1.948/0.15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29S" calcext:value-type="time">
            <text:p>08:00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51" calcext:value-type="percentage">
            <text:p>35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7" calcext:value-type="percentage">
            <text:p>25.5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2.73" calcext:value-type="float">
            <text:p>2.73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7/1.582/1.837/0.18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34S" calcext:value-type="time">
            <text:p>08:00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6" calcext:value-type="percentage">
            <text:p>25.5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2.68" calcext:value-type="float">
            <text:p>2.68</text:p>
          </table:table-cell>
          <table:table-cell/>
          <table:table-cell office:value-type="float" office:value="2.08" calcext:value-type="float">
            <text:p>2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1/1.580/1.859/0.14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39S" calcext:value-type="time">
            <text:p>08:00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29" calcext:value-type="percentage">
            <text:p>1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6" calcext:value-type="percentage">
            <text:p>25.5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2.66" calcext:value-type="float">
            <text:p>2.66</text:p>
          </table:table-cell>
          <table:table-cell/>
          <table:table-cell office:value-type="float" office:value="2.08" calcext:value-type="float">
            <text:p>2.0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0/1.656/1.837/0.16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45S" calcext:value-type="time">
            <text:p>08:00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7" calcext:value-type="percentage">
            <text:p>25.5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2.63" calcext:value-type="float">
            <text:p>2.63</text:p>
          </table:table-cell>
          <table:table-cell/>
          <table:table-cell office:value-type="float" office:value="2.07" calcext:value-type="float">
            <text:p>2.0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80/1.555/1.823/0.1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50S" calcext:value-type="time">
            <text:p>08:00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76" calcext:value-type="percentage">
            <text:p>1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7" calcext:value-type="percentage">
            <text:p>25.5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2.58" calcext:value-type="float">
            <text:p>2.58</text:p>
          </table:table-cell>
          <table:table-cell/>
          <table:table-cell office:value-type="float" office:value="2.06" calcext:value-type="float">
            <text:p>2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9/1.530/1.755/0.1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0M55S" calcext:value-type="time">
            <text:p>08:00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8" calcext:value-type="percentage">
            <text:p>25.5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2.56" calcext:value-type="float">
            <text:p>2.56</text:p>
          </table:table-cell>
          <table:table-cell/>
          <table:table-cell office:value-type="float" office:value="2.06" calcext:value-type="float">
            <text:p>2.0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8/1.789/2.016/0.2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00S" calcext:value-type="time">
            <text:p>08:01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9" calcext:value-type="percentage">
            <text:p>25.5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2.51" calcext:value-type="float">
            <text:p>2.51</text:p>
          </table:table-cell>
          <table:table-cell/>
          <table:table-cell office:value-type="float" office:value="2.04" calcext:value-type="float">
            <text:p>2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51/1.654/1.910/0.2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06S" calcext:value-type="time">
            <text:p>08:01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2" calcext:value-type="percentage">
            <text:p>1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8" calcext:value-type="percentage">
            <text:p>25.5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2.52" calcext:value-type="float">
            <text:p>2.52</text:p>
          </table:table-cell>
          <table:table-cell/>
          <table:table-cell office:value-type="float" office:value="2.05" calcext:value-type="float">
            <text:p>2.0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9/1.657/2.164/0.2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11S" calcext:value-type="time">
            <text:p>08:01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25" calcext:value-type="percentage">
            <text:p>62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9" calcext:value-type="percentage">
            <text:p>25.5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2.48" calcext:value-type="float">
            <text:p>2.48</text:p>
          </table:table-cell>
          <table:table-cell/>
          <table:table-cell office:value-type="float" office:value="2.04" calcext:value-type="float">
            <text:p>2.0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1/1.555/1.808/0.1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16S" calcext:value-type="time">
            <text:p>08:01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73" calcext:value-type="percentage">
            <text:p>27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59" calcext:value-type="percentage">
            <text:p>25.5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2" calcext:value-type="float">
            <text:p>1.12</text:p>
          </table:table-cell>
          <table:table-cell/>
          <table:table-cell office:value-type="float" office:value="2.44" calcext:value-type="float">
            <text:p>2.44</text:p>
          </table:table-cell>
          <table:table-cell/>
          <table:table-cell office:value-type="float" office:value="2.03" calcext:value-type="float">
            <text:p>2.0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1/1.667/1.772/0.1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21S" calcext:value-type="time">
            <text:p>08:01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06" calcext:value-type="percentage">
            <text:p>20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63" calcext:value-type="percentage">
            <text:p>25.6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1" calcext:value-type="float">
            <text:p>1.11</text:p>
          </table:table-cell>
          <table:table-cell/>
          <table:table-cell office:value-type="float" office:value="2.42" calcext:value-type="float">
            <text:p>2.42</text:p>
          </table:table-cell>
          <table:table-cell/>
          <table:table-cell office:value-type="float" office:value="2.02" calcext:value-type="float">
            <text:p>2.0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8/1.616/1.725/0.1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number-columns-repeated="4"/>
          <table:table-cell table:formula="of:=AVERAGE([.E31:.E50])" office:value-type="percentage" office:value="0.2593" calcext:value-type="percentage">
            <text:p>25.93%</text:p>
          </table:table-cell>
          <table:table-cell table:number-columns-repeated="4"/>
          <table:table-cell table:formula="of:=AVERAGE([.J31:.J50])" office:value-type="percentage" office:value="0.25558" calcext:value-type="percentage">
            <text:p>25.56%</text:p>
          </table:table-cell>
          <table:table-cell table:number-columns-repeated="6"/>
          <table:table-cell table:formula="of:=AVERAGE([.Q31:.Q50])" office:value-type="float" office:value="3.37" calcext:value-type="float">
            <text:p>3.37</text:p>
          </table:table-cell>
          <table:table-cell table:formula="of:=AVERAGE([.R31:.R50])" office:value-type="float" office:value="8.27" calcext:value-type="float">
            <text:p>8.27</text:p>
          </table:table-cell>
          <table:table-cell table:number-columns-repeated="39"/>
        </table:table-row>
        <table:table-row table:style-name="ro1">
          <table:table-cell table:number-columns-repeated="57"/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27S" calcext:value-type="time">
            <text:p>08:01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06" calcext:value-type="percentage">
            <text:p>20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68" calcext:value-type="percentage">
            <text:p>25.6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2.37" calcext:value-type="float">
            <text:p>2.37</text:p>
          </table:table-cell>
          <table:table-cell/>
          <table:table-cell office:value-type="float" office:value="2.01" calcext:value-type="float">
            <text:p>2.0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3/1.727/1.896/0.13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32S" calcext:value-type="time">
            <text:p>08:01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585" calcext:value-type="percentage">
            <text:p>25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2.34" calcext:value-type="float">
            <text:p>2.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98/1.498/1.864/0.22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37S" calcext:value-type="time">
            <text:p>08:01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607" calcext:value-type="percentage">
            <text:p>26.0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2.33" calcext:value-type="float">
            <text:p>2.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3/1.598/1.907/0.19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42S" calcext:value-type="time">
            <text:p>08:01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25" calcext:value-type="percentage">
            <text:p>12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627" calcext:value-type="percentage">
            <text:p>26.2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2.29" calcext:value-type="float">
            <text:p>2.29</text:p>
          </table:table-cell>
          <table:table-cell/>
          <table:table-cell office:value-type="float" office:value="1.99" calcext:value-type="float">
            <text:p>1.9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6/1.552/1.766/0.11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47S" calcext:value-type="time">
            <text:p>08:01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651" calcext:value-type="percentage">
            <text:p>26.5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2.25" calcext:value-type="float">
            <text:p>2.25</text:p>
          </table:table-cell>
          <table:table-cell/>
          <table:table-cell office:value-type="float" office:value="1.98" calcext:value-type="float">
            <text:p>1.9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1/1.668/1.775/0.0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53S" calcext:value-type="time">
            <text:p>08:01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2" calcext:value-type="percentage">
            <text:p>1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668" calcext:value-type="percentage">
            <text:p>26.6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2.23" calcext:value-type="float">
            <text:p>2.23</text:p>
          </table:table-cell>
          <table:table-cell/>
          <table:table-cell office:value-type="float" office:value="1.97" calcext:value-type="float">
            <text:p>1.9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97/1.635/1.913/0.25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1M58S" calcext:value-type="time">
            <text:p>08:01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689" calcext:value-type="percentage">
            <text:p>26.8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81" calcext:value-type="float">
            <text:p>0.81</text:p>
          </table:table-cell>
          <table:table-cell/>
          <table:table-cell office:value-type="float" office:value="2.19" calcext:value-type="float">
            <text:p>2.19</text:p>
          </table:table-cell>
          <table:table-cell/>
          <table:table-cell office:value-type="float" office:value="1.96" calcext:value-type="float">
            <text:p>1.9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9/1.570/1.746/0.1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03S" calcext:value-type="time">
            <text:p>08:02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6" calcext:value-type="percentage">
            <text:p>1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12" calcext:value-type="percentage">
            <text:p>27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2.16" calcext:value-type="float">
            <text:p>2.16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6/1.694/1.881/0.12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08S" calcext:value-type="time">
            <text:p>08:02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06" calcext:value-type="percentage">
            <text:p>60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29" calcext:value-type="percentage">
            <text:p>27.2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68" calcext:value-type="float">
            <text:p>0.68</text:p>
          </table:table-cell>
          <table:table-cell/>
          <table:table-cell office:value-type="float" office:value="2.12" calcext:value-type="float">
            <text:p>2.12</text:p>
          </table:table-cell>
          <table:table-cell/>
          <table:table-cell office:value-type="float" office:value="1.94" calcext:value-type="float">
            <text:p>1.9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9/1.792/2.146/0.2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13S" calcext:value-type="time">
            <text:p>08:02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2" calcext:value-type="percentage">
            <text:p>1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2" calcext:value-type="percentage">
            <text:p>27.3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2.09" calcext:value-type="float">
            <text:p>2.09</text:p>
          </table:table-cell>
          <table:table-cell/>
          <table:table-cell office:value-type="float" office:value="1.93" calcext:value-type="float">
            <text:p>1.9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09/1.648/2.033/0.23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19S" calcext:value-type="time">
            <text:p>08:02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8" calcext:value-type="percentage">
            <text:p>5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4" calcext:value-type="percentage">
            <text:p>27.3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58" calcext:value-type="float">
            <text:p>0.58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.92" calcext:value-type="float">
            <text:p>1.9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3/1.656/1.785/0.0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24S" calcext:value-type="time">
            <text:p>08:02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097" calcext:value-type="percentage">
            <text:p>9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6" calcext:value-type="percentage">
            <text:p>27.3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.92" calcext:value-type="float">
            <text:p>1.9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3/1.628/1.730/0.1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29S" calcext:value-type="time">
            <text:p>08:02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2" calcext:value-type="percentage">
            <text:p>1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6" calcext:value-type="percentage">
            <text:p>27.3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58" calcext:value-type="float">
            <text:p>0.58</text:p>
          </table:table-cell>
          <table:table-cell/>
          <table:table-cell office:value-type="float" office:value="1.98" calcext:value-type="float">
            <text:p>1.98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90/1.665/1.914/0.2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34S" calcext:value-type="time">
            <text:p>08:02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2" calcext:value-type="percentage">
            <text:p>1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8" calcext:value-type="percentage">
            <text:p>27.3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office:value-type="float" office:value="1.95" calcext:value-type="float">
            <text:p>1.95</text:p>
          </table:table-cell>
          <table:table-cell/>
          <table:table-cell office:value-type="float" office:value="1.89" calcext:value-type="float">
            <text:p>1.8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4/1.706/1.922/0.14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40S" calcext:value-type="time">
            <text:p>08:02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35" calcext:value-type="percentage">
            <text:p>23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8" calcext:value-type="percentage">
            <text:p>27.3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1.88" calcext:value-type="float">
            <text:p>1.8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9/1.606/1.867/0.1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45S" calcext:value-type="time">
            <text:p>08:02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097" calcext:value-type="percentage">
            <text:p>9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9" calcext:value-type="percentage">
            <text:p>27.3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1.87" calcext:value-type="float">
            <text:p>1.8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0/1.711/1.913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50S" calcext:value-type="time">
            <text:p>08:02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067" calcext:value-type="percentage">
            <text:p>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9" calcext:value-type="percentage">
            <text:p>27.3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8/1.748/2.027/0.1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2M55S" calcext:value-type="time">
            <text:p>08:02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2" calcext:value-type="percentage">
            <text:p>1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9" calcext:value-type="percentage">
            <text:p>27.3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1.82" calcext:value-type="float">
            <text:p>1.82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8/1.683/1.926/0.13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00S" calcext:value-type="time">
            <text:p>08:03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25" calcext:value-type="percentage">
            <text:p>12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39" calcext:value-type="percentage">
            <text:p>27.3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65/1.647/1.980/0.2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06S" calcext:value-type="time">
            <text:p>08:03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82" calcext:value-type="percentage">
            <text:p>18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4" calcext:value-type="percentage">
            <text:p>27.4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83" calcext:value-type="float">
            <text:p>1.8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75/1.473/1.787/0.1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11S" calcext:value-type="time">
            <text:p>08:03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52" calcext:value-type="percentage">
            <text:p>1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4" calcext:value-type="percentage">
            <text:p>27.4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1/1.781/2.059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number-columns-repeated="4"/>
          <table:table-cell table:formula="of:=AVERAGE([.E53:.E73])" office:value-type="percentage" office:value="0.209285714285714" calcext:value-type="percentage">
            <text:p>20.93%</text:p>
          </table:table-cell>
          <table:table-cell table:number-columns-repeated="4"/>
          <table:table-cell table:formula="of:=AVERAGE([.J53:.J73])" office:value-type="percentage" office:value="0.269933333333333" calcext:value-type="percentage">
            <text:p>26.99%</text:p>
          </table:table-cell>
          <table:table-cell table:number-columns-repeated="6"/>
          <table:table-cell table:formula="of:=AVERAGE([.Q53:.Q73])" office:value-type="float" office:value="3.37" calcext:value-type="float">
            <text:p>3.37</text:p>
          </table:table-cell>
          <table:table-cell table:formula="of:=AVERAGE([.R53:.R73])" office:value-type="float" office:value="8.27" calcext:value-type="float">
            <text:p>8.27</text:p>
          </table:table-cell>
          <table:table-cell table:number-columns-repeated="39"/>
        </table:table-row>
        <table:table-row table:style-name="ro1">
          <table:table-cell table:number-columns-repeated="57"/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16S" calcext:value-type="time">
            <text:p>08:03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4" calcext:value-type="percentage">
            <text:p>27.4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7/1.713/1.992/0.1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21S" calcext:value-type="time">
            <text:p>08:03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67" calcext:value-type="percentage">
            <text:p>6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74" calcext:value-type="percentage">
            <text:p>27.4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4/1.576/1.752/0.1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27S" calcext:value-type="time">
            <text:p>08:03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6" calcext:value-type="percentage">
            <text:p>5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824" calcext:value-type="percentage">
            <text:p>28.2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4/1.557/1.851/0.16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32S" calcext:value-type="time">
            <text:p>08:03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897" calcext:value-type="percentage">
            <text:p>28.9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0/1.649/1.718/0.0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37S" calcext:value-type="time">
            <text:p>08:03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2979" calcext:value-type="percentage">
            <text:p>29.7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2/1.849/2.106/0.2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42S" calcext:value-type="time">
            <text:p>08:03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18" calcext:value-type="percentage">
            <text:p>81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032" calcext:value-type="percentage">
            <text:p>30.3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6/1.803/2.018/0.1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48S" calcext:value-type="time">
            <text:p>08:03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49" calcext:value-type="percentage">
            <text:p>64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076" calcext:value-type="percentage">
            <text:p>30.7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9/1.744/1.908/0.1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53S" calcext:value-type="time">
            <text:p>08:03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57" calcext:value-type="percentage">
            <text:p>85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114" calcext:value-type="percentage">
            <text:p>31.1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82" calcext:value-type="float">
            <text:p>1.82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7/1.704/1.993/0.2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3M58S" calcext:value-type="time">
            <text:p>08:03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18" calcext:value-type="percentage">
            <text:p>81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153" calcext:value-type="percentage">
            <text:p>31.5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9/1.637/1.834/0.13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03S" calcext:value-type="time">
            <text:p>08:04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02" calcext:value-type="percentage">
            <text:p>32.0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.83" calcext:value-type="float">
            <text:p>1.8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4/1.701/2.134/0.25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09S" calcext:value-type="time">
            <text:p>08:04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1.83" calcext:value-type="float">
            <text:p>1.8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5/1.662/1.750/0.1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14S" calcext:value-type="time">
            <text:p>08:04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7" calcext:value-type="percentage">
            <text:p>4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72/1.553/1.839/0.2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19S" calcext:value-type="time">
            <text:p>08:04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2/1.853/2.044/0.12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24S" calcext:value-type="time">
            <text:p>08:04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9/1.598/1.830/0.1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30S" calcext:value-type="time">
            <text:p>08:04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" calcext:value-type="percentage">
            <text:p>32.2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1/1.780/2.149/0.23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35S" calcext:value-type="time">
            <text:p>08:04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1" calcext:value-type="percentage">
            <text:p>32.2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5/1.768/2.026/0.2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40S" calcext:value-type="time">
            <text:p>08:04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5/1.722/2.103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45S" calcext:value-type="time">
            <text:p>08:04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1" calcext:value-type="percentage">
            <text:p>32.2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5/1.701/1.878/0.1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50S" calcext:value-type="time">
            <text:p>08:04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41" calcext:value-type="percentage">
            <text:p>94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" calcext:value-type="percentage">
            <text:p>32.2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3/1.754/1.920/0.1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4M56S" calcext:value-type="time">
            <text:p>08:04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2/1.745/2.107/0.21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01S" calcext:value-type="time">
            <text:p>08:05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61" calcext:value-type="percentage">
            <text:p>86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18" calcext:value-type="float">
            <text:p>2.18</text:p>
          </table:table-cell>
          <table:table-cell/>
          <table:table-cell office:value-type="float" office:value="1.89" calcext:value-type="float">
            <text:p>1.89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9/1.667/2.036/0.2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06S" calcext:value-type="time">
            <text:p>08:05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9" calcext:value-type="float">
            <text:p>2.09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6/1.588/1.734/0.1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11S" calcext:value-type="time">
            <text:p>08:05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4/1.683/2.019/0.2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17S" calcext:value-type="time">
            <text:p>08:05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7/1.811/2.160/0.2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22S" calcext:value-type="time">
            <text:p>08:05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4" calcext:value-type="percentage">
            <text:p>51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82/1.652/2.076/0.3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27S" calcext:value-type="time">
            <text:p>08:05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25" calcext:value-type="percentage">
            <text:p>62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6/1.687/2.109/0.2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32S" calcext:value-type="time">
            <text:p>08:05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.82" calcext:value-type="float">
            <text:p>1.82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0/1.708/1.896/0.1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38S" calcext:value-type="time">
            <text:p>08:05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1.83" calcext:value-type="float">
            <text:p>1.8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7/1.674/1.883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43S" calcext:value-type="time">
            <text:p>08:05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.83" calcext:value-type="float">
            <text:p>1.8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5/1.733/2.017/0.1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48S" calcext:value-type="time">
            <text:p>08:05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.83" calcext:value-type="float">
            <text:p>1.8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8/1.685/2.030/0.2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53S" calcext:value-type="time">
            <text:p>08:05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8/1.758/1.901/0.12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5M59S" calcext:value-type="time">
            <text:p>08:05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1.82" calcext:value-type="float">
            <text:p>1.82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10/1.495/1.720/0.1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04S" calcext:value-type="time">
            <text:p>08:06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1.83" calcext:value-type="float">
            <text:p>1.8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1/1.597/1.793/0.1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09S" calcext:value-type="time">
            <text:p>08:06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.83" calcext:value-type="float">
            <text:p>1.8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0/1.556/1.698/0.0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14S" calcext:value-type="time">
            <text:p>08:06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0/1.561/1.857/0.1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19S" calcext:value-type="time">
            <text:p>08:06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4/1.668/1.878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25S" calcext:value-type="time">
            <text:p>08:06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1/1.624/1.788/0.0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30S" calcext:value-type="time">
            <text:p>08:06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4" calcext:value-type="percentage">
            <text:p>51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0/1.754/1.864/0.10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35S" calcext:value-type="time">
            <text:p>08:06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6/1.928/2.127/0.1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40S" calcext:value-type="time">
            <text:p>08:06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8/1.723/1.899/0.1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46S" calcext:value-type="time">
            <text:p>08:06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5/1.651/1.809/0.1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51S" calcext:value-type="time">
            <text:p>08:06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6/1.731/2.004/0.1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6M56S" calcext:value-type="time">
            <text:p>08:06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1/1.971/2.316/0.2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01S" calcext:value-type="time">
            <text:p>08:07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5" calcext:value-type="percentage">
            <text:p>65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9/1.728/1.920/0.1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07S" calcext:value-type="time">
            <text:p>08:07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8" calcext:value-type="percentage">
            <text:p>5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5/1.552/1.794/0.15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12S" calcext:value-type="time">
            <text:p>08:07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9/1.776/1.961/0.1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17S" calcext:value-type="time">
            <text:p>08:07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9/1.681/1.995/0.24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22S" calcext:value-type="time">
            <text:p>08:07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7/1.740/2.018/0.17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28S" calcext:value-type="time">
            <text:p>08:07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7/1.658/1.774/0.0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33S" calcext:value-type="time">
            <text:p>08:07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5/1.691/1.924/0.1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38S" calcext:value-type="time">
            <text:p>08:07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6" calcext:value-type="percentage">
            <text:p>5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5/1.841/2.025/0.2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43S" calcext:value-type="time">
            <text:p>08:07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06" calcext:value-type="percentage">
            <text:p>60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3/1.917/2.159/0.2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49S" calcext:value-type="time">
            <text:p>08:07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6" calcext:value-type="percentage">
            <text:p>5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1.79" calcext:value-type="float">
            <text:p>1.7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6/1.878/2.112/0.19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54S" calcext:value-type="time">
            <text:p>08:07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86" calcext:value-type="percentage">
            <text:p>8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2/1.874/2.092/0.14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7M59S" calcext:value-type="time">
            <text:p>08:07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8/1.740/1.975/0.2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04S" calcext:value-type="time">
            <text:p>08:08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82" calcext:value-type="percentage">
            <text:p>88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78" calcext:value-type="float">
            <text:p>1.78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7/1.741/1.881/0.0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10S" calcext:value-type="time">
            <text:p>08:08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2/1.759/2.106/0.23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15S" calcext:value-type="time">
            <text:p>08:08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53" calcext:value-type="percentage">
            <text:p>85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08/1.651/1.857/0.18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20S" calcext:value-type="time">
            <text:p>08:08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3" calcext:value-type="percentage">
            <text:p>32.1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7/1.842/2.146/0.19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25S" calcext:value-type="time">
            <text:p>08:08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5" calcext:value-type="percentage">
            <text:p>32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0/1.679/1.856/0.13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31S" calcext:value-type="time">
            <text:p>08:08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3/1.662/1.817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36S" calcext:value-type="time">
            <text:p>08:08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5" calcext:value-type="percentage">
            <text:p>32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79" calcext:value-type="float">
            <text:p>1.7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82/1.505/1.714/0.1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41S" calcext:value-type="time">
            <text:p>08:08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79" calcext:value-type="float">
            <text:p>1.7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6/1.582/1.635/0.05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46S" calcext:value-type="time">
            <text:p>08:08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5" calcext:value-type="percentage">
            <text:p>32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9/1.531/1.596/0.06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51S" calcext:value-type="time">
            <text:p>08:08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5" calcext:value-type="percentage">
            <text:p>32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4/1.608/1.739/0.09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8M57S" calcext:value-type="time">
            <text:p>08:08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2" calcext:value-type="percentage">
            <text:p>47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77" calcext:value-type="float">
            <text:p>1.7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1/1.828/1.977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02S" calcext:value-type="time">
            <text:p>08:09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77" calcext:value-type="float">
            <text:p>1.7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3/1.562/1.685/0.0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07S" calcext:value-type="time">
            <text:p>08:09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77" calcext:value-type="float">
            <text:p>1.7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64/1.962/2.112/0.0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12S" calcext:value-type="time">
            <text:p>08:09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0/1.913/2.087/0.2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18S" calcext:value-type="time">
            <text:p>08:09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5" calcext:value-type="percentage">
            <text:p>75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5/1.845/2.036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23S" calcext:value-type="time">
            <text:p>08:09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5/1.607/1.715/0.0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28S" calcext:value-type="time">
            <text:p>08:09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58" calcext:value-type="percentage">
            <text:p>75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5" calcext:value-type="percentage">
            <text:p>32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9/1.811/2.058/0.2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33S" calcext:value-type="time">
            <text:p>08:09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94" calcext:value-type="percentage">
            <text:p>5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74" calcext:value-type="float">
            <text:p>1.7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7/1.801/2.003/0.1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39S" calcext:value-type="time">
            <text:p>08:09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7/1.777/2.167/0.2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44S" calcext:value-type="time">
            <text:p>08:09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5/1.718/1.910/0.1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49S" calcext:value-type="time">
            <text:p>08:09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6/1.734/2.063/0.25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09M54S" calcext:value-type="time">
            <text:p>08:09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3" calcext:value-type="percentage">
            <text:p>32.1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4/1.694/1.997/0.21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00S" calcext:value-type="time">
            <text:p>08:10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1/1.800/1.968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05S" calcext:value-type="time">
            <text:p>08:10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6" calcext:value-type="percentage">
            <text:p>4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74" calcext:value-type="float">
            <text:p>1.7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3/1.831/2.208/0.23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10S" calcext:value-type="time">
            <text:p>08:10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56" calcext:value-type="percentage">
            <text:p>6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4" calcext:value-type="percentage">
            <text:p>32.1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74" calcext:value-type="float">
            <text:p>1.7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67/1.629/2.018/0.3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15S" calcext:value-type="time">
            <text:p>08:10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1" calcext:value-type="percentage">
            <text:p>5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7/1.666/2.239/0.3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20S" calcext:value-type="time">
            <text:p>08:10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7/1.844/2.050/0.1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26S" calcext:value-type="time">
            <text:p>08:10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7" calcext:value-type="percentage">
            <text:p>4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0/1.858/2.057/0.1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31S" calcext:value-type="time">
            <text:p>08:10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74" calcext:value-type="float">
            <text:p>1.7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24/1.933/2.092/0.0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36S" calcext:value-type="time">
            <text:p>08:10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2" calcext:value-type="percentage">
            <text:p>4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5" calcext:value-type="percentage">
            <text:p>32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74" calcext:value-type="float">
            <text:p>1.7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6/1.853/2.328/0.2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41S" calcext:value-type="time">
            <text:p>08:10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19" calcext:value-type="percentage">
            <text:p>41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73" calcext:value-type="float">
            <text:p>1.7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1/1.815/2.223/0.25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47S" calcext:value-type="time">
            <text:p>08:10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72" calcext:value-type="float">
            <text:p>1.7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3/1.784/1.958/0.1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52S" calcext:value-type="time">
            <text:p>08:10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4" calcext:value-type="percentage">
            <text:p>51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72" calcext:value-type="float">
            <text:p>1.7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2/1.875/2.170/0.2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0M57S" calcext:value-type="time">
            <text:p>08:10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86" calcext:value-type="percentage">
            <text:p>8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71" calcext:value-type="float">
            <text:p>1.7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3/1.753/1.963/0.1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02S" calcext:value-type="time">
            <text:p>08:11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6" calcext:value-type="percentage">
            <text:p>32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71" calcext:value-type="float">
            <text:p>1.7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3/1.713/2.066/0.19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08S" calcext:value-type="time">
            <text:p>08:11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86" calcext:value-type="percentage">
            <text:p>8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8/1.819/2.011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13S" calcext:value-type="time">
            <text:p>08:11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5/1.712/2.148/0.2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18S" calcext:value-type="time">
            <text:p>08:11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6/1.906/2.124/0.2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23S" calcext:value-type="time">
            <text:p>08:11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3/1.868/2.039/0.10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29S" calcext:value-type="time">
            <text:p>08:11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8/1.717/1.920/0.18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34S" calcext:value-type="time">
            <text:p>08:11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2" calcext:value-type="percentage">
            <text:p>4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9/1.759/2.162/0.2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39S" calcext:value-type="time">
            <text:p>08:11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6" calcext:value-type="percentage">
            <text:p>4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5/1.744/1.981/0.22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44S" calcext:value-type="time">
            <text:p>08:11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2" calcext:value-type="float">
            <text:p>1.12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6/1.792/2.056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49S" calcext:value-type="time">
            <text:p>08:11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8" calcext:value-type="percentage">
            <text:p>32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8/1.759/2.092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1M55S" calcext:value-type="time">
            <text:p>08:11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3/1.710/1.871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00S" calcext:value-type="time">
            <text:p>08:12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6" calcext:value-type="percentage">
            <text:p>4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2/1.649/1.793/0.1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05S" calcext:value-type="time">
            <text:p>08:12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9" calcext:value-type="percentage">
            <text:p>32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2/1.701/2.022/0.1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10S" calcext:value-type="time">
            <text:p>08:12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" calcext:value-type="percentage">
            <text:p>32.2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2/1.643/1.827/0.1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16S" calcext:value-type="time">
            <text:p>08:12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2" calcext:value-type="percentage">
            <text:p>4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5/1.725/1.937/0.2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21S" calcext:value-type="time">
            <text:p>08:12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6/1.747/1.825/0.0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26S" calcext:value-type="time">
            <text:p>08:12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17" calcext:value-type="percentage">
            <text:p>32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3/1.753/1.918/0.1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31S" calcext:value-type="time">
            <text:p>08:12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2" calcext:value-type="percentage">
            <text:p>32.2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1/1.810/2.104/0.1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37S" calcext:value-type="time">
            <text:p>08:12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47" calcext:value-type="percentage">
            <text:p>64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3" calcext:value-type="percentage">
            <text:p>32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0/1.780/1.910/0.08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42S" calcext:value-type="time">
            <text:p>08:12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3" calcext:value-type="percentage">
            <text:p>32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3/1.783/2.034/0.15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47S" calcext:value-type="time">
            <text:p>08:12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4" calcext:value-type="percentage">
            <text:p>32.2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1/1.745/2.046/0.16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52S" calcext:value-type="time">
            <text:p>08:12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3" calcext:value-type="percentage">
            <text:p>32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5/1.796/1.975/0.16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2M58S" calcext:value-type="time">
            <text:p>08:12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6" calcext:value-type="percentage">
            <text:p>4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5" calcext:value-type="percentage">
            <text:p>32.2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6/1.720/1.874/0.1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03S" calcext:value-type="time">
            <text:p>08:13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6" calcext:value-type="percentage">
            <text:p>32.2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0/1.741/1.894/0.13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08S" calcext:value-type="time">
            <text:p>08:13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8" calcext:value-type="percentage">
            <text:p>52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5" calcext:value-type="percentage">
            <text:p>32.2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2/1.856/2.029/0.13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13S" calcext:value-type="time">
            <text:p>08:13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7" calcext:value-type="percentage">
            <text:p>32.2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28/1.668/1.957/0.27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18S" calcext:value-type="time">
            <text:p>08:13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1" calcext:value-type="percentage">
            <text:p>5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28" calcext:value-type="percentage">
            <text:p>32.2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3/1.785/1.908/0.10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24S" calcext:value-type="time">
            <text:p>08:13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76" calcext:value-type="percentage">
            <text:p>6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2" calcext:value-type="percentage">
            <text:p>32.3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9/1.850/2.060/0.11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29S" calcext:value-type="time">
            <text:p>08:13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86" calcext:value-type="percentage">
            <text:p>6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3" calcext:value-type="percentage">
            <text:p>32.3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00/1.642/2.094/0.32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34S" calcext:value-type="time">
            <text:p>08:13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6" calcext:value-type="percentage">
            <text:p>4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" calcext:value-type="percentage">
            <text:p>32.3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1/1.684/2.044/0.18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39S" calcext:value-type="time">
            <text:p>08:13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18" calcext:value-type="percentage">
            <text:p>61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4" calcext:value-type="percentage">
            <text:p>32.3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1/1.668/1.881/0.1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45S" calcext:value-type="time">
            <text:p>08:13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4" calcext:value-type="percentage">
            <text:p>32.3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2" calcext:value-type="float">
            <text:p>1.72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5/2.222/4.412/1.0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50S" calcext:value-type="time">
            <text:p>08:13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3" calcext:value-type="percentage">
            <text:p>32.3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0/1.676/1.780/0.0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3M55S" calcext:value-type="time">
            <text:p>08:13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6" calcext:value-type="percentage">
            <text:p>32.3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0/1.860/2.059/0.15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00S" calcext:value-type="time">
            <text:p>08:14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79" calcext:value-type="percentage">
            <text:p>87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7" calcext:value-type="percentage">
            <text:p>32.3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9/1.696/1.929/0.1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06S" calcext:value-type="time">
            <text:p>08:14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8" calcext:value-type="percentage">
            <text:p>32.3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1.71" calcext:value-type="float">
            <text:p>1.7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1/1.643/1.835/0.1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11S" calcext:value-type="time">
            <text:p>08:14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" calcext:value-type="percentage">
            <text:p>32.4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4/2.230/4.211/0.9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16S" calcext:value-type="time">
            <text:p>08:14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53" calcext:value-type="percentage">
            <text:p>85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38" calcext:value-type="percentage">
            <text:p>32.3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3/1.533/1.739/0.10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21S" calcext:value-type="time">
            <text:p>08:14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41" calcext:value-type="percentage">
            <text:p>94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1" calcext:value-type="percentage">
            <text:p>32.4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2/1.632/1.793/0.11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27S" calcext:value-type="time">
            <text:p>08:14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1" calcext:value-type="percentage">
            <text:p>32.4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1" calcext:value-type="float">
            <text:p>2.01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2/1.673/1.738/0.0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32S" calcext:value-type="time">
            <text:p>08:14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67" calcext:value-type="percentage">
            <text:p>6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3" calcext:value-type="percentage">
            <text:p>32.4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89/1.893/2.125/0.11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37S" calcext:value-type="time">
            <text:p>08:14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81" calcext:value-type="percentage">
            <text:p>7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5" calcext:value-type="percentage">
            <text:p>32.4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6/1.763/1.971/0.20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42S" calcext:value-type="time">
            <text:p>08:14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33" calcext:value-type="percentage">
            <text:p>83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3" calcext:value-type="percentage">
            <text:p>32.4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2/1.862/2.106/0.2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48S" calcext:value-type="time">
            <text:p>08:14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11" calcext:value-type="percentage">
            <text:p>61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5" calcext:value-type="percentage">
            <text:p>32.4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2/1.695/2.071/0.2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53S" calcext:value-type="time">
            <text:p>08:14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4" calcext:value-type="percentage">
            <text:p>32.4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0/1.886/2.207/0.2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4M58S" calcext:value-type="time">
            <text:p>08:14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6" calcext:value-type="percentage">
            <text:p>32.4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3/1.775/2.056/0.1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03S" calcext:value-type="time">
            <text:p>08:15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6" calcext:value-type="percentage">
            <text:p>32.4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3/1.794/2.165/0.2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09S" calcext:value-type="time">
            <text:p>08:15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3" calcext:value-type="percentage">
            <text:p>43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8" calcext:value-type="percentage">
            <text:p>32.4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8/1.751/2.004/0.1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14S" calcext:value-type="time">
            <text:p>08:15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7" calcext:value-type="percentage">
            <text:p>32.4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4/1.712/2.051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19S" calcext:value-type="time">
            <text:p>08:15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19" calcext:value-type="percentage">
            <text:p>41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8" calcext:value-type="percentage">
            <text:p>32.4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8/1.922/2.247/0.1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24S" calcext:value-type="time">
            <text:p>08:15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7" calcext:value-type="percentage">
            <text:p>32.4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65" calcext:value-type="float">
            <text:p>1.6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8/1.672/1.991/0.20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29S" calcext:value-type="time">
            <text:p>08:15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46" calcext:value-type="percentage">
            <text:p>32.4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5/1.912/2.124/0.1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35S" calcext:value-type="time">
            <text:p>08:15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1" calcext:value-type="percentage">
            <text:p>32.5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1/1.812/1.974/0.10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40S" calcext:value-type="time">
            <text:p>08:15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8" calcext:value-type="percentage">
            <text:p>5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" calcext:value-type="percentage">
            <text:p>32.5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4/1.749/2.014/0.23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45S" calcext:value-type="time">
            <text:p>08:15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3" calcext:value-type="percentage">
            <text:p>32.5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4/1.856/1.995/0.1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50S" calcext:value-type="time">
            <text:p>08:15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3" calcext:value-type="percentage">
            <text:p>32.5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8/1.675/1.921/0.1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5M56S" calcext:value-type="time">
            <text:p>08:15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5" calcext:value-type="percentage">
            <text:p>32.5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62" calcext:value-type="float">
            <text:p>1.6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4/1.832/2.122/0.1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01S" calcext:value-type="time">
            <text:p>08:16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5" calcext:value-type="percentage">
            <text:p>32.5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62" calcext:value-type="float">
            <text:p>1.6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98/1.902/2.176/0.17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06S" calcext:value-type="time">
            <text:p>08:16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5" calcext:value-type="percentage">
            <text:p>32.5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6/1.837/2.133/0.2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11S" calcext:value-type="time">
            <text:p>08:16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8" calcext:value-type="percentage">
            <text:p>32.5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62" calcext:value-type="float">
            <text:p>1.6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3/1.971/2.167/0.13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17S" calcext:value-type="time">
            <text:p>08:16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2" calcext:value-type="percentage">
            <text:p>4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" calcext:value-type="percentage">
            <text:p>32.6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62" calcext:value-type="float">
            <text:p>1.6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54/1.860/1.954/0.07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22S" calcext:value-type="time">
            <text:p>08:16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" calcext:value-type="percentage">
            <text:p>32.6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62" calcext:value-type="float">
            <text:p>1.6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6/1.940/2.239/0.1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27S" calcext:value-type="time">
            <text:p>08:16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" calcext:value-type="percentage">
            <text:p>32.6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61" calcext:value-type="float">
            <text:p>1.6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89/1.921/2.250/0.17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32S" calcext:value-type="time">
            <text:p>08:16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59" calcext:value-type="percentage">
            <text:p>32.5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4/1.858/2.215/0.2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38S" calcext:value-type="time">
            <text:p>08:16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14" calcext:value-type="percentage">
            <text:p>71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3" calcext:value-type="percentage">
            <text:p>32.6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2" calcext:value-type="float">
            <text:p>1.12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9/1.745/2.088/0.2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43S" calcext:value-type="time">
            <text:p>08:16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3" calcext:value-type="percentage">
            <text:p>32.6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1" calcext:value-type="float">
            <text:p>1.11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40/1.927/2.004/0.0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48S" calcext:value-type="time">
            <text:p>08:16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2" calcext:value-type="percentage">
            <text:p>32.6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6/1.806/2.148/0.2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53S" calcext:value-type="time">
            <text:p>08:16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5" calcext:value-type="percentage">
            <text:p>32.6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3/1.658/1.963/0.15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6M59S" calcext:value-type="time">
            <text:p>08:16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3" calcext:value-type="percentage">
            <text:p>54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6" calcext:value-type="percentage">
            <text:p>32.6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8/1.761/1.956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04S" calcext:value-type="time">
            <text:p>08:17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4" calcext:value-type="percentage">
            <text:p>32.6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2/1.771/2.098/0.2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09S" calcext:value-type="time">
            <text:p>08:17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7" calcext:value-type="percentage">
            <text:p>32.6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9/1.940/2.158/0.15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14S" calcext:value-type="time">
            <text:p>08:17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94" calcext:value-type="percentage">
            <text:p>7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8" calcext:value-type="percentage">
            <text:p>32.6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0/1.780/2.154/0.2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19S" calcext:value-type="time">
            <text:p>08:17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2" calcext:value-type="percentage">
            <text:p>4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8" calcext:value-type="percentage">
            <text:p>32.6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3/1.723/1.886/0.1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25S" calcext:value-type="time">
            <text:p>08:17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79" calcext:value-type="percentage">
            <text:p>87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9" calcext:value-type="percentage">
            <text:p>32.6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0/1.904/2.096/0.13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30S" calcext:value-type="time">
            <text:p>08:17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8" calcext:value-type="percentage">
            <text:p>5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6" calcext:value-type="percentage">
            <text:p>32.6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6/1.813/2.116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35S" calcext:value-type="time">
            <text:p>08:17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92" calcext:value-type="percentage">
            <text:p>89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68" calcext:value-type="percentage">
            <text:p>32.6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8/1.956/2.208/0.2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40S" calcext:value-type="time">
            <text:p>08:17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" calcext:value-type="percentage">
            <text:p>32.7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0/1.858/2.053/0.1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46S" calcext:value-type="time">
            <text:p>08:17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" calcext:value-type="percentage">
            <text:p>32.7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9/1.717/1.960/0.15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51S" calcext:value-type="time">
            <text:p>08:17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1" calcext:value-type="percentage">
            <text:p>32.7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2/1.806/1.881/0.0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7M56S" calcext:value-type="time">
            <text:p>08:17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2" calcext:value-type="percentage">
            <text:p>32.7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1/1.640/1.769/0.11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01S" calcext:value-type="time">
            <text:p>08:18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3" calcext:value-type="percentage">
            <text:p>32.7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27/1.940/2.093/0.0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07S" calcext:value-type="time">
            <text:p>08:18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5" calcext:value-type="percentage">
            <text:p>32.7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84/2.022/2.179/0.1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12S" calcext:value-type="time">
            <text:p>08:18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5" calcext:value-type="percentage">
            <text:p>32.7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2/1.842/2.093/0.15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17S" calcext:value-type="time">
            <text:p>08:18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2" calcext:value-type="percentage">
            <text:p>4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3" calcext:value-type="percentage">
            <text:p>32.7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7/1.833/2.212/0.2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22S" calcext:value-type="time">
            <text:p>08:18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7" calcext:value-type="percentage">
            <text:p>32.7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2/1.889/2.190/0.1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28S" calcext:value-type="time">
            <text:p>08:18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" calcext:value-type="percentage">
            <text:p>32.8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7/1.773/1.875/0.11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33S" calcext:value-type="time">
            <text:p>08:18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1" calcext:value-type="percentage">
            <text:p>32.8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7/1.888/2.007/0.09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38S" calcext:value-type="time">
            <text:p>08:18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9" calcext:value-type="percentage">
            <text:p>32.7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9/1.801/1.871/0.0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43S" calcext:value-type="time">
            <text:p>08:18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" calcext:value-type="percentage">
            <text:p>32.8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14/1.893/1.973/0.0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48S" calcext:value-type="time">
            <text:p>08:18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8" calcext:value-type="percentage">
            <text:p>32.7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61" calcext:value-type="float">
            <text:p>1.6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9/1.819/2.062/0.2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54S" calcext:value-type="time">
            <text:p>08:18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7" calcext:value-type="percentage">
            <text:p>4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5" calcext:value-type="percentage">
            <text:p>32.7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1" calcext:value-type="float">
            <text:p>1.91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61" calcext:value-type="float">
            <text:p>1.6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83/2.023/2.192/0.13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8M59S" calcext:value-type="time">
            <text:p>08:18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19" calcext:value-type="percentage">
            <text:p>41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1" calcext:value-type="percentage">
            <text:p>32.8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83/1.996/2.149/0.1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04S" calcext:value-type="time">
            <text:p>08:19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1" calcext:value-type="percentage">
            <text:p>5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79" calcext:value-type="percentage">
            <text:p>32.7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9/1.895/2.119/0.1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09S" calcext:value-type="time">
            <text:p>08:19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2" calcext:value-type="percentage">
            <text:p>32.8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6/1.831/2.178/0.2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15S" calcext:value-type="time">
            <text:p>08:19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4" calcext:value-type="percentage">
            <text:p>32.8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7/1.678/2.148/0.25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20S" calcext:value-type="time">
            <text:p>08:19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6" calcext:value-type="percentage">
            <text:p>51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5" calcext:value-type="percentage">
            <text:p>32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7/1.819/2.269/0.27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25S" calcext:value-type="time">
            <text:p>08:19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4" calcext:value-type="percentage">
            <text:p>32.8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4/1.676/1.969/0.16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30S" calcext:value-type="time">
            <text:p>08:19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6" calcext:value-type="percentage">
            <text:p>4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4" calcext:value-type="percentage">
            <text:p>32.8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5/1.924/2.167/0.17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36S" calcext:value-type="time">
            <text:p>08:19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5" calcext:value-type="percentage">
            <text:p>32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9/1.843/2.296/0.2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41S" calcext:value-type="time">
            <text:p>08:19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4" calcext:value-type="percentage">
            <text:p>32.8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0/1.816/2.027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46S" calcext:value-type="time">
            <text:p>08:19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8" calcext:value-type="percentage">
            <text:p>56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5" calcext:value-type="percentage">
            <text:p>32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15/1.946/2.097/0.1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51S" calcext:value-type="time">
            <text:p>08:19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97" calcext:value-type="percentage">
            <text:p>69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3" calcext:value-type="percentage">
            <text:p>32.8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9/1.883/2.229/0.1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19M57S" calcext:value-type="time">
            <text:p>08:19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45" calcext:value-type="percentage">
            <text:p>6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5" calcext:value-type="percentage">
            <text:p>32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7/1.939/2.054/0.1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02S" calcext:value-type="time">
            <text:p>08:20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5" calcext:value-type="percentage">
            <text:p>32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6/1.890/2.245/0.2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07S" calcext:value-type="time">
            <text:p>08:20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3" calcext:value-type="percentage">
            <text:p>32.8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6/1.925/2.373/0.22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12S" calcext:value-type="time">
            <text:p>08:20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2" calcext:value-type="percentage">
            <text:p>4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5" calcext:value-type="percentage">
            <text:p>32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5/1.741/1.893/0.1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17S" calcext:value-type="time">
            <text:p>08:20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5" calcext:value-type="percentage">
            <text:p>32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0/1.860/2.134/0.26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23S" calcext:value-type="time">
            <text:p>08:20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19" calcext:value-type="percentage">
            <text:p>41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5" calcext:value-type="percentage">
            <text:p>32.8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74/1.877/2.014/0.10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28S" calcext:value-type="time">
            <text:p>08:20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7" calcext:value-type="percentage">
            <text:p>32.8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7/1.830/2.032/0.22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33S" calcext:value-type="time">
            <text:p>08:20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75" calcext:value-type="percentage">
            <text:p>87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6" calcext:value-type="percentage">
            <text:p>32.8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8/1.749/2.050/0.1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38S" calcext:value-type="time">
            <text:p>08:20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8" calcext:value-type="percentage">
            <text:p>32.8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1/1.702/1.986/0.20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44S" calcext:value-type="time">
            <text:p>08:20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94" calcext:value-type="percentage">
            <text:p>7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6" calcext:value-type="percentage">
            <text:p>32.8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0/1.902/2.030/0.11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49S" calcext:value-type="time">
            <text:p>08:20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94" calcext:value-type="percentage">
            <text:p>7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6" calcext:value-type="percentage">
            <text:p>32.8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15/2.166/2.426/0.1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54S" calcext:value-type="time">
            <text:p>08:20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6" calcext:value-type="percentage">
            <text:p>32.8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81/1.876/1.976/0.07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0M59S" calcext:value-type="time">
            <text:p>08:20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9" calcext:value-type="percentage">
            <text:p>32.8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7/1.678/1.924/0.18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05S" calcext:value-type="time">
            <text:p>08:21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8" calcext:value-type="percentage">
            <text:p>54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9" calcext:value-type="percentage">
            <text:p>32.8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2/1.784/2.091/0.21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10S" calcext:value-type="time">
            <text:p>08:21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9" calcext:value-type="percentage">
            <text:p>32.8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16/1.890/1.966/0.04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15S" calcext:value-type="time">
            <text:p>08:21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6" calcext:value-type="percentage">
            <text:p>51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8" calcext:value-type="percentage">
            <text:p>32.8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8/1.882/2.058/0.11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20S" calcext:value-type="time">
            <text:p>08:21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88" calcext:value-type="percentage">
            <text:p>32.8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6/1.747/2.120/0.1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26S" calcext:value-type="time">
            <text:p>08:21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1" calcext:value-type="percentage">
            <text:p>32.9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9/1.909/2.221/0.2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31S" calcext:value-type="time">
            <text:p>08:21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2" calcext:value-type="percentage">
            <text:p>32.9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4/1.776/2.182/0.2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36S" calcext:value-type="time">
            <text:p>08:21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" calcext:value-type="percentage">
            <text:p>32.9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05/1.931/2.122/0.1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41S" calcext:value-type="time">
            <text:p>08:21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1" calcext:value-type="percentage">
            <text:p>32.9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3/1.839/1.977/0.0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46S" calcext:value-type="time">
            <text:p>08:21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8" calcext:value-type="percentage">
            <text:p>5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2" calcext:value-type="percentage">
            <text:p>32.9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2/1.751/1.915/0.0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52S" calcext:value-type="time">
            <text:p>08:21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2" calcext:value-type="percentage">
            <text:p>32.9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5/1.818/2.109/0.17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1M57S" calcext:value-type="time">
            <text:p>08:21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6" calcext:value-type="percentage">
            <text:p>5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2" calcext:value-type="percentage">
            <text:p>32.9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8/1.660/1.808/0.1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02S" calcext:value-type="time">
            <text:p>08:22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1" calcext:value-type="percentage">
            <text:p>32.9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8/1.720/1.909/0.1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07S" calcext:value-type="time">
            <text:p>08:22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3" calcext:value-type="percentage">
            <text:p>32.9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3/1.805/1.981/0.1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13S" calcext:value-type="time">
            <text:p>08:22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3" calcext:value-type="percentage">
            <text:p>32.9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7/1.705/1.881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18S" calcext:value-type="time">
            <text:p>08:22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1" calcext:value-type="percentage">
            <text:p>32.9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2/1.650/1.780/0.0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23S" calcext:value-type="time">
            <text:p>08:22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8" calcext:value-type="percentage">
            <text:p>54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3" calcext:value-type="percentage">
            <text:p>32.9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3/1.960/2.092/0.13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28S" calcext:value-type="time">
            <text:p>08:22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1" calcext:value-type="percentage">
            <text:p>32.9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9/1.809/2.084/0.2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34S" calcext:value-type="time">
            <text:p>08:22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2" calcext:value-type="percentage">
            <text:p>32.9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2/1.869/2.034/0.1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39S" calcext:value-type="time">
            <text:p>08:22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2" calcext:value-type="percentage">
            <text:p>32.9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0/1.655/1.739/0.06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44S" calcext:value-type="time">
            <text:p>08:22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" calcext:value-type="percentage">
            <text:p>32.9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28/1.915/2.039/0.09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49S" calcext:value-type="time">
            <text:p>08:22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2" calcext:value-type="percentage">
            <text:p>45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3" calcext:value-type="percentage">
            <text:p>32.9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0/1.958/2.222/0.1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2M54S" calcext:value-type="time">
            <text:p>08:22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2" calcext:value-type="percentage">
            <text:p>32.9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0/1.790/1.948/0.1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00S" calcext:value-type="time">
            <text:p>08:23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3" calcext:value-type="percentage">
            <text:p>32.9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2/1.674/1.962/0.21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05S" calcext:value-type="time">
            <text:p>08:23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81" calcext:value-type="percentage">
            <text:p>78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4" calcext:value-type="percentage">
            <text:p>32.9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9/1.816/1.938/0.0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10S" calcext:value-type="time">
            <text:p>08:23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1" calcext:value-type="percentage">
            <text:p>32.9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58/1.888/2.104/0.11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15S" calcext:value-type="time">
            <text:p>08:23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6" calcext:value-type="percentage">
            <text:p>5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4" calcext:value-type="percentage">
            <text:p>32.9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9/1.582/1.675/0.0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21S" calcext:value-type="time">
            <text:p>08:23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4" calcext:value-type="percentage">
            <text:p>32.9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2/1.722/1.918/0.0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26S" calcext:value-type="time">
            <text:p>08:23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2" calcext:value-type="percentage">
            <text:p>32.9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91/2.014/2.176/0.14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31S" calcext:value-type="time">
            <text:p>08:23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84" calcext:value-type="percentage">
            <text:p>7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5" calcext:value-type="percentage">
            <text:p>32.9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6/1.851/2.110/0.23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36S" calcext:value-type="time">
            <text:p>08:23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6" calcext:value-type="percentage">
            <text:p>32.9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2/1.797/2.104/0.1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42S" calcext:value-type="time">
            <text:p>08:23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7" calcext:value-type="percentage">
            <text:p>32.9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32/1.981/2.132/0.12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47S" calcext:value-type="time">
            <text:p>08:23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18" calcext:value-type="percentage">
            <text:p>61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8" calcext:value-type="percentage">
            <text:p>32.9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2/1.783/1.961/0.1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52S" calcext:value-type="time">
            <text:p>08:23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14" calcext:value-type="percentage">
            <text:p>91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4" calcext:value-type="percentage">
            <text:p>32.9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2/1.768/1.924/0.11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3M57S" calcext:value-type="time">
            <text:p>08:23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5" calcext:value-type="percentage">
            <text:p>32.9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2/1.900/2.089/0.1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03S" calcext:value-type="time">
            <text:p>08:24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7" calcext:value-type="percentage">
            <text:p>32.9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14/1.886/2.009/0.0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08S" calcext:value-type="time">
            <text:p>08:24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7" calcext:value-type="percentage">
            <text:p>32.9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0/1.601/1.892/0.19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13S" calcext:value-type="time">
            <text:p>08:24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8" calcext:value-type="percentage">
            <text:p>32.9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1/1.821/1.951/0.1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18S" calcext:value-type="time">
            <text:p>08:24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7" calcext:value-type="percentage">
            <text:p>32.9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51" calcext:value-type="float">
            <text:p>1.5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6/1.852/2.137/0.2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24S" calcext:value-type="time">
            <text:p>08:24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6" calcext:value-type="percentage">
            <text:p>5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8" calcext:value-type="percentage">
            <text:p>32.9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51" calcext:value-type="float">
            <text:p>1.5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49/1.728/2.043/0.24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29S" calcext:value-type="time">
            <text:p>08:24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7" calcext:value-type="percentage">
            <text:p>32.9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6/1.879/2.190/0.1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34S" calcext:value-type="time">
            <text:p>08:24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8" calcext:value-type="percentage">
            <text:p>32.9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5/1.865/2.214/0.22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39S" calcext:value-type="time">
            <text:p>08:24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6" calcext:value-type="percentage">
            <text:p>32.9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0/2.194/3.519/0.68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45S" calcext:value-type="time">
            <text:p>08:24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7" calcext:value-type="percentage">
            <text:p>32.9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3/1.685/1.859/0.16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50S" calcext:value-type="time">
            <text:p>08:24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9" calcext:value-type="percentage">
            <text:p>32.9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51" calcext:value-type="float">
            <text:p>1.5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9/1.812/2.152/0.22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4M55S" calcext:value-type="time">
            <text:p>08:24:5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6" calcext:value-type="percentage">
            <text:p>32.9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9/1.983/2.307/0.18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00S" calcext:value-type="time">
            <text:p>08:25:0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9" calcext:value-type="percentage">
            <text:p>32.9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51" calcext:value-type="float">
            <text:p>1.5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6/1.878/1.985/0.0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05S" calcext:value-type="time">
            <text:p>08:25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6" calcext:value-type="percentage">
            <text:p>5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9" calcext:value-type="percentage">
            <text:p>32.9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51" calcext:value-type="float">
            <text:p>1.51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4/1.971/2.100/0.16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11S" calcext:value-type="time">
            <text:p>08:25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9" calcext:value-type="percentage">
            <text:p>32.9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3/1.675/1.848/0.0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16S" calcext:value-type="time">
            <text:p>08:25:1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" calcext:value-type="percentage">
            <text:p>33.0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8/1.845/2.176/0.26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21S" calcext:value-type="time">
            <text:p>08:25:2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8" calcext:value-type="percentage">
            <text:p>32.9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42/1.854/2.084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26S" calcext:value-type="time">
            <text:p>08:25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6" calcext:value-type="percentage">
            <text:p>4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8" calcext:value-type="percentage">
            <text:p>32.9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66/1.727/1.907/0.1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32S" calcext:value-type="time">
            <text:p>08:25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" calcext:value-type="percentage">
            <text:p>33.0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6/1.877/1.969/0.0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37S" calcext:value-type="time">
            <text:p>08:25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9" calcext:value-type="percentage">
            <text:p>32.9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35/1.893/2.193/0.16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42S" calcext:value-type="time">
            <text:p>08:25:4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294" calcext:value-type="percentage">
            <text:p>32.9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59/1.863/2.040/0.10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47S" calcext:value-type="time">
            <text:p>08:25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" calcext:value-type="percentage">
            <text:p>33.0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4/1.782/2.040/0.2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53S" calcext:value-type="time">
            <text:p>08:25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1" calcext:value-type="percentage">
            <text:p>33.0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71/1.819/1.975/0.10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5M58S" calcext:value-type="time">
            <text:p>08:25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1" calcext:value-type="percentage">
            <text:p>33.0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5/1.809/2.041/0.18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03S" calcext:value-type="time">
            <text:p>08:26:0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6" calcext:value-type="percentage">
            <text:p>5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3" calcext:value-type="percentage">
            <text:p>33.0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1/1.748/1.992/0.2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08S" calcext:value-type="time">
            <text:p>08:26:0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5" calcext:value-type="percentage">
            <text:p>75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" calcext:value-type="percentage">
            <text:p>33.0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9/1.833/2.323/0.26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14S" calcext:value-type="time">
            <text:p>08:26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38" calcext:value-type="percentage">
            <text:p>8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4" calcext:value-type="percentage">
            <text:p>33.0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7/1.876/1.925/0.0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19S" calcext:value-type="time">
            <text:p>08:26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48" calcext:value-type="percentage">
            <text:p>84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5" calcext:value-type="percentage">
            <text:p>33.0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57/1.792/2.195/0.3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24S" calcext:value-type="time">
            <text:p>08:26:2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43" calcext:value-type="percentage">
            <text:p>94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2" calcext:value-type="percentage">
            <text:p>33.0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6/1.897/2.185/0.28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29S" calcext:value-type="time">
            <text:p>08:26:2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27" calcext:value-type="percentage">
            <text:p>72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5" calcext:value-type="percentage">
            <text:p>33.0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0/1.855/2.209/0.2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35S" calcext:value-type="time">
            <text:p>08:26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8" calcext:value-type="percentage">
            <text:p>33.0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4/1.855/2.082/0.16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40S" calcext:value-type="time">
            <text:p>08:26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9" calcext:value-type="percentage">
            <text:p>33.0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8/1.837/1.991/0.08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45S" calcext:value-type="time">
            <text:p>08:26:4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743" calcext:value-type="percentage">
            <text:p>74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6" calcext:value-type="percentage">
            <text:p>33.0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6/1.742/1.999/0.15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50S" calcext:value-type="time">
            <text:p>08:26:5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8" calcext:value-type="percentage">
            <text:p>5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5" calcext:value-type="percentage">
            <text:p>33.0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0/1.865/2.261/0.20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6M56S" calcext:value-type="time">
            <text:p>08:26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9" calcext:value-type="percentage">
            <text:p>33.0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0/1.814/2.133/0.20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01S" calcext:value-type="time">
            <text:p>08:27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8" calcext:value-type="percentage">
            <text:p>33.0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6/1.902/2.108/0.13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06S" calcext:value-type="time">
            <text:p>08:27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68" calcext:value-type="percentage">
            <text:p>86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6" calcext:value-type="percentage">
            <text:p>33.0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66/1.841/1.937/0.06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11S" calcext:value-type="time">
            <text:p>08:27:1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9" calcext:value-type="percentage">
            <text:p>33.0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5/1.858/2.106/0.16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17S" calcext:value-type="time">
            <text:p>08:27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1" calcext:value-type="percentage">
            <text:p>5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8" calcext:value-type="percentage">
            <text:p>33.0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1/1.766/1.919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22S" calcext:value-type="time">
            <text:p>08:27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9" calcext:value-type="percentage">
            <text:p>33.0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27/1.948/2.111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27S" calcext:value-type="time">
            <text:p>08:27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6" calcext:value-type="percentage">
            <text:p>33.0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2/1.720/1.941/0.19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32S" calcext:value-type="time">
            <text:p>08:27:3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7" calcext:value-type="percentage">
            <text:p>33.0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2/1.842/2.117/0.1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37S" calcext:value-type="time">
            <text:p>08:27:3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9" calcext:value-type="percentage">
            <text:p>33.0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90/1.916/2.262/0.2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43S" calcext:value-type="time">
            <text:p>08:27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" calcext:value-type="percentage">
            <text:p>33.1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33/1.837/2.071/0.1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48S" calcext:value-type="time">
            <text:p>08:27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5" calcext:value-type="percentage">
            <text:p>48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8" calcext:value-type="percentage">
            <text:p>33.0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6/1.772/1.932/0.12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53S" calcext:value-type="time">
            <text:p>08:27:5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09" calcext:value-type="percentage">
            <text:p>33.0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9/1.825/2.083/0.17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7M58S" calcext:value-type="time">
            <text:p>08:27:5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69" calcext:value-type="percentage">
            <text:p>46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6/1.729/1.924/0.1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04S" calcext:value-type="time">
            <text:p>08:28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0/1.757/2.153/0.2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09S" calcext:value-type="time">
            <text:p>08:28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67/1.857/1.959/0.11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14S" calcext:value-type="time">
            <text:p>08:28:1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8" calcext:value-type="percentage">
            <text:p>54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" calcext:value-type="percentage">
            <text:p>33.1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08/1.901/2.238/0.18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19S" calcext:value-type="time">
            <text:p>08:28:1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1" calcext:value-type="percentage">
            <text:p>33.1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8/1.700/1.752/0.0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25S" calcext:value-type="time">
            <text:p>08:28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73/1.764/1.871/0.1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30S" calcext:value-type="time">
            <text:p>08:28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4/1.774/2.038/0.15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35S" calcext:value-type="time">
            <text:p>08:28:3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8/1.592/1.828/0.14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40S" calcext:value-type="time">
            <text:p>08:28:4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71" calcext:value-type="percentage">
            <text:p>4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" calcext:value-type="percentage">
            <text:p>33.1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87/1.679/1.981/0.24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46S" calcext:value-type="time">
            <text:p>08:28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06" calcext:value-type="percentage">
            <text:p>60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1" calcext:value-type="percentage">
            <text:p>33.1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923/1.984/2.039/0.03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51S" calcext:value-type="time">
            <text:p>08:28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5/1.739/2.075/0.19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8M56S" calcext:value-type="time">
            <text:p>08:28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" calcext:value-type="percentage">
            <text:p>33.1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8/1.848/2.373/0.33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01S" calcext:value-type="time">
            <text:p>08:29:0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09/2.023/2.281/0.18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06S" calcext:value-type="time">
            <text:p>08:29:0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3" calcext:value-type="percentage">
            <text:p>33.1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19/1.876/2.104/0.17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12S" calcext:value-type="time">
            <text:p>08:29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1" calcext:value-type="percentage">
            <text:p>33.1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81/1.874/2.009/0.08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17S" calcext:value-type="time">
            <text:p>08:29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3" calcext:value-type="percentage">
            <text:p>58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4" calcext:value-type="percentage">
            <text:p>33.1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4/1.846/2.007/0.15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22S" calcext:value-type="time">
            <text:p>08:29:2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56" calcext:value-type="percentage">
            <text:p>6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1" calcext:value-type="percentage">
            <text:p>33.1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05/1.810/2.149/0.2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27S" calcext:value-type="time">
            <text:p>08:29:2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71" calcext:value-type="percentage">
            <text:p>9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6" calcext:value-type="percentage">
            <text:p>33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93/1.883/1.973/0.06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33S" calcext:value-type="time">
            <text:p>08:29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5" calcext:value-type="percentage">
            <text:p>33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3/1.820/2.086/0.20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38S" calcext:value-type="time">
            <text:p>08:29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3" calcext:value-type="percentage">
            <text:p>33.1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11/1.912/2.073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43S" calcext:value-type="time">
            <text:p>08:29:4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31" calcext:value-type="percentage">
            <text:p>53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6" calcext:value-type="percentage">
            <text:p>33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42/1.590/1.888/0.21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48S" calcext:value-type="time">
            <text:p>08:29:4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94" calcext:value-type="percentage">
            <text:p>5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5" calcext:value-type="percentage">
            <text:p>33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3/1.690/1.968/0.20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54S" calcext:value-type="time">
            <text:p>08:29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5" calcext:value-type="percentage">
            <text:p>33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26/1.818/2.000/0.09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29M59S" calcext:value-type="time">
            <text:p>08:29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941" calcext:value-type="percentage">
            <text:p>94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4" calcext:value-type="percentage">
            <text:p>33.1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2/1.731/2.001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04S" calcext:value-type="time">
            <text:p>08:30:0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1" calcext:value-type="percentage">
            <text:p>33.1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8/1.875/2.057/0.1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09S" calcext:value-type="time">
            <text:p>08:30:0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886" calcext:value-type="percentage">
            <text:p>8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3" calcext:value-type="percentage">
            <text:p>33.1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6/1.861/2.164/0.19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15S" calcext:value-type="time">
            <text:p>08:30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5" calcext:value-type="percentage">
            <text:p>33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8/1.718/1.818/0.09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20S" calcext:value-type="time">
            <text:p>08:30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6" calcext:value-type="percentage">
            <text:p>33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57/1.777/1.906/0.0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25S" calcext:value-type="time">
            <text:p>08:30:2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55" calcext:value-type="percentage">
            <text:p>45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6" calcext:value-type="percentage">
            <text:p>33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80/1.901/2.225/0.2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30S" calcext:value-type="time">
            <text:p>08:30:3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6" calcext:value-type="percentage">
            <text:p>33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846/1.934/2.054/0.07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36S" calcext:value-type="time">
            <text:p>08:30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7" calcext:value-type="percentage">
            <text:p>33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86/1.913/1.992/0.11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41S" calcext:value-type="time">
            <text:p>08:30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1" calcext:value-type="percentage">
            <text:p>57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7" calcext:value-type="percentage">
            <text:p>33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748/1.940/2.043/0.10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46S" calcext:value-type="time">
            <text:p>08:30:4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8" calcext:value-type="percentage">
            <text:p>33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623/1.780/1.975/0.1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51S" calcext:value-type="time">
            <text:p>08:30:5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8" calcext:value-type="percentage">
            <text:p>54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4" calcext:value-type="percentage">
            <text:p>33.1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01/1.696/1.855/0.2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0M56S" calcext:value-type="time">
            <text:p>08:30:5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8" calcext:value-type="percentage">
            <text:p>5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4" calcext:value-type="percentage">
            <text:p>33.1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4/1.797/2.197/0.31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02S" calcext:value-type="time">
            <text:p>08:31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7" calcext:value-type="percentage">
            <text:p>33.1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0/1.637/1.824/0.14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07S" calcext:value-type="time">
            <text:p>08:31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3" calcext:value-type="percentage">
            <text:p>33.1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46/1.769/1.964/0.15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12S" calcext:value-type="time">
            <text:p>08:31:1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76" calcext:value-type="percentage">
            <text:p>57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4" calcext:value-type="percentage">
            <text:p>33.1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13/1.579/1.691/0.10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17S" calcext:value-type="time">
            <text:p>08:31:1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59" calcext:value-type="percentage">
            <text:p>55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6" calcext:value-type="percentage">
            <text:p>33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93/1.825/2.010/0.19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23S" calcext:value-type="time">
            <text:p>08:31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6" calcext:value-type="percentage">
            <text:p>33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67/1.723/1.846/0.09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28S" calcext:value-type="time">
            <text:p>08:31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29" calcext:value-type="percentage">
            <text:p>52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6" calcext:value-type="percentage">
            <text:p>33.1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24/1.756/2.050/0.26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33S" calcext:value-type="time">
            <text:p>08:31:3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38" calcext:value-type="percentage">
            <text:p>43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2" calcext:value-type="percentage">
            <text:p>33.12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53/1.646/1.829/0.0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38S" calcext:value-type="time">
            <text:p>08:31:3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62" calcext:value-type="percentage">
            <text:p>56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3" calcext:value-type="percentage">
            <text:p>33.1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84/1.678/1.820/0.0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44S" calcext:value-type="time">
            <text:p>08:31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88" calcext:value-type="percentage">
            <text:p>5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5" calcext:value-type="percentage">
            <text:p>33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23/1.692/1.949/0.22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49S" calcext:value-type="time">
            <text:p>08:31:4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25" calcext:value-type="percentage">
            <text:p>62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5" calcext:value-type="percentage">
            <text:p>33.15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88/1.517/1.736/0.117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number-columns-repeated="4"/>
          <table:table-cell table:formula="of:=AVERAGE([.E76:.E403])" office:value-type="percentage" office:value="0.568850609756097" calcext:value-type="percentage">
            <text:p>56.89%</text:p>
          </table:table-cell>
          <table:table-cell table:number-columns-repeated="4"/>
          <table:table-cell table:formula="of:=AVERAGE([.J76:.J403])" office:value-type="percentage" office:value="0.325535365853659" calcext:value-type="percentage">
            <text:p>32.55%</text:p>
          </table:table-cell>
          <table:table-cell table:number-columns-repeated="6"/>
          <table:table-cell table:formula="of:=AVERAGE([.Q76:.Q403])" office:value-type="float" office:value="3.37" calcext:value-type="float">
            <text:p>3.37</text:p>
          </table:table-cell>
          <table:table-cell table:formula="of:=AVERAGE([.R76:.R403])" office:value-type="float" office:value="8.26999999999999" calcext:value-type="float">
            <text:p>8.26999999999999</text:p>
          </table:table-cell>
          <table:table-cell table:number-columns-repeated="39"/>
        </table:table-row>
        <table:table-row table:style-name="ro1">
          <table:table-cell table:number-columns-repeated="57"/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54S" calcext:value-type="time">
            <text:p>08:31:5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" calcext:value-type="percentage">
            <text:p>33.2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61/1.629/1.817/0.14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1M59S" calcext:value-type="time">
            <text:p>08:31:5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3" calcext:value-type="percentage">
            <text:p>33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44" calcext:value-type="float">
            <text:p>1.4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72/1.699/1.849/0.12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05S" calcext:value-type="time">
            <text:p>08:32:0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15" calcext:value-type="percentage">
            <text:p>51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" calcext:value-type="percentage">
            <text:p>33.2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34/1.588/1.802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10S" calcext:value-type="time">
            <text:p>08:32:1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394" calcext:value-type="percentage">
            <text:p>39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8" calcext:value-type="percentage">
            <text:p>33.1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6/1.495/1.582/0.0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15S" calcext:value-type="time">
            <text:p>08:32:15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19" calcext:value-type="percentage">
            <text:p>33.1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44" calcext:value-type="float">
            <text:p>1.44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51/1.517/1.868/0.19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20S" calcext:value-type="time">
            <text:p>08:32:20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73" calcext:value-type="percentage">
            <text:p>27.3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" calcext:value-type="percentage">
            <text:p>33.2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2.08" calcext:value-type="float">
            <text:p>2.08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1/1.586/1.861/0.15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26S" calcext:value-type="time">
            <text:p>08:32:2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545" calcext:value-type="percentage">
            <text:p>54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3" calcext:value-type="percentage">
            <text:p>33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39/1.763/1.909/0.15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31S" calcext:value-type="time">
            <text:p>08:32:3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36" calcext:value-type="percentage">
            <text:p>63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4" calcext:value-type="percentage">
            <text:p>33.24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6/1.651/2.120/0.2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36S" calcext:value-type="time">
            <text:p>08:32:36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56" calcext:value-type="percentage">
            <text:p>65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3" calcext:value-type="percentage">
            <text:p>33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45/1.727/2.007/0.21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41S" calcext:value-type="time">
            <text:p>08:32:41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65" calcext:value-type="percentage">
            <text:p>26.5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" calcext:value-type="percentage">
            <text:p>33.2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32/1.589/1.801/0.138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47S" calcext:value-type="time">
            <text:p>08:32:4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42" calcext:value-type="percentage">
            <text:p>24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3" calcext:value-type="percentage">
            <text:p>33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91" calcext:value-type="float">
            <text:p>1.91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4/1.671/1.996/0.18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52S" calcext:value-type="time">
            <text:p>08:32:5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12" calcext:value-type="percentage">
            <text:p>21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3" calcext:value-type="percentage">
            <text:p>33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75/1.578/1.724/0.131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2M57S" calcext:value-type="time">
            <text:p>08:32:5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19" calcext:value-type="percentage">
            <text:p>21.9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1" calcext:value-type="percentage">
            <text:p>33.21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3/1.636/1.965/0.20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02S" calcext:value-type="time">
            <text:p>08:33:02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67" calcext:value-type="percentage">
            <text:p>6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3" calcext:value-type="percentage">
            <text:p>33.23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2/1.565/1.713/0.11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07S" calcext:value-type="time">
            <text:p>08:33:07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67" calcext:value-type="percentage">
            <text:p>16.7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26" calcext:value-type="percentage">
            <text:p>33.2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53/1.674/1.846/0.145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13S" calcext:value-type="time">
            <text:p>08:33:1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686" calcext:value-type="percentage">
            <text:p>68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6" calcext:value-type="percentage">
            <text:p>33.6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9/1.645/1.914/0.170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18S" calcext:value-type="time">
            <text:p>08:33:1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12" calcext:value-type="percentage">
            <text:p>21.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88" calcext:value-type="percentage">
            <text:p>33.8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399/1.536/1.788/0.14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23S" calcext:value-type="time">
            <text:p>08:33:23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484" calcext:value-type="percentage">
            <text:p>48.4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86" calcext:value-type="percentage">
            <text:p>33.86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96/1.605/1.905/0.213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28S" calcext:value-type="time">
            <text:p>08:33:28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226" calcext:value-type="percentage">
            <text:p>22.6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87" calcext:value-type="percentage">
            <text:p>33.87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27" calcext:value-type="float">
            <text:p>1.27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277/1.614/1.839/0.206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34S" calcext:value-type="time">
            <text:p>08:33:3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61" calcext:value-type="percentage">
            <text:p>16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89" calcext:value-type="percentage">
            <text:p>33.89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28/1.591/1.725/0.069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39S" calcext:value-type="time">
            <text:p>08:33:39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61" calcext:value-type="percentage">
            <text:p>16.1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88" calcext:value-type="percentage">
            <text:p>33.88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512/1.683/1.893/0.122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time" office:time-value="PT20H33M44S" calcext:value-type="time">
            <text:p>08:33:44 P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age:</text:p>
          </table:table-cell>
          <table:table-cell office:value-type="percentage" office:value="0.188" calcext:value-type="percentage">
            <text:p>18.8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Usage:</text:p>
          </table:table-cell>
          <table:table-cell office:value-type="percentage" office:value="0.339" calcext:value-type="percentage">
            <text:p>33.90%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read</text:p>
          </table:table-cell>
          <table:table-cell office:value-type="string" calcext:value-type="string">
            <text:p>write):</text:p>
          </table:table-cell>
          <table:table-cell office:value-type="float" office:value="3.37" calcext:value-type="float">
            <text:p>3.37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Stats: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Average: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Count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sage:</text:p>
          </table:table-cell>
          <table:table-cell table:number-columns-repeated="3"/>
          <table:table-cell office:value-type="string" calcext:value-type="string">
            <text:p>Dis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Read:3.37</text:p>
          </table:table-cell>
          <table:table-cell office:value-type="string" calcext:value-type="string">
            <text:p>Write:8.27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Latency:</text:p>
          </table:table-cell>
          <table:table-cell office:value-type="string" calcext:value-type="string">
            <text:p>Min:1.408/1.682/1.879/0.154</text:p>
          </table:table-cell>
          <table:table-cell office:value-type="string" calcext:value-type="string">
            <text:p>Avg:ms</text:p>
          </table:table-cell>
          <table:table-cell office:value-type="string" calcext:value-type="string">
            <text:p>Max: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AVERAGE([.E406:.E427])" office:value-type="percentage" office:value="0.427681818181818" calcext:value-type="percentage">
            <text:p>42.77%</text:p>
          </table:table-cell>
          <table:table-cell table:number-columns-repeated="4"/>
          <table:table-cell table:formula="of:=AVERAGE([.J406:.J427])" office:value-type="percentage" office:value="0.334154545454545" calcext:value-type="percentage">
            <text:p>33.42%</text:p>
          </table:table-cell>
          <table:table-cell table:number-columns-repeated="6"/>
          <table:table-cell table:formula="of:=AVERAGE([.Q406:.Q427])" office:value-type="float" office:value="3.37" calcext:value-type="float">
            <text:p>3.37</text:p>
          </table:table-cell>
          <table:table-cell table:formula="of:=AVERAGE([.R406:.R427])" office:value-type="float" office:value="8.27" calcext:value-type="float">
            <text:p>8.27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21:57:57.845891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22:16:40.089658952</dc:date>
    <meta:editing-duration>PT1H48S</meta:editing-duration>
    <meta:editing-cycles>2</meta:editing-cycles>
    <meta:generator>LibreOffice/6.4.7.2$Linux_X86_64 LibreOffice_project/40$Build-2</meta:generator>
    <meta:document-statistic meta:table-count="1" meta:cell-count="15104" meta:object-count="0"/>
  </office:meta>
</office:document-meta>
</file>