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31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283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og_v2_051424_4_tc_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3H11M03S" calcext:value-type="time">
            <text:p>11:11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94" calcext:value-type="percentage">
            <text:p>5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76" calcext:value-type="percentage">
            <text:p>22.7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4" calcext:value-type="float">
            <text:p>3.4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7.58" calcext:value-type="float">
            <text:p>7.58</text:p>
          </table:table-cell>
          <table:table-cell/>
          <table:table-cell office:value-type="float" office:value="7.53" calcext:value-type="float">
            <text:p>7.53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40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3/1.744/1.922/0.14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3H11M07S" calcext:value-type="time">
            <text:p>11:11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93" calcext:value-type="percentage">
            <text:p>22.9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4" calcext:value-type="float">
            <text:p>3.4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7.58" calcext:value-type="float">
            <text:p>7.58</text:p>
          </table:table-cell>
          <table:table-cell/>
          <table:table-cell office:value-type="float" office:value="7.53" calcext:value-type="float">
            <text:p>7.53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40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3/1.747/2.127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AVERAGE([.E1:.E2])" office:value-type="percentage" office:value="0.797" calcext:value-type="percentage">
            <text:p>79.70%</text:p>
          </table:table-cell>
          <table:table-cell table:number-columns-repeated="4"/>
          <table:table-cell table:formula="of:=AVERAGE([.J1:.J2])" office:value-type="percentage" office:value="0.22845" calcext:value-type="percentage">
            <text:p>22.85%</text:p>
          </table:table-cell>
          <table:table-cell table:number-columns-repeated="6"/>
          <table:table-cell table:formula="of:=AVERAGE([.Q1:.Q2])" office:value-type="float" office:value="3.4" calcext:value-type="float">
            <text:p>3.4</text:p>
          </table:table-cell>
          <table:table-cell table:formula="of:=AVERAGE([.R1:.R2])" office:value-type="float" office:value="8.27" calcext:value-type="float">
            <text:p>8.27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23:15:02.038715976</dc:date>
    <meta:editing-duration>PT53S</meta:editing-duration>
    <meta:editing-cycles>1</meta:editing-cycles>
    <meta:document-statistic meta:table-count="1" meta:cell-count="76" meta:object-count="0"/>
    <meta:generator>LibreOffice/6.4.7.2$Linux_X86_64 LibreOffice_project/40$Build-2</meta:generator>
  </office:meta>
</office:document-meta>
</file>