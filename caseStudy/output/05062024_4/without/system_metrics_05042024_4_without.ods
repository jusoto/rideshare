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5181in"/>
    </style:style>
    <style:style style:name="co11" style:family="table-column">
      <style:table-column-properties fo:break-before="auto" style:column-width="0.4319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0.6681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5283in"/>
    </style:style>
    <style:style style:name="co17" style:family="table-column">
      <style:table-column-properties fo:break-before="auto" style:column-width="0.3457in"/>
    </style:style>
    <style:style style:name="co18" style:family="table-column">
      <style:table-column-properties fo:break-before="auto" style:column-width="0.4in"/>
    </style:style>
    <style:style style:name="co19" style:family="table-column">
      <style:table-column-properties fo:break-before="auto" style:column-width="0.6571in"/>
    </style:style>
    <style:style style:name="co20" style:family="table-column">
      <style:table-column-properties fo:break-before="auto" style:column-width="1.8902in"/>
    </style:style>
    <style:style style:name="co21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ystem_metrics_05042024_4_withou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09M05S" calcext:value-type="time">
            <text:p>11:09:0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5.6" calcext:value-type="float">
            <text:p>15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2.79" calcext:value-type="float">
            <text:p>22.7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94" calcext:value-type="float">
            <text:p>0.9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4/1.882/2.125/0.18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09M10S" calcext:value-type="time">
            <text:p>11:09:1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1.9" calcext:value-type="float">
            <text:p>71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2.79" calcext:value-type="float">
            <text:p>22.7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97" calcext:value-type="float">
            <text:p>1.97</text:p>
          </table:table-cell>
          <table:table-cell/>
          <table:table-cell office:value-type="float" office:value="0.93" calcext:value-type="float">
            <text:p>0.9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1/1.794/1.972/0.12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09M15S" calcext:value-type="time">
            <text:p>11:09:1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2.79" calcext:value-type="float">
            <text:p>22.7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97" calcext:value-type="float">
            <text:p>1.97</text:p>
          </table:table-cell>
          <table:table-cell/>
          <table:table-cell office:value-type="float" office:value="0.94" calcext:value-type="float">
            <text:p>0.9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9/1.728/1.930/0.11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09M21S" calcext:value-type="time">
            <text:p>11:09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8.1" calcext:value-type="float">
            <text:p>78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2.8" calcext:value-type="float">
            <text:p>22.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07" calcext:value-type="float">
            <text:p>2.07</text:p>
          </table:table-cell>
          <table:table-cell/>
          <table:table-cell office:value-type="float" office:value="2.12" calcext:value-type="float">
            <text:p>2.12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6/1.655/1.831/0.14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09M26S" calcext:value-type="time">
            <text:p>11:09:2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8.8" calcext:value-type="float">
            <text:p>68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2.82" calcext:value-type="float">
            <text:p>22.8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8" calcext:value-type="float">
            <text:p>1.98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1/1.621/1.706/0.10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09M31S" calcext:value-type="time">
            <text:p>11:09:3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3.8" calcext:value-type="float">
            <text:p>43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2.82" calcext:value-type="float">
            <text:p>22.8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07" calcext:value-type="float">
            <text:p>2.07</text:p>
          </table:table-cell>
          <table:table-cell/>
          <table:table-cell office:value-type="float" office:value="2.12" calcext:value-type="float">
            <text:p>2.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5/1.732/1.955/0.17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09M36S" calcext:value-type="time">
            <text:p>11:09:3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2.82" calcext:value-type="float">
            <text:p>22.8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22" calcext:value-type="float">
            <text:p>2.22</text:p>
          </table:table-cell>
          <table:table-cell/>
          <table:table-cell office:value-type="float" office:value="2.15" calcext:value-type="float">
            <text:p>2.15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62/1.530/1.678/0.14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09M42S" calcext:value-type="time">
            <text:p>11:09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81.8" calcext:value-type="float">
            <text:p>81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2.84" calcext:value-type="float">
            <text:p>22.8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36" calcext:value-type="float">
            <text:p>2.36</text:p>
          </table:table-cell>
          <table:table-cell/>
          <table:table-cell office:value-type="float" office:value="2.18" calcext:value-type="float">
            <text:p>2.18</text:p>
          </table:table-cell>
          <table:table-cell/>
          <table:table-cell office:value-type="float" office:value="1.04" calcext:value-type="float">
            <text:p>1.0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9/1.740/1.991/0.12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09M47S" calcext:value-type="time">
            <text:p>11:09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2.4" calcext:value-type="float">
            <text:p>42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2.86" calcext:value-type="float">
            <text:p>22.86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41" calcext:value-type="float">
            <text:p>2.41</text:p>
          </table:table-cell>
          <table:table-cell/>
          <table:table-cell office:value-type="float" office:value="2.19" calcext:value-type="float">
            <text:p>2.19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6/1.734/1.845/0.08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09M52S" calcext:value-type="time">
            <text:p>11:09:5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1.9" calcext:value-type="float">
            <text:p>41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2.86" calcext:value-type="float">
            <text:p>22.86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46" calcext:value-type="float">
            <text:p>2.46</text:p>
          </table:table-cell>
          <table:table-cell/>
          <table:table-cell office:value-type="float" office:value="2.21" calcext:value-type="float">
            <text:p>2.21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3/1.719/2.035/0.16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09M57S" calcext:value-type="time">
            <text:p>11:09:5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5.8" calcext:value-type="float">
            <text:p>25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2.86" calcext:value-type="float">
            <text:p>22.86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08" calcext:value-type="float">
            <text:p>2.08</text:p>
          </table:table-cell>
          <table:table-cell/>
          <table:table-cell office:value-type="float" office:value="2.13" calcext:value-type="float">
            <text:p>2.13</text:p>
          </table:table-cell>
          <table:table-cell/>
          <table:table-cell office:value-type="float" office:value="1.04" calcext:value-type="float">
            <text:p>1.0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6/1.604/1.761/0.12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0M03S" calcext:value-type="time">
            <text:p>11:10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0.6" calcext:value-type="float">
            <text:p>70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2.88" calcext:value-type="float">
            <text:p>22.8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16" calcext:value-type="float">
            <text:p>2.16</text:p>
          </table:table-cell>
          <table:table-cell/>
          <table:table-cell office:value-type="float" office:value="2.15" calcext:value-type="float">
            <text:p>2.15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18/1.647/1.830/0.13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0M08S" calcext:value-type="time">
            <text:p>11:10:0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1.9" calcext:value-type="float">
            <text:p>21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3.03" calcext:value-type="float">
            <text:p>23.0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06" calcext:value-type="float">
            <text:p>2.06</text:p>
          </table:table-cell>
          <table:table-cell/>
          <table:table-cell office:value-type="float" office:value="2.13" calcext:value-type="float">
            <text:p>2.13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7/1.559/1.641/0.05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0M13S" calcext:value-type="time">
            <text:p>11:10:1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3.24" calcext:value-type="float">
            <text:p>23.2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2.09" calcext:value-type="float">
            <text:p>2.09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88/1.832/2.031/0.11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0M18S" calcext:value-type="time">
            <text:p>11:10:1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2.3" calcext:value-type="float">
            <text:p>32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3.48" calcext:value-type="float">
            <text:p>23.4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9" calcext:value-type="float">
            <text:p>1.99</text:p>
          </table:table-cell>
          <table:table-cell/>
          <table:table-cell office:value-type="float" office:value="2.11" calcext:value-type="float">
            <text:p>2.11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25/1.563/1.768/0.18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0M24S" calcext:value-type="time">
            <text:p>11:10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2.6" calcext:value-type="float">
            <text:p>22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3.68" calcext:value-type="float">
            <text:p>23.6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3" calcext:value-type="float">
            <text:p>1.83</text:p>
          </table:table-cell>
          <table:table-cell/>
          <table:table-cell office:value-type="float" office:value="2.07" calcext:value-type="float">
            <text:p>2.07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3/1.551/1.680/0.08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0M29S" calcext:value-type="time">
            <text:p>11:10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3.96" calcext:value-type="float">
            <text:p>23.96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2.04" calcext:value-type="float">
            <text:p>2.04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7/1.629/1.968/0.18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0M34S" calcext:value-type="time">
            <text:p>11:10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4.06" calcext:value-type="float">
            <text:p>24.06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3" calcext:value-type="float">
            <text:p>1.63</text:p>
          </table:table-cell>
          <table:table-cell/>
          <table:table-cell office:value-type="float" office:value="2.02" calcext:value-type="float">
            <text:p>2.02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77/1.647/2.084/0.25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0M39S" calcext:value-type="time">
            <text:p>11:10:3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5.7" calcext:value-type="float">
            <text:p>25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4.19" calcext:value-type="float">
            <text:p>24.1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26/1.610/1.939/0.23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0M45S" calcext:value-type="time">
            <text:p>11:10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8.6" calcext:value-type="float">
            <text:p>68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4.3" calcext:value-type="float">
            <text:p>24.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97" calcext:value-type="float">
            <text:p>1.97</text:p>
          </table:table-cell>
          <table:table-cell/>
          <table:table-cell office:value-type="float" office:value="1.04" calcext:value-type="float">
            <text:p>1.0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81/1.481/1.624/0.08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0M50S" calcext:value-type="time">
            <text:p>11:10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4.7" calcext:value-type="float">
            <text:p>64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4.45" calcext:value-type="float">
            <text:p>24.4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94" calcext:value-type="float">
            <text:p>1.94</text:p>
          </table:table-cell>
          <table:table-cell/>
          <table:table-cell office:value-type="float" office:value="1.04" calcext:value-type="float">
            <text:p>1.0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0/1.736/1.963/0.17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0M55S" calcext:value-type="time">
            <text:p>11:10:5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9.4" calcext:value-type="float">
            <text:p>29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4.66" calcext:value-type="float">
            <text:p>24.66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94" calcext:value-type="float">
            <text:p>1.94</text:p>
          </table:table-cell>
          <table:table-cell/>
          <table:table-cell office:value-type="float" office:value="1.04" calcext:value-type="float">
            <text:p>1.0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5/1.671/1.836/0.13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1M00S" calcext:value-type="time">
            <text:p>11:11:0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4.89" calcext:value-type="float">
            <text:p>24.8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91" calcext:value-type="float">
            <text:p>1.91</text:p>
          </table:table-cell>
          <table:table-cell/>
          <table:table-cell office:value-type="float" office:value="1.04" calcext:value-type="float">
            <text:p>1.0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4/1.558/1.890/0.17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1M05S" calcext:value-type="time">
            <text:p>11:11:0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14" calcext:value-type="float">
            <text:p>25.1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92" calcext:value-type="float">
            <text:p>1.92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8/1.708/1.909/0.1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1M11S" calcext:value-type="time">
            <text:p>11:11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7.2" calcext:value-type="float">
            <text:p>17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26" calcext:value-type="float">
            <text:p>25.26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89" calcext:value-type="float">
            <text:p>1.89</text:p>
          </table:table-cell>
          <table:table-cell/>
          <table:table-cell office:value-type="float" office:value="1.04" calcext:value-type="float">
            <text:p>1.0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82/1.817/1.916/0.08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1M16S" calcext:value-type="time">
            <text:p>11:11:1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9.4" calcext:value-type="float">
            <text:p>19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32" calcext:value-type="float">
            <text:p>25.3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88" calcext:value-type="float">
            <text:p>1.88</text:p>
          </table:table-cell>
          <table:table-cell/>
          <table:table-cell office:value-type="float" office:value="1.04" calcext:value-type="float">
            <text:p>1.0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177/1.592/1.805/0.22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1M21S" calcext:value-type="time">
            <text:p>11:11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1.9" calcext:value-type="float">
            <text:p>21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41" calcext:value-type="float">
            <text:p>25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.85" calcext:value-type="float">
            <text:p>1.85</text:p>
          </table:table-cell>
          <table:table-cell/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97/1.534/1.862/0.20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1M26S" calcext:value-type="time">
            <text:p>11:11:2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5.7" calcext:value-type="float">
            <text:p>25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5" calcext:value-type="float">
            <text:p>25.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6" calcext:value-type="float">
            <text:p>1.16</text:p>
          </table:table-cell>
          <table:table-cell/>
          <table:table-cell office:value-type="float" office:value="1.83" calcext:value-type="float">
            <text:p>1.83</text:p>
          </table:table-cell>
          <table:table-cell/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5/1.759/1.901/0.09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1M32S" calcext:value-type="time">
            <text:p>11:11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58" calcext:value-type="float">
            <text:p>25.5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7" calcext:value-type="float">
            <text:p>1.07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54/1.642/1.812/0.16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1M37S" calcext:value-type="time">
            <text:p>11:11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4.5" calcext:value-type="float">
            <text:p>6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61" calcext:value-type="float">
            <text:p>25.6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8" calcext:value-type="float">
            <text:p>0.98</text:p>
          </table:table-cell>
          <table:table-cell/>
          <table:table-cell office:value-type="float" office:value="1.77" calcext:value-type="float">
            <text:p>1.77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9/1.606/1.712/0.09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1M42S" calcext:value-type="time">
            <text:p>11:11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5.6" calcext:value-type="float">
            <text:p>65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61" calcext:value-type="float">
            <text:p>25.6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0/1.641/1.984/0.18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1M47S" calcext:value-type="time">
            <text:p>11:11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9.4" calcext:value-type="float">
            <text:p>19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63" calcext:value-type="float">
            <text:p>25.6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3" calcext:value-type="float">
            <text:p>0.83</text:p>
          </table:table-cell>
          <table:table-cell/>
          <table:table-cell office:value-type="float" office:value="1.71" calcext:value-type="float">
            <text:p>1.71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97/1.580/1.937/0.23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1M53S" calcext:value-type="time">
            <text:p>11:11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6.1" calcext:value-type="float">
            <text:p>16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66" calcext:value-type="float">
            <text:p>25.66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64/1.707/1.997/0.22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1M58S" calcext:value-type="time">
            <text:p>11:11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85" calcext:value-type="float">
            <text:p>25.8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7" calcext:value-type="float">
            <text:p>0.97</text:p>
          </table:table-cell>
          <table:table-cell/>
          <table:table-cell office:value-type="float" office:value="1.69" calcext:value-type="float">
            <text:p>1.69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1/1.515/1.648/0.08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table:number-columns-repeated="4"/>
          <table:table-cell table:formula="of:=AVERAGE([.E1:.E34])" office:value-type="float" office:value="44.5" calcext:value-type="float">
            <text:p>44.5</text:p>
          </table:table-cell>
          <table:table-cell table:number-columns-repeated="4"/>
          <table:table-cell table:formula="of:=AVERAGE([.J1:.J34])" office:value-type="float" office:value="24.0717647058824" calcext:value-type="float">
            <text:p>24.0717647058824</text:p>
          </table:table-cell>
          <table:table-cell table:number-columns-repeated="6"/>
          <table:table-cell table:formula="of:=AVERAGE([.Q1:.Q34])" office:value-type="float" office:value="3.3" calcext:value-type="float">
            <text:p>3.3</text:p>
          </table:table-cell>
          <table:table-cell table:formula="of:=AVERAGE([.R1:.R34])" office:value-type="float" office:value="9.04" calcext:value-type="float">
            <text:p>9.04</text:p>
          </table:table-cell>
          <table:table-cell table:number-columns-repeated="5"/>
          <table:table-cell table:formula="of:=AVERAGE([.X1:.X34])" office:value-type="float" office:value="1.57529411764706" calcext:value-type="float">
            <text:p>1.57529411764706</text:p>
          </table:table-cell>
          <table:table-cell/>
          <table:table-cell table:formula="of:=AVERAGE([.Z1:.Z34])" office:value-type="float" office:value="1.97764705882353" calcext:value-type="float">
            <text:p>1.97764705882353</text:p>
          </table:table-cell>
          <table:table-cell/>
          <table:table-cell table:formula="of:=AVERAGE([.AB1:.AB34])" office:value-type="float" office:value="1.02558823529412" calcext:value-type="float">
            <text:p>1.02558823529412</text:p>
          </table:table-cell>
          <table:table-cell table:number-columns-repeated="4"/>
          <table:table-cell table:formula="of:=AVERAGE([.AG1:.AG34])" office:value-type="float" office:value="275.882352941176" calcext:value-type="float">
            <text:p>275.882352941176</text:p>
          </table:table-cell>
          <table:table-cell table:number-columns-repeated="18"/>
        </table:table-row>
        <table:table-row table:style-name="ro1">
          <table:table-cell table:number-columns-repeated="51"/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2M03S" calcext:value-type="time">
            <text:p>11:12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0.6" calcext:value-type="float">
            <text:p>20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85" calcext:value-type="float">
            <text:p>25.8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7" calcext:value-type="float">
            <text:p>0.97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21/1.516/1.771/0.15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2M08S" calcext:value-type="time">
            <text:p>11:12:0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2.9" calcext:value-type="float">
            <text:p>6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86" calcext:value-type="float">
            <text:p>25.86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9" calcext:value-type="float">
            <text:p>0.89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70/1.576/1.759/0.17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2M13S" calcext:value-type="time">
            <text:p>11:12:1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8.2" calcext:value-type="float">
            <text:p>18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87" calcext:value-type="float">
            <text:p>25.8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2" calcext:value-type="float">
            <text:p>0.82</text:p>
          </table:table-cell>
          <table:table-cell/>
          <table:table-cell office:value-type="float" office:value="1.63" calcext:value-type="float">
            <text:p>1.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6/1.634/1.896/0.14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2M19S" calcext:value-type="time">
            <text:p>11:12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0.6" calcext:value-type="float">
            <text:p>20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87" calcext:value-type="float">
            <text:p>25.8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67/1.606/1.852/0.16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2M24S" calcext:value-type="time">
            <text:p>11:12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2.9" calcext:value-type="float">
            <text:p>1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89" calcext:value-type="float">
            <text:p>25.8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69" calcext:value-type="float">
            <text:p>0.69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04/1.585/1.937/0.23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2M29S" calcext:value-type="time">
            <text:p>11:12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4.7" calcext:value-type="float">
            <text:p>14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89" calcext:value-type="float">
            <text:p>25.8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64" calcext:value-type="float">
            <text:p>0.64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2/1.737/1.916/0.14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2M34S" calcext:value-type="time">
            <text:p>11:12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8.2" calcext:value-type="float">
            <text:p>18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89" calcext:value-type="float">
            <text:p>25.8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59" calcext:value-type="float">
            <text:p>0.59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9/1.747/2.050/0.19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2M40S" calcext:value-type="time">
            <text:p>11:12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7.6" calcext:value-type="float">
            <text:p>17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91" calcext:value-type="float">
            <text:p>25.9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78" calcext:value-type="float">
            <text:p>0.78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91/1.724/1.815/0.09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2M45S" calcext:value-type="time">
            <text:p>11:12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92" calcext:value-type="float">
            <text:p>25.9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16/1.532/1.809/0.19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2M50S" calcext:value-type="time">
            <text:p>11:12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2.5" calcext:value-type="float">
            <text:p>12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93" calcext:value-type="float">
            <text:p>25.9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2" calcext:value-type="float">
            <text:p>0.82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0/1.672/1.802/0.07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2M55S" calcext:value-type="time">
            <text:p>11:12:5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8.6" calcext:value-type="float">
            <text:p>28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5.97" calcext:value-type="float">
            <text:p>25.9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195/1.650/2.042/0.32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3M00S" calcext:value-type="time">
            <text:p>11:13:0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1.2" calcext:value-type="float">
            <text:p>21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6.02" calcext:value-type="float">
            <text:p>26.0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69" calcext:value-type="float">
            <text:p>0.69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7/1.815/1.967/0.09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3M06S" calcext:value-type="time">
            <text:p>11:13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6.1" calcext:value-type="float">
            <text:p>16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6.25" calcext:value-type="float">
            <text:p>26.2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6/1.562/1.691/0.07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3M11S" calcext:value-type="time">
            <text:p>11:13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0.6" calcext:value-type="float">
            <text:p>20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6.45" calcext:value-type="float">
            <text:p>26.4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8/1.725/2.060/0.21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3M16S" calcext:value-type="time">
            <text:p>11:13:1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8.2" calcext:value-type="float">
            <text:p>18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6.65" calcext:value-type="float">
            <text:p>26.6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61" calcext:value-type="float">
            <text:p>0.61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0.97" calcext:value-type="float">
            <text:p>0.9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7/1.661/1.787/0.07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3M21S" calcext:value-type="time">
            <text:p>11:13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2.9" calcext:value-type="float">
            <text:p>1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6.85" calcext:value-type="float">
            <text:p>26.8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56" calcext:value-type="float">
            <text:p>0.56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0.97" calcext:value-type="float">
            <text:p>0.9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5/1.556/1.636/0.0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3M27S" calcext:value-type="time">
            <text:p>11:13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0.6" calcext:value-type="float">
            <text:p>20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07" calcext:value-type="float">
            <text:p>27.0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51" calcext:value-type="float">
            <text:p>0.51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0.96" calcext:value-type="float">
            <text:p>0.9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92/1.821/2.014/0.11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3M32S" calcext:value-type="time">
            <text:p>11:13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7.6" calcext:value-type="float">
            <text:p>17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" calcext:value-type="float">
            <text:p>27.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5" calcext:value-type="float">
            <text:p>0.95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7/1.775/1.963/0.17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3M37S" calcext:value-type="time">
            <text:p>11:13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4" calcext:value-type="float">
            <text:p>51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" calcext:value-type="float">
            <text:p>27.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8" calcext:value-type="float">
            <text:p>0.88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9/1.649/1.758/0.10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3M42S" calcext:value-type="time">
            <text:p>11:13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5.5" calcext:value-type="float">
            <text:p>3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1" calcext:value-type="float">
            <text:p>27.1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9" calcext:value-type="float">
            <text:p>0.89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1/1.597/1.825/0.16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3M47S" calcext:value-type="time">
            <text:p>11:13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5.8" calcext:value-type="float">
            <text:p>25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1" calcext:value-type="float">
            <text:p>27.1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2" calcext:value-type="float">
            <text:p>0.82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2/1.629/1.714/0.0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table:number-columns-repeated="4"/>
          <table:table-cell table:formula="of:=AVERAGE([.E37:.E57])" office:value-type="float" office:value="22.6857142857143" calcext:value-type="float">
            <text:p>22.6857142857143</text:p>
          </table:table-cell>
          <table:table-cell table:number-columns-repeated="4"/>
          <table:table-cell table:formula="of:=AVERAGE([.J37:.J57])" office:value-type="float" office:value="26.312380952381" calcext:value-type="float">
            <text:p>26.312380952381</text:p>
          </table:table-cell>
          <table:table-cell table:number-columns-repeated="6"/>
          <table:table-cell table:formula="of:=AVERAGE([.Q37:.Q57])" office:value-type="float" office:value="3.3" calcext:value-type="float">
            <text:p>3.3</text:p>
          </table:table-cell>
          <table:table-cell table:formula="of:=AVERAGE([.R37:.R57])" office:value-type="float" office:value="9.04" calcext:value-type="float">
            <text:p>9.04</text:p>
          </table:table-cell>
          <table:table-cell table:number-columns-repeated="5"/>
          <table:table-cell table:formula="of:=AVERAGE([.X37:.X57])" office:value-type="float" office:value="0.748095238095238" calcext:value-type="float">
            <text:p>0.748095238095238</text:p>
          </table:table-cell>
          <table:table-cell/>
          <table:table-cell table:formula="of:=AVERAGE([.Z37:.Z57])" office:value-type="float" office:value="1.50142857142857" calcext:value-type="float">
            <text:p>1.50142857142857</text:p>
          </table:table-cell>
          <table:table-cell/>
          <table:table-cell table:formula="of:=AVERAGE([.AB37:.AB57])" office:value-type="float" office:value="0.986190476190476" calcext:value-type="float">
            <text:p>0.986190476190476</text:p>
          </table:table-cell>
          <table:table-cell table:number-columns-repeated="4"/>
          <table:table-cell table:formula="of:=AVERAGE([.AG37:.AG57])" office:value-type="float" office:value="270.047619047619" calcext:value-type="float">
            <text:p>270.047619047619</text:p>
          </table:table-cell>
          <table:table-cell table:number-columns-repeated="18"/>
        </table:table-row>
        <table:table-row table:style-name="ro1">
          <table:table-cell table:number-columns-repeated="51"/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3M53S" calcext:value-type="time">
            <text:p>11:13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8.2" calcext:value-type="float">
            <text:p>18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" calcext:value-type="float">
            <text:p>27.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77" calcext:value-type="float">
            <text:p>0.77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0.97" calcext:value-type="float">
            <text:p>0.9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55/1.597/1.687/0.12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3M58S" calcext:value-type="time">
            <text:p>11:13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2.5" calcext:value-type="float">
            <text:p>12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1" calcext:value-type="float">
            <text:p>27.1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71" calcext:value-type="float">
            <text:p>0.71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0.97" calcext:value-type="float">
            <text:p>0.9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80/1.662/1.955/0.23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4M03S" calcext:value-type="time">
            <text:p>11:14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1" calcext:value-type="float">
            <text:p>27.1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3" calcext:value-type="float">
            <text:p>1.93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40/1.638/1.823/0.17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4M08S" calcext:value-type="time">
            <text:p>11:14:0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5.3" calcext:value-type="float">
            <text:p>35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1" calcext:value-type="float">
            <text:p>27.1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8" calcext:value-type="float">
            <text:p>1.78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04" calcext:value-type="float">
            <text:p>1.0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9/1.572/1.814/0.14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4M14S" calcext:value-type="time">
            <text:p>11:14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2" calcext:value-type="float">
            <text:p>27.1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2" calcext:value-type="float">
            <text:p>1.72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04" calcext:value-type="float">
            <text:p>1.0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5/1.748/2.054/0.16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4M19S" calcext:value-type="time">
            <text:p>11:14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8.2" calcext:value-type="float">
            <text:p>18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1" calcext:value-type="float">
            <text:p>27.1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6" calcext:value-type="float">
            <text:p>1.66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04" calcext:value-type="float">
            <text:p>1.0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03/1.735/2.194/0.23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4M24S" calcext:value-type="time">
            <text:p>11:14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2.1" calcext:value-type="float">
            <text:p>12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1" calcext:value-type="float">
            <text:p>27.1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04" calcext:value-type="float">
            <text:p>1.0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5/1.617/1.919/0.19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4M29S" calcext:value-type="time">
            <text:p>11:14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2.5" calcext:value-type="float">
            <text:p>12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2" calcext:value-type="float">
            <text:p>27.1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2/1.698/2.159/0.25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4M34S" calcext:value-type="time">
            <text:p>11:14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4.7" calcext:value-type="float">
            <text:p>14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2" calcext:value-type="float">
            <text:p>27.1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4/1.720/1.831/0.07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4M40S" calcext:value-type="time">
            <text:p>11:14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2.5" calcext:value-type="float">
            <text:p>12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4" calcext:value-type="float">
            <text:p>27.1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4/1.633/1.760/0.13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4M45S" calcext:value-type="time">
            <text:p>11:14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5.2" calcext:value-type="float">
            <text:p>15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5" calcext:value-type="float">
            <text:p>27.1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6" calcext:value-type="float">
            <text:p>1.16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4/1.709/1.944/0.13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4M50S" calcext:value-type="time">
            <text:p>11:14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0.6" calcext:value-type="float">
            <text:p>60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4" calcext:value-type="float">
            <text:p>27.1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5" calcext:value-type="float">
            <text:p>1.15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2/1.556/1.821/0.16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4M55S" calcext:value-type="time">
            <text:p>11:14:5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.4" calcext:value-type="float">
            <text:p>9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4" calcext:value-type="float">
            <text:p>27.1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5" calcext:value-type="float">
            <text:p>1.05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0/1.636/1.816/0.12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5M01S" calcext:value-type="time">
            <text:p>11:15:0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3.6" calcext:value-type="float">
            <text:p>63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5" calcext:value-type="float">
            <text:p>27.1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7" calcext:value-type="float">
            <text:p>0.97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40/1.633/1.845/0.19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5M06S" calcext:value-type="time">
            <text:p>11:15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5.2" calcext:value-type="float">
            <text:p>15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5" calcext:value-type="float">
            <text:p>27.1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9" calcext:value-type="float">
            <text:p>0.89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6/1.661/1.943/0.16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5M11S" calcext:value-type="time">
            <text:p>11:15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7.5" calcext:value-type="float">
            <text:p>37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5" calcext:value-type="float">
            <text:p>27.1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65/1.614/1.769/0.15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5M16S" calcext:value-type="time">
            <text:p>11:15:1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2.1" calcext:value-type="float">
            <text:p>12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5" calcext:value-type="float">
            <text:p>27.1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7" calcext:value-type="float">
            <text:p>1.07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1/1.757/1.877/0.10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5M21S" calcext:value-type="time">
            <text:p>11:15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9.4" calcext:value-type="float">
            <text:p>59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5" calcext:value-type="float">
            <text:p>27.1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8" calcext:value-type="float">
            <text:p>0.98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2/1.916/2.217/0.18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5M27S" calcext:value-type="time">
            <text:p>11:15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5" calcext:value-type="float">
            <text:p>27.1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8" calcext:value-type="float">
            <text:p>0.98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01/1.765/2.008/0.16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5M32S" calcext:value-type="time">
            <text:p>11:15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7.6" calcext:value-type="float">
            <text:p>17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14" calcext:value-type="float">
            <text:p>27.1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9" calcext:value-type="float">
            <text:p>0.99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7/1.651/1.866/0.15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5M37S" calcext:value-type="time">
            <text:p>11:15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2" calcext:value-type="float">
            <text:p>27.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9" calcext:value-type="float">
            <text:p>0.99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5/1.693/1.930/0.16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table:number-columns-repeated="4"/>
          <table:table-cell table:formula="of:=AVERAGE([.E60:.E80])" office:value-type="float" office:value="24.647619047619" calcext:value-type="float">
            <text:p>24.647619047619</text:p>
          </table:table-cell>
          <table:table-cell table:number-columns-repeated="4"/>
          <table:table-cell table:formula="of:=AVERAGE([.J60:.J80])" office:value-type="float" office:value="27.1342857142857" calcext:value-type="float">
            <text:p>27.1342857142857</text:p>
          </table:table-cell>
          <table:table-cell table:number-columns-repeated="6"/>
          <table:table-cell table:formula="of:=AVERAGE([.Q60:.Q80])" office:value-type="float" office:value="3.3" calcext:value-type="float">
            <text:p>3.3</text:p>
          </table:table-cell>
          <table:table-cell table:formula="of:=AVERAGE([.R60:.R80])" office:value-type="float" office:value="9.04" calcext:value-type="float">
            <text:p>9.04</text:p>
          </table:table-cell>
          <table:table-cell table:number-columns-repeated="5"/>
          <table:table-cell table:formula="of:=AVERAGE([.X60:.X80])" office:value-type="float" office:value="1.20238095238095" calcext:value-type="float">
            <text:p>1.20238095238095</text:p>
          </table:table-cell>
          <table:table-cell/>
          <table:table-cell table:formula="of:=AVERAGE([.Z60:.Z80])" office:value-type="float" office:value="1.42476190476191" calcext:value-type="float">
            <text:p>1.42476190476191</text:p>
          </table:table-cell>
          <table:table-cell/>
          <table:table-cell table:formula="of:=AVERAGE([.AB60:.AB80])" office:value-type="float" office:value="1.01428571428571" calcext:value-type="float">
            <text:p>1.01428571428571</text:p>
          </table:table-cell>
          <table:table-cell table:number-columns-repeated="4"/>
          <table:table-cell table:formula="of:=AVERAGE([.AG60:.AG80])" office:value-type="float" office:value="270.238095238095" calcext:value-type="float">
            <text:p>270.238095238095</text:p>
          </table:table-cell>
          <table:table-cell table:number-columns-repeated="18"/>
        </table:table-row>
        <table:table-row table:style-name="ro1">
          <table:table-cell table:number-columns-repeated="51"/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5M42S" calcext:value-type="time">
            <text:p>11:15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4.1" calcext:value-type="float">
            <text:p>94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22" calcext:value-type="float">
            <text:p>27.2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1" calcext:value-type="float">
            <text:p>0.91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2/1.838/1.909/0.06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5M48S" calcext:value-type="time">
            <text:p>11:15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2.2" calcext:value-type="float">
            <text:p>72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7.22" calcext:value-type="float">
            <text:p>27.2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2" calcext:value-type="float">
            <text:p>0.92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81/1.686/1.959/0.22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5M53S" calcext:value-type="time">
            <text:p>11:15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8.13" calcext:value-type="float">
            <text:p>28.1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64/1.652/2.008/0.23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5M58S" calcext:value-type="time">
            <text:p>11:15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8.2" calcext:value-type="float">
            <text:p>28.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2" calcext:value-type="float">
            <text:p>0.92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6/1.849/1.941/0.10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6M03S" calcext:value-type="time">
            <text:p>11:16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9.02" calcext:value-type="float">
            <text:p>29.0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6" calcext:value-type="float">
            <text:p>1.16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0/1.822/1.959/0.15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6M09S" calcext:value-type="time">
            <text:p>11:16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1.2" calcext:value-type="float">
            <text:p>41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9.72" calcext:value-type="float">
            <text:p>29.7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5" calcext:value-type="float">
            <text:p>1.15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0/2.228/3.775/0.79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6M14S" calcext:value-type="time">
            <text:p>11:16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29.95" calcext:value-type="float">
            <text:p>29.9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4" calcext:value-type="float">
            <text:p>1.14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7/1.804/2.046/0.15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6M19S" calcext:value-type="time">
            <text:p>11:16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0.61" calcext:value-type="float">
            <text:p>30.6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3" calcext:value-type="float">
            <text:p>1.13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5/1.806/2.028/0.19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6M24S" calcext:value-type="time">
            <text:p>11:16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8.2" calcext:value-type="float">
            <text:p>38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11" calcext:value-type="float">
            <text:p>31.1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4" calcext:value-type="float">
            <text:p>1.04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3/1.860/2.000/0.10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6M29S" calcext:value-type="time">
            <text:p>11:16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7.1" calcext:value-type="float">
            <text:p>3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17" calcext:value-type="float">
            <text:p>31.1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5" calcext:value-type="float">
            <text:p>0.95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3/1.883/2.079/0.13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6M35S" calcext:value-type="time">
            <text:p>11:16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24" calcext:value-type="float">
            <text:p>31.2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8" calcext:value-type="float">
            <text:p>0.88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3/1.775/2.030/0.14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6M40S" calcext:value-type="time">
            <text:p>11:16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3.3" calcext:value-type="float">
            <text:p>33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27" calcext:value-type="float">
            <text:p>31.2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9" calcext:value-type="float">
            <text:p>0.89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46/1.641/1.937/0.23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6M45S" calcext:value-type="time">
            <text:p>11:16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2.3" calcext:value-type="float">
            <text:p>32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" calcext:value-type="float">
            <text:p>31.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8" calcext:value-type="float">
            <text:p>0.98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7/1.833/2.035/0.17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6M50S" calcext:value-type="time">
            <text:p>11:16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2.4" calcext:value-type="float">
            <text:p>42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1" calcext:value-type="float">
            <text:p>31.3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8" calcext:value-type="float">
            <text:p>0.98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32/1.937/2.129/0.12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6M56S" calcext:value-type="time">
            <text:p>11:16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5.6" calcext:value-type="float">
            <text:p>65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4" calcext:value-type="float">
            <text:p>31.3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6/1.674/1.854/0.17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7M01S" calcext:value-type="time">
            <text:p>11:17:0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2.4" calcext:value-type="float">
            <text:p>42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5" calcext:value-type="float">
            <text:p>31.3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9/1.779/2.047/0.16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7M06S" calcext:value-type="time">
            <text:p>11:17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4.5" calcext:value-type="float">
            <text:p>6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6" calcext:value-type="float">
            <text:p>31.36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3" calcext:value-type="float">
            <text:p>1.13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7/1.665/1.894/0.15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7M11S" calcext:value-type="time">
            <text:p>11:17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6" calcext:value-type="float">
            <text:p>51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6" calcext:value-type="float">
            <text:p>31.36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73/1.957/2.067/0.12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7M16S" calcext:value-type="time">
            <text:p>11:17:1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5.5" calcext:value-type="float">
            <text:p>3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7" calcext:value-type="float">
            <text:p>31.3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5/1.891/2.097/0.13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7M22S" calcext:value-type="time">
            <text:p>11:17:2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9.4" calcext:value-type="float">
            <text:p>39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7" calcext:value-type="float">
            <text:p>31.3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9" calcext:value-type="float">
            <text:p>1.09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81/1.854/2.019/0.13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7M27S" calcext:value-type="time">
            <text:p>11:17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1.7" calcext:value-type="float">
            <text:p>41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7" calcext:value-type="float">
            <text:p>31.3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9" calcext:value-type="float">
            <text:p>1.09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90/1.778/1.910/0.08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7M32S" calcext:value-type="time">
            <text:p>11:17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8.8" calcext:value-type="float">
            <text:p>78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2/1.858/2.131/0.1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7M37S" calcext:value-type="time">
            <text:p>11:17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2" calcext:value-type="float">
            <text:p>0.92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06/1.740/1.932/0.15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7M43S" calcext:value-type="time">
            <text:p>11:17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87.9" calcext:value-type="float">
            <text:p>87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1" calcext:value-type="float">
            <text:p>1.01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84/1.830/2.135/0.28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7M48S" calcext:value-type="time">
            <text:p>11:17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5" calcext:value-type="float">
            <text:p>1.15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16/1.668/1.876/0.20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7M53S" calcext:value-type="time">
            <text:p>11:17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5" calcext:value-type="float">
            <text:p>1.05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8/1.911/2.173/0.19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7M58S" calcext:value-type="time">
            <text:p>11:17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1.2" calcext:value-type="float">
            <text:p>41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7" calcext:value-type="float">
            <text:p>0.97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8/1.830/1.937/0.11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8M04S" calcext:value-type="time">
            <text:p>11:18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2.3" calcext:value-type="float">
            <text:p>32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7" calcext:value-type="float">
            <text:p>0.97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5/1.845/2.076/0.14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8M09S" calcext:value-type="time">
            <text:p>11:18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6" calcext:value-type="float">
            <text:p>48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7" calcext:value-type="float">
            <text:p>0.97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7/1.860/2.173/0.24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8M14S" calcext:value-type="time">
            <text:p>11:18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7.5" calcext:value-type="float">
            <text:p>37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8" calcext:value-type="float">
            <text:p>0.98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12/1.927/2.183/0.24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8M19S" calcext:value-type="time">
            <text:p>11:18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4.4" calcext:value-type="float">
            <text:p>34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5/1.721/2.040/0.20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8M24S" calcext:value-type="time">
            <text:p>11:18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1" calcext:value-type="float">
            <text:p>0.91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47/1.814/1.866/0.04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8M30S" calcext:value-type="time">
            <text:p>11:18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7.5" calcext:value-type="float">
            <text:p>37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3" calcext:value-type="float">
            <text:p>0.83</text:p>
          </table:table-cell>
          <table:table-cell/>
          <table:table-cell office:value-type="float" office:value="1.16" calcext:value-type="float">
            <text:p>1.16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1/1.784/2.104/0.16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8M35S" calcext:value-type="time">
            <text:p>11:18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2.4" calcext:value-type="float">
            <text:p>42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9" calcext:value-type="float">
            <text:p>1.09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06/1.912/2.045/0.09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8M40S" calcext:value-type="time">
            <text:p>11:18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6" calcext:value-type="float">
            <text:p>48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8" calcext:value-type="float">
            <text:p>1.08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3/1.928/2.152/0.23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8M45S" calcext:value-type="time">
            <text:p>11:18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7" calcext:value-type="float">
            <text:p>1.07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2/1.772/2.249/0.26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8M51S" calcext:value-type="time">
            <text:p>11:18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7.1" calcext:value-type="float">
            <text:p>4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9" calcext:value-type="float">
            <text:p>0.99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4/1.761/2.031/0.15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8M56S" calcext:value-type="time">
            <text:p>11:18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0.6" calcext:value-type="float">
            <text:p>40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9" calcext:value-type="float">
            <text:p>0.99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2/1.870/2.146/0.16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9M01S" calcext:value-type="time">
            <text:p>11:19:0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7/1.779/1.947/0.13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9M06S" calcext:value-type="time">
            <text:p>11:19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2.4" calcext:value-type="float">
            <text:p>42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0/1.770/1.979/0.13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9M12S" calcext:value-type="time">
            <text:p>11:19:1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3" calcext:value-type="float">
            <text:p>54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0/1.875/2.021/0.15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9M17S" calcext:value-type="time">
            <text:p>11:19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5/1.792/2.132/0.20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9M22S" calcext:value-type="time">
            <text:p>11:19:2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1.9" calcext:value-type="float">
            <text:p>41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5/1.694/1.932/0.14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9M27S" calcext:value-type="time">
            <text:p>11:19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1/1.887/2.118/0.17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9M33S" calcext:value-type="time">
            <text:p>11:19:3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2/1.873/2.088/0.17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9M38S" calcext:value-type="time">
            <text:p>11:19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2" calcext:value-type="float">
            <text:p>45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7/1.804/1.928/0.10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9M43S" calcext:value-type="time">
            <text:p>11:19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3.3" calcext:value-type="float">
            <text:p>43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2/1.885/2.181/0.19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9M48S" calcext:value-type="time">
            <text:p>11:19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1.9" calcext:value-type="float">
            <text:p>41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3/1.829/1.974/0.09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9M53S" calcext:value-type="time">
            <text:p>11:19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9" calcext:value-type="float">
            <text:p>1.69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28/1.911/2.045/0.08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19M59S" calcext:value-type="time">
            <text:p>11:19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8/1.682/1.990/0.18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0M04S" calcext:value-type="time">
            <text:p>11:20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6.5" calcext:value-type="float">
            <text:p>76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9" calcext:value-type="float">
            <text:p>1.59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7/1.759/1.994/0.14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0M09S" calcext:value-type="time">
            <text:p>11:20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3.9" calcext:value-type="float">
            <text:p>93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8/1.901/2.016/0.10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0M14S" calcext:value-type="time">
            <text:p>11:20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4/1.786/2.083/0.20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0M20S" calcext:value-type="time">
            <text:p>11:20:2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6.7" calcext:value-type="float">
            <text:p>66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07/1.865/1.994/0.1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0M25S" calcext:value-type="time">
            <text:p>11:20:2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8/1.895/2.287/0.28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0M30S" calcext:value-type="time">
            <text:p>11:20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3.8" calcext:value-type="float">
            <text:p>43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9" calcext:value-type="float">
            <text:p>1.59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07" calcext:value-type="float">
            <text:p>1.0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01/1.820/2.184/0.23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0M35S" calcext:value-type="time">
            <text:p>11:20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85.7" calcext:value-type="float">
            <text:p>85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07" calcext:value-type="float">
            <text:p>1.0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62/2.015/2.141/0.09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0M41S" calcext:value-type="time">
            <text:p>11:20:4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7.1" calcext:value-type="float">
            <text:p>4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6" calcext:value-type="float">
            <text:p>1.66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08" calcext:value-type="float">
            <text:p>1.0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98/2.068/2.202/0.15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0M46S" calcext:value-type="time">
            <text:p>11:20:4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1.2" calcext:value-type="float">
            <text:p>91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08" calcext:value-type="float">
            <text:p>1.0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0/1.804/2.067/0.19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0M51S" calcext:value-type="time">
            <text:p>11:20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2.4" calcext:value-type="float">
            <text:p>42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08" calcext:value-type="float">
            <text:p>1.0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8/1.726/1.883/0.11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0M56S" calcext:value-type="time">
            <text:p>11:20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7.1" calcext:value-type="float">
            <text:p>4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07" calcext:value-type="float">
            <text:p>1.0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4/1.852/2.099/0.13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1M02S" calcext:value-type="time">
            <text:p>11:21:0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2.8" calcext:value-type="float">
            <text:p>52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08" calcext:value-type="float">
            <text:p>1.0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64/1.830/1.967/0.10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1M07S" calcext:value-type="time">
            <text:p>11:21:0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3.8" calcext:value-type="float">
            <text:p>43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08" calcext:value-type="float">
            <text:p>1.0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15/1.769/2.073/0.22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1M12S" calcext:value-type="time">
            <text:p>11:21:1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0.6" calcext:value-type="float">
            <text:p>40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08" calcext:value-type="float">
            <text:p>1.0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2/1.901/2.114/0.17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1M17S" calcext:value-type="time">
            <text:p>11:21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7.1" calcext:value-type="float">
            <text:p>4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07" calcext:value-type="float">
            <text:p>1.0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69/1.757/1.981/0.22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1M23S" calcext:value-type="time">
            <text:p>11:21:2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07" calcext:value-type="float">
            <text:p>1.0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96/1.874/2.377/0.27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1M28S" calcext:value-type="time">
            <text:p>11:21:2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7" calcext:value-type="float">
            <text:p>45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07" calcext:value-type="float">
            <text:p>1.0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8/1.774/2.236/0.26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1M33S" calcext:value-type="time">
            <text:p>11:21:3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3" calcext:value-type="float">
            <text:p>1.13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2/1.794/2.002/0.16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1M38S" calcext:value-type="time">
            <text:p>11:21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1.4" calcext:value-type="float">
            <text:p>91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07" calcext:value-type="float">
            <text:p>1.0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36/1.979/2.187/0.16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1M43S" calcext:value-type="time">
            <text:p>11:21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9" calcext:value-type="float">
            <text:p>1.19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07" calcext:value-type="float">
            <text:p>1.0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2/1.822/1.959/0.09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1M49S" calcext:value-type="time">
            <text:p>11:21:4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0.6" calcext:value-type="float">
            <text:p>40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9" calcext:value-type="float">
            <text:p>1.09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25/1.977/2.184/0.12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1M54S" calcext:value-type="time">
            <text:p>11:21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8" calcext:value-type="float">
            <text:p>1.08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2.024/2.089/2.153/0.05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1M59S" calcext:value-type="time">
            <text:p>11:21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7" calcext:value-type="float">
            <text:p>31.3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8/1.766/1.833/0.10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2M04S" calcext:value-type="time">
            <text:p>11:22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02/1.821/2.090/0.19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2M10S" calcext:value-type="time">
            <text:p>11:22:1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07" calcext:value-type="float">
            <text:p>1.0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962/2.066/2.200/0.08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2M15S" calcext:value-type="time">
            <text:p>11:22:1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07" calcext:value-type="float">
            <text:p>1.0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69/1.958/2.038/0.10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2M20S" calcext:value-type="time">
            <text:p>11:22:2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7.1" calcext:value-type="float">
            <text:p>4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32/1.947/2.174/0.17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2M25S" calcext:value-type="time">
            <text:p>11:22:2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1" calcext:value-type="float">
            <text:p>1.71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11" calcext:value-type="float">
            <text:p>1.1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3/1.879/1.977/0.12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2M31S" calcext:value-type="time">
            <text:p>11:22:3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3" calcext:value-type="float">
            <text:p>1.73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11" calcext:value-type="float">
            <text:p>1.1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80/1.653/2.092/0.24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2M36S" calcext:value-type="time">
            <text:p>11:22:3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9" calcext:value-type="float">
            <text:p>1.59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11" calcext:value-type="float">
            <text:p>1.1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3/1.807/2.048/0.22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2M41S" calcext:value-type="time">
            <text:p>11:22:4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11" calcext:value-type="float">
            <text:p>1.1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8/1.817/1.948/0.12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2M46S" calcext:value-type="time">
            <text:p>11:22:4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6.2" calcext:value-type="float">
            <text:p>56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8/1.817/2.080/0.20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2M51S" calcext:value-type="time">
            <text:p>11:22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5.9" calcext:value-type="float">
            <text:p>55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91/1.927/2.136/0.16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2M57S" calcext:value-type="time">
            <text:p>11:22:5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3.8" calcext:value-type="float">
            <text:p>43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2/1.798/1.992/0.22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3M02S" calcext:value-type="time">
            <text:p>11:23:0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3.8" calcext:value-type="float">
            <text:p>43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7/1.663/1.804/0.15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3M07S" calcext:value-type="time">
            <text:p>11:23:0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5/1.870/2.101/0.20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3M12S" calcext:value-type="time">
            <text:p>11:23:1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4/1.736/1.879/0.09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3M18S" calcext:value-type="time">
            <text:p>11:23:1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6/1.809/1.943/0.13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3M23S" calcext:value-type="time">
            <text:p>11:23:2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11" calcext:value-type="float">
            <text:p>1.1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3/1.791/2.222/0.22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3M28S" calcext:value-type="time">
            <text:p>11:23:2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32/1.845/1.983/0.11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3M33S" calcext:value-type="time">
            <text:p>11:23:3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6/1.847/2.039/0.19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3M39S" calcext:value-type="time">
            <text:p>11:23:3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65/1.839/2.077/0.18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3M44S" calcext:value-type="time">
            <text:p>11:23:4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13" calcext:value-type="float">
            <text:p>1.1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8/1.729/1.910/0.11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3M49S" calcext:value-type="time">
            <text:p>11:23:4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88.6" calcext:value-type="float">
            <text:p>88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13" calcext:value-type="float">
            <text:p>1.1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7/1.800/1.879/0.05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3M54S" calcext:value-type="time">
            <text:p>11:23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9/1.954/2.144/0.17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4M00S" calcext:value-type="time">
            <text:p>11:24:0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7.1" calcext:value-type="float">
            <text:p>5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9/1.833/2.007/0.09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4M05S" calcext:value-type="time">
            <text:p>11:24:0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5/1.691/1.793/0.08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4M10S" calcext:value-type="time">
            <text:p>11:24:1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2/1.859/2.114/0.18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4M15S" calcext:value-type="time">
            <text:p>11:24:1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40/1.876/1.955/0.07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4M21S" calcext:value-type="time">
            <text:p>11:24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11" calcext:value-type="float">
            <text:p>1.1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0/1.849/2.298/0.2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4M26S" calcext:value-type="time">
            <text:p>11:24:2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11" calcext:value-type="float">
            <text:p>1.1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5/1.965/2.272/0.21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4M31S" calcext:value-type="time">
            <text:p>11:24:3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1.9" calcext:value-type="float">
            <text:p>41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11" calcext:value-type="float">
            <text:p>1.1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0/1.818/2.028/0.15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4M36S" calcext:value-type="time">
            <text:p>11:24:3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8/1.801/2.057/0.18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4M41S" calcext:value-type="time">
            <text:p>11:24:4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5/1.869/1.980/0.08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4M47S" calcext:value-type="time">
            <text:p>11:24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13" calcext:value-type="float">
            <text:p>1.1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20/2.006/2.224/0.13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4M52S" calcext:value-type="time">
            <text:p>11:24:5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6" calcext:value-type="float">
            <text:p>51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13" calcext:value-type="float">
            <text:p>1.1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63/1.896/2.221/0.19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4M57S" calcext:value-type="time">
            <text:p>11:24:5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2/1.753/1.958/0.17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5M02S" calcext:value-type="time">
            <text:p>11:25:0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9" calcext:value-type="float">
            <text:p>1.19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01/1.865/2.180/0.21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5M08S" calcext:value-type="time">
            <text:p>11:25:0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13" calcext:value-type="float">
            <text:p>1.1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1/1.797/1.992/0.12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5M13S" calcext:value-type="time">
            <text:p>11:25:1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13" calcext:value-type="float">
            <text:p>1.1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01/1.905/2.011/0.08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5M18S" calcext:value-type="time">
            <text:p>11:25:1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13" calcext:value-type="float">
            <text:p>1.1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1/1.810/1.995/0.15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5M23S" calcext:value-type="time">
            <text:p>11:25:2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02/1.955/2.178/0.23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5M29S" calcext:value-type="time">
            <text:p>11:25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91/2.002/2.164/0.18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5M34S" calcext:value-type="time">
            <text:p>11:25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2" calcext:value-type="float">
            <text:p>45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58/1.965/2.191/0.14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5M39S" calcext:value-type="time">
            <text:p>11:25:3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3.8" calcext:value-type="float">
            <text:p>43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5/1.920/2.015/0.10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5M44S" calcext:value-type="time">
            <text:p>11:25:4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3.6" calcext:value-type="float">
            <text:p>63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72/1.982/2.190/0.13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5M50S" calcext:value-type="time">
            <text:p>11:25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6.5" calcext:value-type="float">
            <text:p>76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13" calcext:value-type="float">
            <text:p>1.1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37/1.905/2.189/0.15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5M55S" calcext:value-type="time">
            <text:p>11:25:5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4.9" calcext:value-type="float">
            <text:p>64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60/2.103/2.325/0.19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6M00S" calcext:value-type="time">
            <text:p>11:26:0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0.9" calcext:value-type="float">
            <text:p>90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15" calcext:value-type="float">
            <text:p>1.1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4/1.813/2.028/0.14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6M05S" calcext:value-type="time">
            <text:p>11:26:0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15" calcext:value-type="float">
            <text:p>1.1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90/1.839/2.061/0.13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6M10S" calcext:value-type="time">
            <text:p>11:26:1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15" calcext:value-type="float">
            <text:p>1.1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09/1.955/2.113/0.15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6M16S" calcext:value-type="time">
            <text:p>11:26:1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15" calcext:value-type="float">
            <text:p>1.1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8/1.816/1.997/0.13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6M21S" calcext:value-type="time">
            <text:p>11:26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15" calcext:value-type="float">
            <text:p>1.1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98/1.812/1.928/0.08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6M26S" calcext:value-type="time">
            <text:p>11:26:2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15" calcext:value-type="float">
            <text:p>1.1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6/1.832/2.194/0.26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6M31S" calcext:value-type="time">
            <text:p>11:26:3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3.8" calcext:value-type="float">
            <text:p>43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15" calcext:value-type="float">
            <text:p>1.1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9/1.670/1.990/0.17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6M37S" calcext:value-type="time">
            <text:p>11:26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5.9" calcext:value-type="float">
            <text:p>55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6/1.759/2.157/0.24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6M42S" calcext:value-type="time">
            <text:p>11:26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1/1.812/2.097/0.17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6M47S" calcext:value-type="time">
            <text:p>11:26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6.5" calcext:value-type="float">
            <text:p>76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0/1.904/2.156/0.17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6M52S" calcext:value-type="time">
            <text:p>11:26:5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3.8" calcext:value-type="float">
            <text:p>93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7/1.869/2.112/0.18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6M58S" calcext:value-type="time">
            <text:p>11:26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0/1.899/2.133/0.19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7M03S" calcext:value-type="time">
            <text:p>11:27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13" calcext:value-type="float">
            <text:p>1.1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0/1.671/1.715/0.04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7M08S" calcext:value-type="time">
            <text:p>11:27:0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5/1.851/2.076/0.18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7M13S" calcext:value-type="time">
            <text:p>11:27:1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5" calcext:value-type="float">
            <text:p>1.15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87/1.889/2.200/0.2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7M19S" calcext:value-type="time">
            <text:p>11:27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4" calcext:value-type="float">
            <text:p>1.14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62/1.860/1.964/0.06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7M24S" calcext:value-type="time">
            <text:p>11:27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2" calcext:value-type="float">
            <text:p>1.12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71/2.002/2.257/0.15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7M29S" calcext:value-type="time">
            <text:p>11:27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4.5" calcext:value-type="float">
            <text:p>6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1" calcext:value-type="float">
            <text:p>1.11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13" calcext:value-type="float">
            <text:p>1.1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4/1.893/2.213/0.21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7M34S" calcext:value-type="time">
            <text:p>11:27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13" calcext:value-type="float">
            <text:p>1.1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5/1.794/2.101/0.22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7M39S" calcext:value-type="time">
            <text:p>11:27:3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9/1.835/2.079/0.14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7M45S" calcext:value-type="time">
            <text:p>11:27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7" calcext:value-type="float">
            <text:p>46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16" calcext:value-type="float">
            <text:p>1.1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03/1.788/2.022/0.19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7M50S" calcext:value-type="time">
            <text:p>11:27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48/1.888/2.123/0.28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7M55S" calcext:value-type="time">
            <text:p>11:27:5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2" calcext:value-type="float">
            <text:p>1.92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5/1.933/2.142/0.15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8M00S" calcext:value-type="time">
            <text:p>11:28:0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4" calcext:value-type="float">
            <text:p>1.84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7/1.956/2.217/0.18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8M06S" calcext:value-type="time">
            <text:p>11:28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8" calcext:value-type="float">
            <text:p>1.78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2/1.850/2.121/0.20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8M11S" calcext:value-type="time">
            <text:p>11:28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9" calcext:value-type="float">
            <text:p>1.79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4/1.978/2.306/0.22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8M16S" calcext:value-type="time">
            <text:p>11:28:1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8.8" calcext:value-type="float">
            <text:p>58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3" calcext:value-type="float">
            <text:p>1.73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8/1.787/2.232/0.28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8M21S" calcext:value-type="time">
            <text:p>11:28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7" calcext:value-type="float">
            <text:p>1.67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3/1.864/2.301/0.23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8M27S" calcext:value-type="time">
            <text:p>11:28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3/1.860/2.075/0.13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8M32S" calcext:value-type="time">
            <text:p>11:28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2" calcext:value-type="float">
            <text:p>45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5/1.973/2.215/0.24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8M37S" calcext:value-type="time">
            <text:p>11:28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5.9" calcext:value-type="float">
            <text:p>55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0/1.756/1.851/0.09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8M42S" calcext:value-type="time">
            <text:p>11:28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95/1.929/1.965/0.02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8M47S" calcext:value-type="time">
            <text:p>11:28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63/1.737/2.101/0.26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8M53S" calcext:value-type="time">
            <text:p>11:28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17" calcext:value-type="float">
            <text:p>1.1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3/1.840/2.157/0.18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8M58S" calcext:value-type="time">
            <text:p>11:28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17" calcext:value-type="float">
            <text:p>1.1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3/1.869/2.137/0.19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9M03S" calcext:value-type="time">
            <text:p>11:29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7.1" calcext:value-type="float">
            <text:p>4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17" calcext:value-type="float">
            <text:p>1.1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46/1.911/2.150/0.15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9M08S" calcext:value-type="time">
            <text:p>11:29:0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5/1.749/1.905/0.11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9M14S" calcext:value-type="time">
            <text:p>11:29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3/1.779/2.159/0.25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9M19S" calcext:value-type="time">
            <text:p>11:29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7.1" calcext:value-type="float">
            <text:p>4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5/1.755/1.952/0.16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9M24S" calcext:value-type="time">
            <text:p>11:29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7/1.780/1.926/0.11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9M29S" calcext:value-type="time">
            <text:p>11:29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7/1.776/1.953/0.15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9M35S" calcext:value-type="time">
            <text:p>11:29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84.8" calcext:value-type="float">
            <text:p>84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8/1.662/1.863/0.1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9M40S" calcext:value-type="time">
            <text:p>11:29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7/1.781/1.928/0.12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9M45S" calcext:value-type="time">
            <text:p>11:29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88.6" calcext:value-type="float">
            <text:p>88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5/1.785/2.239/0.26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9M50S" calcext:value-type="time">
            <text:p>11:29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5/1.817/2.131/0.17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29M55S" calcext:value-type="time">
            <text:p>11:29:5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6/1.809/2.004/0.15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0M01S" calcext:value-type="time">
            <text:p>11:30:0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8.3" calcext:value-type="float">
            <text:p>58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6" calcext:value-type="float">
            <text:p>1.16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17" calcext:value-type="float">
            <text:p>1.1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0/1.819/2.079/0.16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0M06S" calcext:value-type="time">
            <text:p>11:30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7" calcext:value-type="float">
            <text:p>1.07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17" calcext:value-type="float">
            <text:p>1.1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05/1.954/2.090/0.10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0M11S" calcext:value-type="time">
            <text:p>11:30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4" calcext:value-type="float">
            <text:p>1.14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17" calcext:value-type="float">
            <text:p>1.1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3/1.802/2.101/0.20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0M16S" calcext:value-type="time">
            <text:p>11:30:1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3" calcext:value-type="float">
            <text:p>1.13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17" calcext:value-type="float">
            <text:p>1.1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6/1.902/2.107/0.24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0M22S" calcext:value-type="time">
            <text:p>11:30:2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2" calcext:value-type="float">
            <text:p>1.12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17" calcext:value-type="float">
            <text:p>1.1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02/1.808/1.956/0.08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0M27S" calcext:value-type="time">
            <text:p>11:30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9" calcext:value-type="float">
            <text:p>1.19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5/1.750/1.968/0.12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0M32S" calcext:value-type="time">
            <text:p>11:30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5/1.757/1.997/0.15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0M37S" calcext:value-type="time">
            <text:p>11:30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6.2" calcext:value-type="float">
            <text:p>56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5/1.769/2.000/0.15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0M43S" calcext:value-type="time">
            <text:p>11:30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0/1.943/2.210/0.17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0M48S" calcext:value-type="time">
            <text:p>11:30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9/1.751/1.958/0.16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0M53S" calcext:value-type="time">
            <text:p>11:30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4/1.729/1.822/0.14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0M58S" calcext:value-type="time">
            <text:p>11:30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3/1.748/1.937/0.17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1M04S" calcext:value-type="time">
            <text:p>11:31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3.9" calcext:value-type="float">
            <text:p>93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1/1.796/2.001/0.15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1M09S" calcext:value-type="time">
            <text:p>11:31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9.4" calcext:value-type="float">
            <text:p>59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3/1.801/2.099/0.20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1M14S" calcext:value-type="time">
            <text:p>11:31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4/1.776/2.157/0.24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1M19S" calcext:value-type="time">
            <text:p>11:31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9" calcext:value-type="float">
            <text:p>1.19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11/1.755/1.906/0.13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1M25S" calcext:value-type="time">
            <text:p>11:31:2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1/1.783/1.925/0.12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1M30S" calcext:value-type="time">
            <text:p>11:31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6" calcext:value-type="float">
            <text:p>1.16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57/1.679/1.820/0.18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1M35S" calcext:value-type="time">
            <text:p>11:31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8" calcext:value-type="float">
            <text:p>54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5" calcext:value-type="float">
            <text:p>1.15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0/1.797/2.001/0.13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1M40S" calcext:value-type="time">
            <text:p>11:31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5.3" calcext:value-type="float">
            <text:p>55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4" calcext:value-type="float">
            <text:p>1.14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9/1.759/2.036/0.21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1M45S" calcext:value-type="time">
            <text:p>11:31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7.6" calcext:value-type="float">
            <text:p>57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2/1.846/2.028/0.1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1M51S" calcext:value-type="time">
            <text:p>11:31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8/1.869/2.088/0.24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1M56S" calcext:value-type="time">
            <text:p>11:31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6/1.619/1.855/0.14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2M01S" calcext:value-type="time">
            <text:p>11:32:0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9.7" calcext:value-type="float">
            <text:p>69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85/1.797/2.006/0.12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2M06S" calcext:value-type="time">
            <text:p>11:32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87.9" calcext:value-type="float">
            <text:p>87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30/2.019/2.291/0.21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2M12S" calcext:value-type="time">
            <text:p>11:32:1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9.4" calcext:value-type="float">
            <text:p>59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0/1.814/2.087/0.14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2M17S" calcext:value-type="time">
            <text:p>11:32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3/1.919/2.260/0.25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2M22S" calcext:value-type="time">
            <text:p>11:32:2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39/1.990/2.369/0.22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2M27S" calcext:value-type="time">
            <text:p>11:32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7" calcext:value-type="float">
            <text:p>46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44" calcext:value-type="float">
            <text:p>2.44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27" calcext:value-type="float">
            <text:p>1.2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7/1.788/2.066/0.17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2M33S" calcext:value-type="time">
            <text:p>11:32:3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3.3" calcext:value-type="float">
            <text:p>43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33" calcext:value-type="float">
            <text:p>2.33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27" calcext:value-type="float">
            <text:p>1.2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44/1.689/1.930/0.19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2M38S" calcext:value-type="time">
            <text:p>11:32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1.2" calcext:value-type="float">
            <text:p>91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78" calcext:value-type="float">
            <text:p>2.78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65/1.964/2.256/0.20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2M43S" calcext:value-type="time">
            <text:p>11:32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3" calcext:value-type="float">
            <text:p>54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56" calcext:value-type="float">
            <text:p>2.56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7/1.910/2.141/0.19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2M48S" calcext:value-type="time">
            <text:p>11:32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43" calcext:value-type="float">
            <text:p>2.43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06/1.939/2.146/0.14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2M54S" calcext:value-type="time">
            <text:p>11:32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29" calcext:value-type="float">
            <text:p>2.29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5/1.895/2.104/0.18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2M59S" calcext:value-type="time">
            <text:p>11:32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1.8" calcext:value-type="float">
            <text:p>61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18" calcext:value-type="float">
            <text:p>2.18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6/1.838/2.182/0.25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3M04S" calcext:value-type="time">
            <text:p>11:33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09" calcext:value-type="float">
            <text:p>2.09</text:p>
          </table:table-cell>
          <table:table-cell/>
          <table:table-cell office:value-type="float" office:value="1.59" calcext:value-type="float">
            <text:p>1.59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4/1.788/2.040/0.16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3M09S" calcext:value-type="time">
            <text:p>11:33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6.7" calcext:value-type="float">
            <text:p>66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8/1.798/1.929/0.12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3M14S" calcext:value-type="time">
            <text:p>11:33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8.1" calcext:value-type="float">
            <text:p>78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2" calcext:value-type="float">
            <text:p>1.92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59/1.977/2.100/0.10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3M20S" calcext:value-type="time">
            <text:p>11:33:2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8.8" calcext:value-type="float">
            <text:p>58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01" calcext:value-type="float">
            <text:p>2.01</text:p>
          </table:table-cell>
          <table:table-cell/>
          <table:table-cell office:value-type="float" office:value="1.59" calcext:value-type="float">
            <text:p>1.59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2/1.626/1.849/0.13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3M25S" calcext:value-type="time">
            <text:p>11:33:2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3" calcext:value-type="float">
            <text:p>1.93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7/1.775/2.021/0.15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3M30S" calcext:value-type="time">
            <text:p>11:33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7.1" calcext:value-type="float">
            <text:p>4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5" calcext:value-type="float">
            <text:p>1.85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7/1.798/1.905/0.13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3M35S" calcext:value-type="time">
            <text:p>11:33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8" calcext:value-type="float">
            <text:p>1.78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3/1.945/2.178/0.20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3M41S" calcext:value-type="time">
            <text:p>11:33:4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2" calcext:value-type="float">
            <text:p>1.72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6/1.768/2.081/0.19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3M46S" calcext:value-type="time">
            <text:p>11:33:4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6" calcext:value-type="float">
            <text:p>1.66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36/1.903/2.073/0.12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3M51S" calcext:value-type="time">
            <text:p>11:33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5.9" calcext:value-type="float">
            <text:p>55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5" calcext:value-type="float">
            <text:p>1.85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7/1.797/1.989/0.11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3M56S" calcext:value-type="time">
            <text:p>11:33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8" calcext:value-type="float">
            <text:p>1.78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19/1.752/2.003/0.17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4M02S" calcext:value-type="time">
            <text:p>11:34:0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7.1" calcext:value-type="float">
            <text:p>4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34/1.892/2.057/0.10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4M07S" calcext:value-type="time">
            <text:p>11:34:0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7" calcext:value-type="float">
            <text:p>1.67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15/1.722/1.833/0.12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4M12S" calcext:value-type="time">
            <text:p>11:34:1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5/1.692/1.903/0.12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4M17S" calcext:value-type="time">
            <text:p>11:34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7" calcext:value-type="float">
            <text:p>31.3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2/1.970/2.349/0.35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4M23S" calcext:value-type="time">
            <text:p>11:34:2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9/1.833/1.992/0.10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4M28S" calcext:value-type="time">
            <text:p>11:34:2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3.8" calcext:value-type="float">
            <text:p>43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1/1.820/2.092/0.15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4M33S" calcext:value-type="time">
            <text:p>11:34:3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61/1.849/2.174/0.18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4M38S" calcext:value-type="time">
            <text:p>11:34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2.8" calcext:value-type="float">
            <text:p>52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1/1.781/1.909/0.10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4M43S" calcext:value-type="time">
            <text:p>11:34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0/2.605/5.439/1.43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4M49S" calcext:value-type="time">
            <text:p>11:34:4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69/1.948/1.996/0.04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4M54S" calcext:value-type="time">
            <text:p>11:34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53/2.017/2.323/0.23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4M59S" calcext:value-type="time">
            <text:p>11:34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2/1.927/2.376/0.32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5M04S" calcext:value-type="time">
            <text:p>11:35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7/1.913/2.075/0.18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5M10S" calcext:value-type="time">
            <text:p>11:35:1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4.3" calcext:value-type="float">
            <text:p>94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70/1.929/2.170/0.14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5M15S" calcext:value-type="time">
            <text:p>11:35:1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2/1.889/2.076/0.12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5M20S" calcext:value-type="time">
            <text:p>11:35:2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3" calcext:value-type="float">
            <text:p>48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45/1.907/1.979/0.04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5M25S" calcext:value-type="time">
            <text:p>11:35:2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1.9" calcext:value-type="float">
            <text:p>41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6/1.883/2.112/0.22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5M31S" calcext:value-type="time">
            <text:p>11:35:3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4/1.785/2.081/0.23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5M36S" calcext:value-type="time">
            <text:p>11:35:3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7.1" calcext:value-type="float">
            <text:p>5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7/1.889/2.011/0.10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5M41S" calcext:value-type="time">
            <text:p>11:35:4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4.6" calcext:value-type="float">
            <text:p>94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88/1.842/1.936/0.09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5M46S" calcext:value-type="time">
            <text:p>11:35:4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3/1.826/2.030/0.1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5M52S" calcext:value-type="time">
            <text:p>11:35:5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0.6" calcext:value-type="float">
            <text:p>90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6" calcext:value-type="float">
            <text:p>1.86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32" calcext:value-type="float">
            <text:p>1.3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2/1.706/2.016/0.16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5M57S" calcext:value-type="time">
            <text:p>11:35:5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9" calcext:value-type="float">
            <text:p>1.79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32" calcext:value-type="float">
            <text:p>1.3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36/2.029/2.220/0.15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6M02S" calcext:value-type="time">
            <text:p>11:36:0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3.8" calcext:value-type="float">
            <text:p>93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2" calcext:value-type="float">
            <text:p>1.72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32" calcext:value-type="float">
            <text:p>1.3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8/2.024/2.211/0.20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6M07S" calcext:value-type="time">
            <text:p>11:36:0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7" calcext:value-type="float">
            <text:p>1.67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34/1.737/2.132/0.28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6M13S" calcext:value-type="time">
            <text:p>11:36:1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73/1.943/2.085/0.07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6M18S" calcext:value-type="time">
            <text:p>11:36:1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2/1.926/2.237/0.24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6M23S" calcext:value-type="time">
            <text:p>11:36:2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5.9" calcext:value-type="float">
            <text:p>55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3/1.846/2.229/0.20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6M28S" calcext:value-type="time">
            <text:p>11:36:2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9.7" calcext:value-type="float">
            <text:p>69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5/1.862/2.320/0.28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6M34S" calcext:value-type="time">
            <text:p>11:36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7.1" calcext:value-type="float">
            <text:p>4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4/1.919/2.201/0.21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6M39S" calcext:value-type="time">
            <text:p>11:36:3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3.8" calcext:value-type="float">
            <text:p>43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29/1.947/2.077/0.09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6M44S" calcext:value-type="time">
            <text:p>11:36:4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62/1.892/2.161/0.16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6M49S" calcext:value-type="time">
            <text:p>11:36:4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90/1.930/2.312/0.24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6M54S" calcext:value-type="time">
            <text:p>11:36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81/1.795/1.931/0.10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7M00S" calcext:value-type="time">
            <text:p>11:37:0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8.8" calcext:value-type="float">
            <text:p>58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32" calcext:value-type="float">
            <text:p>1.3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97/1.927/2.266/0.18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7M05S" calcext:value-type="time">
            <text:p>11:37:0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5.9" calcext:value-type="float">
            <text:p>55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32" calcext:value-type="float">
            <text:p>1.3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1/1.831/1.983/0.13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7M10S" calcext:value-type="time">
            <text:p>11:37:1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32" calcext:value-type="float">
            <text:p>1.3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4/1.757/2.102/0.18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7M15S" calcext:value-type="time">
            <text:p>11:37:1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2" calcext:value-type="float">
            <text:p>45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1/1.885/2.379/0.31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7M21S" calcext:value-type="time">
            <text:p>11:37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2" calcext:value-type="float">
            <text:p>45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5/1.827/1.966/0.12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7M26S" calcext:value-type="time">
            <text:p>11:37:2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92/1.863/2.016/0.14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7M31S" calcext:value-type="time">
            <text:p>11:37:3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47/1.905/2.115/0.14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7M36S" calcext:value-type="time">
            <text:p>11:37:3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1/1.840/1.939/0.08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7M42S" calcext:value-type="time">
            <text:p>11:37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3.8" calcext:value-type="float">
            <text:p>43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2/1.865/2.065/0.14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7M47S" calcext:value-type="time">
            <text:p>11:37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1/1.861/2.048/0.17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7M52S" calcext:value-type="time">
            <text:p>11:37:5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6.2" calcext:value-type="float">
            <text:p>56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1/1.974/2.181/0.21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7M57S" calcext:value-type="time">
            <text:p>11:37:5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5.9" calcext:value-type="float">
            <text:p>55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6/1.803/2.091/0.24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8M02S" calcext:value-type="time">
            <text:p>11:38:0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6" calcext:value-type="float">
            <text:p>51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86/1.887/2.134/0.17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8M08S" calcext:value-type="time">
            <text:p>11:38:0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9.4" calcext:value-type="float">
            <text:p>59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32" calcext:value-type="float">
            <text:p>1.3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5/1.928/2.113/0.15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8M13S" calcext:value-type="time">
            <text:p>11:38:1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8.8" calcext:value-type="float">
            <text:p>78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5" calcext:value-type="float">
            <text:p>31.4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32" calcext:value-type="float">
            <text:p>1.3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1/1.783/1.911/0.11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8M18S" calcext:value-type="time">
            <text:p>11:38:1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7.1" calcext:value-type="float">
            <text:p>7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32" calcext:value-type="float">
            <text:p>1.3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5/1.808/2.032/0.12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8M23S" calcext:value-type="time">
            <text:p>11:38:2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8.3" calcext:value-type="float">
            <text:p>58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32" calcext:value-type="float">
            <text:p>1.3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6/1.762/1.909/0.09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8M29S" calcext:value-type="time">
            <text:p>11:38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32" calcext:value-type="float">
            <text:p>1.3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7/1.723/1.940/0.11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8M34S" calcext:value-type="time">
            <text:p>11:38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86.1" calcext:value-type="float">
            <text:p>86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02" calcext:value-type="float">
            <text:p>2.02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.36" calcext:value-type="float">
            <text:p>1.3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00/1.775/2.042/0.17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8M39S" calcext:value-type="time">
            <text:p>11:38:3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18" calcext:value-type="float">
            <text:p>2.18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office:value-type="float" office:value="1.38" calcext:value-type="float">
            <text:p>1.3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2/1.716/1.855/0.1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8M44S" calcext:value-type="time">
            <text:p>11:38:4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9.4" calcext:value-type="float">
            <text:p>79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16" calcext:value-type="float">
            <text:p>2.16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.38" calcext:value-type="float">
            <text:p>1.3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4/1.817/2.256/0.22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8M50S" calcext:value-type="time">
            <text:p>11:38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" calcext:value-type="float">
            <text:p>3.3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07" calcext:value-type="float">
            <text:p>2.07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office:value-type="float" office:value="1.38" calcext:value-type="float">
            <text:p>1.3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6/1.841/2.044/0.17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8M55S" calcext:value-type="time">
            <text:p>11:38:5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1.2" calcext:value-type="float">
            <text:p>91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8" calcext:value-type="float">
            <text:p>1.98</text:p>
          </table:table-cell>
          <table:table-cell/>
          <table:table-cell office:value-type="float" office:value="1.63" calcext:value-type="float">
            <text:p>1.63</text:p>
          </table:table-cell>
          <table:table-cell/>
          <table:table-cell office:value-type="float" office:value="1.37" calcext:value-type="float">
            <text:p>1.3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7/1.685/1.771/0.06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9M00S" calcext:value-type="time">
            <text:p>11:39:0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37" calcext:value-type="float">
            <text:p>1.3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03/1.725/2.033/0.19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9M05S" calcext:value-type="time">
            <text:p>11:39:0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7.4" calcext:value-type="float">
            <text:p>77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3" calcext:value-type="float">
            <text:p>1.83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.37" calcext:value-type="float">
            <text:p>1.3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04/1.969/2.232/0.14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9M11S" calcext:value-type="time">
            <text:p>11:39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.36" calcext:value-type="float">
            <text:p>1.3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99/1.786/1.864/0.06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9M16S" calcext:value-type="time">
            <text:p>11:39:1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3" calcext:value-type="float">
            <text:p>54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3" calcext:value-type="float">
            <text:p>1.63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36" calcext:value-type="float">
            <text:p>1.3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7/1.702/1.848/0.13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9M21S" calcext:value-type="time">
            <text:p>11:39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8.8" calcext:value-type="float">
            <text:p>58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36" calcext:value-type="float">
            <text:p>1.3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64/1.828/1.879/0.04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9M26S" calcext:value-type="time">
            <text:p>11:39:2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36" calcext:value-type="float">
            <text:p>1.3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67/1.826/2.028/0.13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9M31S" calcext:value-type="time">
            <text:p>11:39:3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67/1.831/2.068/0.25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9M37S" calcext:value-type="time">
            <text:p>11:39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7.3" calcext:value-type="float">
            <text:p>97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0/2.006/2.259/0.17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9M42S" calcext:value-type="time">
            <text:p>11:39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8" calcext:value-type="float">
            <text:p>54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05/1.881/1.985/0.09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9M47S" calcext:value-type="time">
            <text:p>11:39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2/1.904/2.339/0.25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9M52S" calcext:value-type="time">
            <text:p>11:39:5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1/1.824/2.083/0.22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39M58S" calcext:value-type="time">
            <text:p>11:39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8.3" calcext:value-type="float">
            <text:p>58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36" calcext:value-type="float">
            <text:p>1.3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4/1.905/2.182/0.21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0M03S" calcext:value-type="time">
            <text:p>11:40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5.9" calcext:value-type="float">
            <text:p>55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1/1.828/2.195/0.24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0M08S" calcext:value-type="time">
            <text:p>11:40:0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3/1.832/2.125/0.20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0M13S" calcext:value-type="time">
            <text:p>11:40:1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7/1.821/2.109/0.21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0M19S" calcext:value-type="time">
            <text:p>11:40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8" calcext:value-type="float">
            <text:p>54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7/1.803/2.346/0.28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0M24S" calcext:value-type="time">
            <text:p>11:40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8/1.745/2.009/0.18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0M29S" calcext:value-type="time">
            <text:p>11:40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9" calcext:value-type="float">
            <text:p>1.19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5/1.909/2.151/0.15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0M34S" calcext:value-type="time">
            <text:p>11:40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5/1.782/2.042/0.16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0M40S" calcext:value-type="time">
            <text:p>11:40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0.6" calcext:value-type="float">
            <text:p>60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8" calcext:value-type="float">
            <text:p>1.08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67/1.933/2.121/0.16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0M45S" calcext:value-type="time">
            <text:p>11:40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7" calcext:value-type="float">
            <text:p>1.07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04/1.945/2.070/0.10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0M50S" calcext:value-type="time">
            <text:p>11:40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5" calcext:value-type="float">
            <text:p>1.15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7/1.873/2.104/0.14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0M55S" calcext:value-type="time">
            <text:p>11:40:5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4" calcext:value-type="float">
            <text:p>1.14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3/1.841/2.143/0.21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1M01S" calcext:value-type="time">
            <text:p>11:41:0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3" calcext:value-type="float">
            <text:p>54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2" calcext:value-type="float">
            <text:p>1.12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3/1.877/2.269/0.21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1M06S" calcext:value-type="time">
            <text:p>11:41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9/1.877/2.024/0.14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1M11S" calcext:value-type="time">
            <text:p>11:41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6" calcext:value-type="float">
            <text:p>51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0/1.809/1.973/0.12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1M16S" calcext:value-type="time">
            <text:p>11:41:1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5/1.782/2.073/0.21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1M21S" calcext:value-type="time">
            <text:p>11:41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6/1.933/2.199/0.22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1M27S" calcext:value-type="time">
            <text:p>11:41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9" calcext:value-type="float">
            <text:p>1.19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1/1.711/1.844/0.07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1M32S" calcext:value-type="time">
            <text:p>11:41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3/1.685/1.924/0.14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1M37S" calcext:value-type="time">
            <text:p>11:41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5.9" calcext:value-type="float">
            <text:p>55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57/2.015/2.217/0.17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1M42S" calcext:value-type="time">
            <text:p>11:41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8" calcext:value-type="float">
            <text:p>54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8/1.766/2.230/0.23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1M48S" calcext:value-type="time">
            <text:p>11:41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912/2.094/2.222/0.13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1M53S" calcext:value-type="time">
            <text:p>11:41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53/1.883/1.965/0.09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1M58S" calcext:value-type="time">
            <text:p>11:41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7.1" calcext:value-type="float">
            <text:p>5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35/1.989/2.227/0.15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2M03S" calcext:value-type="time">
            <text:p>11:42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3" calcext:value-type="float">
            <text:p>54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3/1.689/1.988/0.19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2M09S" calcext:value-type="time">
            <text:p>11:42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93.9" calcext:value-type="float">
            <text:p>93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33/1.686/1.860/0.18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2M14S" calcext:value-type="time">
            <text:p>11:42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1/1.912/2.354/0.24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2M19S" calcext:value-type="time">
            <text:p>11:42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86.5" calcext:value-type="float">
            <text:p>86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36" calcext:value-type="float">
            <text:p>1.3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917/1.998/2.196/0.10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2M24S" calcext:value-type="time">
            <text:p>11:42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2/1.869/1.964/0.09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2M30S" calcext:value-type="time">
            <text:p>11:42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3.6" calcext:value-type="float">
            <text:p>63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6/1.770/2.009/0.18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2M35S" calcext:value-type="time">
            <text:p>11:42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7.1" calcext:value-type="float">
            <text:p>4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36" calcext:value-type="float">
            <text:p>1.3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6/1.835/2.193/0.2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2M40S" calcext:value-type="time">
            <text:p>11:42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82.4" calcext:value-type="float">
            <text:p>82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5/1.776/1.941/0.17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2M45S" calcext:value-type="time">
            <text:p>11:42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50/1.819/1.956/0.07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2M51S" calcext:value-type="time">
            <text:p>11:42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7/1.887/2.044/0.12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2M56S" calcext:value-type="time">
            <text:p>11:42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95/1.932/2.204/0.17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3M01S" calcext:value-type="time">
            <text:p>11:43:0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8" calcext:value-type="float">
            <text:p>54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67/1.840/1.900/0.05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3M06S" calcext:value-type="time">
            <text:p>11:43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3" calcext:value-type="float">
            <text:p>31.4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1/1.716/1.827/0.07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3M11S" calcext:value-type="time">
            <text:p>11:43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80/1.870/1.996/0.07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3M17S" calcext:value-type="time">
            <text:p>11:43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3" calcext:value-type="float">
            <text:p>31.4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40/1.941/2.157/0.16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3M22S" calcext:value-type="time">
            <text:p>11:43:2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6" calcext:value-type="float">
            <text:p>51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6" calcext:value-type="float">
            <text:p>1.16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90/2.037/2.237/0.14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3M27S" calcext:value-type="time">
            <text:p>11:43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7.1" calcext:value-type="float">
            <text:p>47.1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3" calcext:value-type="float">
            <text:p>31.4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3/1.934/2.194/0.18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3M32S" calcext:value-type="time">
            <text:p>11:43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6.2" calcext:value-type="float">
            <text:p>56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9/1.872/2.148/0.14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3M38S" calcext:value-type="time">
            <text:p>11:43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5/1.822/2.072/0.20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3M43S" calcext:value-type="time">
            <text:p>11:43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44/1.916/2.097/0.12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3M48S" calcext:value-type="time">
            <text:p>11:43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6" calcext:value-type="float">
            <text:p>1.16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32" calcext:value-type="float">
            <text:p>1.3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62/1.605/1.844/0.19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3M53S" calcext:value-type="time">
            <text:p>11:43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8" calcext:value-type="float">
            <text:p>54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3" calcext:value-type="float">
            <text:p>31.4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85/1.888/2.058/0.13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3M59S" calcext:value-type="time">
            <text:p>11:43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3" calcext:value-type="float">
            <text:p>31.4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1/1.859/2.403/0.29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4M04S" calcext:value-type="time">
            <text:p>11:44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0.6" calcext:value-type="float">
            <text:p>60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3" calcext:value-type="float">
            <text:p>31.4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32" calcext:value-type="float">
            <text:p>1.3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8/1.815/2.091/0.16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4M09S" calcext:value-type="time">
            <text:p>11:44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6.2" calcext:value-type="float">
            <text:p>56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3" calcext:value-type="float">
            <text:p>31.4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9/1.779/2.059/0.17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4M14S" calcext:value-type="time">
            <text:p>11:44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78.8" calcext:value-type="float">
            <text:p>78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4" calcext:value-type="float">
            <text:p>31.4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9/1.903/2.037/0.15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4M20S" calcext:value-type="time">
            <text:p>11:44:2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88.6" calcext:value-type="float">
            <text:p>88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2/1.810/2.269/0.26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4M25S" calcext:value-type="time">
            <text:p>11:44:2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9.7" calcext:value-type="float">
            <text:p>69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48/1.889/2.133/0.14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4M30S" calcext:value-type="time">
            <text:p>11:44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3" calcext:value-type="float">
            <text:p>31.4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11/1.927/2.028/0.08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4M35S" calcext:value-type="time">
            <text:p>11:44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98/1.817/1.891/0.0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4M40S" calcext:value-type="time">
            <text:p>11:44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6/1.820/2.214/0.22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4M46S" calcext:value-type="time">
            <text:p>11:44:4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11/1.903/2.042/0.08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4M51S" calcext:value-type="time">
            <text:p>11:44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3" calcext:value-type="float">
            <text:p>31.4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23/1.827/2.123/0.28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table:number-columns-repeated="4"/>
          <table:table-cell table:formula="of:=AVERAGE([.E83:.E417])" office:value-type="float" office:value="55.031343283582" calcext:value-type="float">
            <text:p>55.031343283582</text:p>
          </table:table-cell>
          <table:table-cell table:number-columns-repeated="4"/>
          <table:table-cell table:formula="of:=AVERAGE([.J83:.J417])" office:value-type="float" office:value="31.3382985074626" calcext:value-type="float">
            <text:p>31.3382985074626</text:p>
          </table:table-cell>
          <table:table-cell table:number-columns-repeated="6"/>
          <table:table-cell table:formula="of:=AVERAGE([.Q83:.Q417])" office:value-type="float" office:value="3.30205970149251" calcext:value-type="float">
            <text:p>3.30205970149251</text:p>
          </table:table-cell>
          <table:table-cell table:formula="of:=AVERAGE([.R83:.R417])" office:value-type="float" office:value="9.03999999999997" calcext:value-type="float">
            <text:p>9.03999999999997</text:p>
          </table:table-cell>
          <table:table-cell table:number-columns-repeated="5"/>
          <table:table-cell table:formula="of:=AVERAGE([.X83:.X417])" office:value-type="float" office:value="1.38773134328358" calcext:value-type="float">
            <text:p>1.38773134328358</text:p>
          </table:table-cell>
          <table:table-cell/>
          <table:table-cell table:formula="of:=AVERAGE([.Z83:.Z417])" office:value-type="float" office:value="1.38441791044776" calcext:value-type="float">
            <text:p>1.38441791044776</text:p>
          </table:table-cell>
          <table:table-cell/>
          <table:table-cell table:formula="of:=AVERAGE([.AB83:.AB417])" office:value-type="float" office:value="1.19794029850746" calcext:value-type="float">
            <text:p>1.19794029850746</text:p>
          </table:table-cell>
          <table:table-cell table:number-columns-repeated="4"/>
          <table:table-cell table:formula="of:=AVERAGE([.AG83:.AG417])" office:value-type="float" office:value="270.746268656716" calcext:value-type="float">
            <text:p>270.746268656716</text:p>
          </table:table-cell>
          <table:table-cell table:number-columns-repeated="18"/>
        </table:table-row>
        <table:table-row table:style-name="ro1">
          <table:table-cell table:number-columns-repeated="51"/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4M56S" calcext:value-type="time">
            <text:p>11:44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82.9" calcext:value-type="float">
            <text:p>82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3" calcext:value-type="float">
            <text:p>31.4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7/1.781/1.979/0.13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5M01S" calcext:value-type="time">
            <text:p>11:45:0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1.2" calcext:value-type="float">
            <text:p>31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4" calcext:value-type="float">
            <text:p>31.4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7/1.683/1.792/0.08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5M07S" calcext:value-type="time">
            <text:p>11:45:0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4" calcext:value-type="float">
            <text:p>31.4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9/1.694/1.921/0.18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5M12S" calcext:value-type="time">
            <text:p>11:45:1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6.7" calcext:value-type="float">
            <text:p>66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8" calcext:value-type="float">
            <text:p>31.4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32" calcext:value-type="float">
            <text:p>1.3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59/1.578/1.824/0.17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5M17S" calcext:value-type="time">
            <text:p>11:45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9.4" calcext:value-type="float">
            <text:p>19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48" calcext:value-type="float">
            <text:p>31.4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1" calcext:value-type="float">
            <text:p>1.01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2/1.542/1.728/0.11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5M22S" calcext:value-type="time">
            <text:p>11:45:2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54" calcext:value-type="float">
            <text:p>31.5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3" calcext:value-type="float">
            <text:p>0.93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61/1.629/1.821/0.15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5M28S" calcext:value-type="time">
            <text:p>11:45:2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4.2" calcext:value-type="float">
            <text:p>24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68" calcext:value-type="float">
            <text:p>31.6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6" calcext:value-type="float">
            <text:p>0.86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89/1.531/1.749/0.12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5M33S" calcext:value-type="time">
            <text:p>11:45:3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8.7" calcext:value-type="float">
            <text:p>38.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1.91" calcext:value-type="float">
            <text:p>31.9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0/2.667/6.483/1.91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5M38S" calcext:value-type="time">
            <text:p>11:45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2.35" calcext:value-type="float">
            <text:p>32.3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0/1.592/1.791/0.12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5M43S" calcext:value-type="time">
            <text:p>11:45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34.3" calcext:value-type="float">
            <text:p>34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2.78" calcext:value-type="float">
            <text:p>32.7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2" calcext:value-type="float">
            <text:p>0.82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1/1.675/1.894/0.13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5M49S" calcext:value-type="time">
            <text:p>11:45:4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4.3" calcext:value-type="float">
            <text:p>54.3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18" calcext:value-type="float">
            <text:p>33.18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3" calcext:value-type="float">
            <text:p>0.83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5/1.757/1.952/0.11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5M54S" calcext:value-type="time">
            <text:p>11:45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0.6" calcext:value-type="float">
            <text:p>20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37" calcext:value-type="float">
            <text:p>33.3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99/1.603/1.811/0.17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5M59S" calcext:value-type="time">
            <text:p>11:45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58.8" calcext:value-type="float">
            <text:p>58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52" calcext:value-type="float">
            <text:p>33.52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1.19" calcext:value-type="float">
            <text:p>1.19</text:p>
          </table:table-cell>
          <table:table-cell/>
          <table:table-cell office:value-type="float" office:value="1.27" calcext:value-type="float">
            <text:p>1.2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9/1.766/2.047/0.18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6M04S" calcext:value-type="time">
            <text:p>11:46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1.9" calcext:value-type="float">
            <text:p>21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64" calcext:value-type="float">
            <text:p>33.6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5/1.750/1.920/0.17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6M09S" calcext:value-type="time">
            <text:p>11:46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8.8" calcext:value-type="float">
            <text:p>18.8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67" calcext:value-type="float">
            <text:p>33.6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9" calcext:value-type="float">
            <text:p>0.99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3/1.637/1.949/0.17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6M15S" calcext:value-type="time">
            <text:p>11:46:1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5.6" calcext:value-type="float">
            <text:p>15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67" calcext:value-type="float">
            <text:p>33.6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9" calcext:value-type="float">
            <text:p>0.99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6/1.731/1.962/0.19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6M20S" calcext:value-type="time">
            <text:p>11:46:2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69" calcext:value-type="float">
            <text:p>33.69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1" calcext:value-type="float">
            <text:p>0.91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27" calcext:value-type="float">
            <text:p>1.2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4/1.762/1.894/0.12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6M25S" calcext:value-type="time">
            <text:p>11:46:2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1.2" calcext:value-type="float">
            <text:p>21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7" calcext:value-type="float">
            <text:p>33.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2" calcext:value-type="float">
            <text:p>0.92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27" calcext:value-type="float">
            <text:p>1.2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2/1.751/1.945/0.12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6M30S" calcext:value-type="time">
            <text:p>11:46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7.6" calcext:value-type="float">
            <text:p>17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7" calcext:value-type="float">
            <text:p>33.7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9" calcext:value-type="float">
            <text:p>1.09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58/1.521/1.757/0.16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6M36S" calcext:value-type="time">
            <text:p>11:46:3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9.4" calcext:value-type="float">
            <text:p>19.4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71" calcext:value-type="float">
            <text:p>33.71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8" calcext:value-type="float">
            <text:p>1.08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0/1.696/1.980/0.22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6M41S" calcext:value-type="time">
            <text:p>11:46:4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8.2" calcext:value-type="float">
            <text:p>18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73" calcext:value-type="float">
            <text:p>33.73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7" calcext:value-type="float">
            <text:p>1.07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1/1.850/2.127/0.18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6M46S" calcext:value-type="time">
            <text:p>11:46:4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5.6" calcext:value-type="float">
            <text:p>15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74" calcext:value-type="float">
            <text:p>33.74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9" calcext:value-type="float">
            <text:p>0.99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27" calcext:value-type="float">
            <text:p>1.2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55/1.585/1.773/0.1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6M51S" calcext:value-type="time">
            <text:p>11:46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75" calcext:value-type="float">
            <text:p>33.7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9" calcext:value-type="float">
            <text:p>0.99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27" calcext:value-type="float">
            <text:p>1.2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8/1.866/2.172/0.23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6M56S" calcext:value-type="time">
            <text:p>11:46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4.2" calcext:value-type="float">
            <text:p>24.2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75" calcext:value-type="float">
            <text:p>33.7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9" calcext:value-type="float">
            <text:p>0.99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27" calcext:value-type="float">
            <text:p>1.2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6/1.615/1.905/0.17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7M02S" calcext:value-type="time">
            <text:p>11:47:0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20.6" calcext:value-type="float">
            <text:p>20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76" calcext:value-type="float">
            <text:p>33.76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1" calcext:value-type="float">
            <text:p>0.91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.26" calcext:value-type="float">
            <text:p>1.2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5/1.748/2.005/0.17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time" office:time-value="PT23H47M07S" calcext:value-type="time">
            <text:p>11:47:0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float" office:value="15.6" calcext:value-type="float">
            <text:p>15.6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float" office:value="33.75" calcext:value-type="float">
            <text:p>33.75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1" calcext:value-type="float">
            <text:p>3.3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4" calcext:value-type="float">
            <text:p>0.84</text:p>
          </table:table-cell>
          <table:table-cell/>
          <table:table-cell office:value-type="float" office:value="1.16" calcext:value-type="float">
            <text:p>1.16</text:p>
          </table:table-cell>
          <table:table-cell/>
          <table:table-cell office:value-type="float" office:value="1.25" calcext:value-type="float">
            <text:p>1.2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08/1.676/1.933/0.16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AVERAGE([.E420:.E445])" office:value-type="float" office:value="31.6423076923077" calcext:value-type="float">
            <text:p>31.6423076923077</text:p>
          </table:table-cell>
          <table:table-cell table:number-columns-repeated="4"/>
          <table:table-cell table:formula="of:=AVERAGE([.J420:.J445])" office:value-type="float" office:value="32.9176923076923" calcext:value-type="float">
            <text:p>32.9176923076923</text:p>
          </table:table-cell>
          <table:table-cell table:number-columns-repeated="6"/>
          <table:table-cell table:formula="of:=AVERAGE([.Q420:.Q445])" office:value-type="float" office:value="3.31" calcext:value-type="float">
            <text:p>3.31</text:p>
          </table:table-cell>
          <table:table-cell table:formula="of:=AVERAGE([.R420:.R445])" office:value-type="float" office:value="9.03999999999999" calcext:value-type="float">
            <text:p>9.03999999999999</text:p>
          </table:table-cell>
          <table:table-cell table:number-columns-repeated="5"/>
          <table:table-cell table:formula="of:=AVERAGE([.X420:.X445])" office:value-type="float" office:value="0.965" calcext:value-type="float">
            <text:p>0.965</text:p>
          </table:table-cell>
          <table:table-cell/>
          <table:table-cell table:formula="of:=AVERAGE([.Z420:.Z445])" office:value-type="float" office:value="1.24538461538462" calcext:value-type="float">
            <text:p>1.24538461538462</text:p>
          </table:table-cell>
          <table:table-cell/>
          <table:table-cell table:formula="of:=AVERAGE([.AB420:.AB445])" office:value-type="float" office:value="1.28807692307692" calcext:value-type="float">
            <text:p>1.28807692307692</text:p>
          </table:table-cell>
          <table:table-cell table:number-columns-repeated="4"/>
          <table:table-cell table:formula="of:=AVERAGE([.AG420:.AG445])" office:value-type="float" office:value="270.307692307692" calcext:value-type="float">
            <text:p>270.30769230769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06T13:20:01.442205578</dc:date>
    <meta:editing-duration>PT8M26S</meta:editing-duration>
    <meta:editing-cycles>1</meta:editing-cycles>
    <meta:document-statistic meta:table-count="1" meta:cell-count="14024" meta:object-count="0"/>
  </office:meta>
</office:document-meta>
</file>