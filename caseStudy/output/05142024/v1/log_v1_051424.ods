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4319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5283in"/>
    </style:style>
    <style:style style:name="co17" style:family="table-column">
      <style:table-column-properties fo:break-before="auto" style:column-width="0.3457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6571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og_v1_05142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3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8M32S" calcext:value-type="time">
            <text:p>07:08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35" calcext:value-type="percentage">
            <text:p>21.3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3" calcext:value-type="float">
            <text:p>0.93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7/1.703/1.989/0.17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8M38S" calcext:value-type="time">
            <text:p>07:08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44" calcext:value-type="percentage">
            <text:p>21.4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8/1.781/2.035/0.1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8M43S" calcext:value-type="time">
            <text:p>07:08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18" calcext:value-type="percentage">
            <text:p>61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52" calcext:value-type="percentage">
            <text:p>21.5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.78" calcext:value-type="float">
            <text:p>1.78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3/1.855/1.981/0.12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8M48S" calcext:value-type="time">
            <text:p>07:08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41" calcext:value-type="percentage">
            <text:p>94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54" calcext:value-type="percentage">
            <text:p>21.5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0.88" calcext:value-type="float">
            <text:p>0.8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6/1.719/1.842/0.12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8M54S" calcext:value-type="time">
            <text:p>07:08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75" calcext:value-type="percentage">
            <text:p>37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57" calcext:value-type="percentage">
            <text:p>21.5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8/1.683/1.955/0.1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8M59S" calcext:value-type="time">
            <text:p>07:08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" calcext:value-type="percentage">
            <text:p>8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59" calcext:value-type="percentage">
            <text:p>21.5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1.87" calcext:value-type="float">
            <text:p>1.87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6/1.925/2.047/0.1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04S" calcext:value-type="time">
            <text:p>07:09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24" calcext:value-type="percentage">
            <text:p>42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59" calcext:value-type="percentage">
            <text:p>21.5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0/1.627/1.800/0.1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09S" calcext:value-type="time">
            <text:p>07:09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59" calcext:value-type="percentage">
            <text:p>21.5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1.89" calcext:value-type="float">
            <text:p>1.89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5/1.807/2.022/0.17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14S" calcext:value-type="time">
            <text:p>07:09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67" calcext:value-type="percentage">
            <text:p>66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61" calcext:value-type="percentage">
            <text:p>21.6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0.92" calcext:value-type="float">
            <text:p>0.9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9/1.771/1.947/0.09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20S" calcext:value-type="time">
            <text:p>07:09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24" calcext:value-type="percentage">
            <text:p>42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62" calcext:value-type="percentage">
            <text:p>21.6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83/1.615/1.874/0.2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25S" calcext:value-type="time">
            <text:p>07:09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5" calcext:value-type="percentage">
            <text:p>25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189" calcext:value-type="percentage">
            <text:p>21.8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6/1.666/1.861/0.1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30S" calcext:value-type="time">
            <text:p>07:09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19" calcext:value-type="percentage">
            <text:p>21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12" calcext:value-type="percentage">
            <text:p>22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8/1.744/2.005/0.2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35S" calcext:value-type="time">
            <text:p>07:09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58" calcext:value-type="percentage">
            <text:p>25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21" calcext:value-type="percentage">
            <text:p>22.2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3" calcext:value-type="float">
            <text:p>1.93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9/1.658/1.837/0.1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41S" calcext:value-type="time">
            <text:p>07:09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75" calcext:value-type="percentage">
            <text:p>37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23" calcext:value-type="percentage">
            <text:p>22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8" calcext:value-type="float">
            <text:p>1.78</text:p>
          </table:table-cell>
          <table:table-cell/>
          <table:table-cell office:value-type="float" office:value="1.87" calcext:value-type="float">
            <text:p>1.87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0/1.730/2.052/0.21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46S" calcext:value-type="time">
            <text:p>07:09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88" calcext:value-type="percentage">
            <text:p>1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25" calcext:value-type="percentage">
            <text:p>22.2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.87" calcext:value-type="float">
            <text:p>1.87</text:p>
          </table:table-cell>
          <table:table-cell/>
          <table:table-cell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1/1.712/2.044/0.2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51S" calcext:value-type="time">
            <text:p>07:09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76" calcext:value-type="percentage">
            <text:p>6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26" calcext:value-type="percentage">
            <text:p>22.2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9/1.667/1.826/0.1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09M56S" calcext:value-type="time">
            <text:p>07:09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86" calcext:value-type="percentage">
            <text:p>2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27" calcext:value-type="percentage">
            <text:p>22.2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0/1.557/1.705/0.09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02S" calcext:value-type="time">
            <text:p>07:10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94" calcext:value-type="percentage">
            <text:p>2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28" calcext:value-type="percentage">
            <text:p>22.2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82" calcext:value-type="float">
            <text:p>1.82</text:p>
          </table:table-cell>
          <table:table-cell/>
          <table:table-cell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5/2.389/5.410/1.51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07S" calcext:value-type="time">
            <text:p>07:10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31" calcext:value-type="percentage">
            <text:p>22.3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53/1.384/1.586/0.1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12S" calcext:value-type="time">
            <text:p>07:10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43" calcext:value-type="percentage">
            <text:p>34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39" calcext:value-type="percentage">
            <text:p>22.3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5/1.873/2.068/0.10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17S" calcext:value-type="time">
            <text:p>07:10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94" calcext:value-type="percentage">
            <text:p>1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55" calcext:value-type="percentage">
            <text:p>22.5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9/1.646/1.908/0.1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23S" calcext:value-type="time">
            <text:p>07:10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24" calcext:value-type="percentage">
            <text:p>32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74" calcext:value-type="percentage">
            <text:p>22.7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9/1.648/1.921/0.1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28S" calcext:value-type="time">
            <text:p>07:10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24" calcext:value-type="percentage">
            <text:p>32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15" calcext:value-type="percentage">
            <text:p>23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8/1.886/2.015/0.1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33S" calcext:value-type="time">
            <text:p>07:10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25" calcext:value-type="percentage">
            <text:p>62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74" calcext:value-type="percentage">
            <text:p>23.7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02/1.475/1.720/0.1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38S" calcext:value-type="time">
            <text:p>07:10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43" calcext:value-type="percentage">
            <text:p>94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422" calcext:value-type="percentage">
            <text:p>24.2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5/1.819/2.039/0.1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44S" calcext:value-type="time">
            <text:p>07:10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9" calcext:value-type="percentage">
            <text:p>29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458" calcext:value-type="percentage">
            <text:p>24.5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4/1.754/2.040/0.2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49S" calcext:value-type="time">
            <text:p>07:10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76" calcext:value-type="percentage">
            <text:p>6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47" calcext:value-type="percentage">
            <text:p>24.7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3/1.613/1.816/0.16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54S" calcext:value-type="time">
            <text:p>07:10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24" calcext:value-type="percentage">
            <text:p>32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473" calcext:value-type="percentage">
            <text:p>24.7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3" calcext:value-type="float">
            <text:p>1.93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6/1.655/1.742/0.07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0M59S" calcext:value-type="time">
            <text:p>07:10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43" calcext:value-type="percentage">
            <text:p>34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475" calcext:value-type="percentage">
            <text:p>24.7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8" calcext:value-type="float">
            <text:p>1.78</text:p>
          </table:table-cell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3/1.541/1.682/0.0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AVERAGE([.E1:.E29])" office:value-type="percentage" office:value="0.465655172413793" calcext:value-type="percentage">
            <text:p>46.57%</text:p>
          </table:table-cell>
          <table:table-cell table:number-columns-repeated="4"/>
          <table:table-cell table:formula="of:=AVERAGE([.J1:.J29])" office:value-type="percentage" office:value="0.2251" calcext:value-type="percentage">
            <text:p>22.51%</text:p>
          </table:table-cell>
          <table:table-cell table:number-columns-repeated="6"/>
          <table:table-cell table:formula="of:=AVERAGE([.Q1:.Q29])" office:value-type="float" office:value="3.36" calcext:value-type="float">
            <text:p>3.36</text:p>
          </table:table-cell>
          <table:table-cell table:formula="of:=AVERAGE([.R1:.R29])" office:value-type="float" office:value="8.27" calcext:value-type="float">
            <text:p>8.27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19:29:18.148824047</dc:date>
    <meta:editing-duration>PT49S</meta:editing-duration>
    <meta:editing-cycles>1</meta:editing-cycles>
    <meta:document-statistic meta:table-count="1" meta:cell-count="1048" meta:object-count="0"/>
    <meta:generator>LibreOffice/6.4.7.2$Linux_X86_64 LibreOffice_project/40$Build-2</meta:generator>
  </office:meta>
</office:document-meta>
</file>