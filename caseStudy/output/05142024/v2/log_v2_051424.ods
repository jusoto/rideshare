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4102in"/>
    </style:style>
    <style:style style:name="co4" style:family="table-column">
      <style:table-column-properties fo:break-before="auto" style:column-width="0.5602in"/>
    </style:style>
    <style:style style:name="co5" style:family="table-column">
      <style:table-column-properties fo:break-before="auto" style:column-width="0.668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252in"/>
    </style:style>
    <style:style style:name="co8" style:family="table-column">
      <style:table-column-properties fo:break-before="auto" style:column-width="0.5929in"/>
    </style:style>
    <style:style style:name="co9" style:family="table-column">
      <style:table-column-properties fo:break-before="auto" style:column-width="0.3138in"/>
    </style:style>
    <style:style style:name="co10" style:family="table-column">
      <style:table-column-properties fo:break-before="auto" style:column-width="0.5181in"/>
    </style:style>
    <style:style style:name="co11" style:family="table-column">
      <style:table-column-properties fo:break-before="auto" style:column-width="0.4319in"/>
    </style:style>
    <style:style style:name="co12" style:family="table-column">
      <style:table-column-properties fo:break-before="auto" style:column-width="0.4965in"/>
    </style:style>
    <style:style style:name="co13" style:family="table-column">
      <style:table-column-properties fo:break-before="auto" style:column-width="0.389in"/>
    </style:style>
    <style:style style:name="co14" style:family="table-column">
      <style:table-column-properties fo:break-before="auto" style:column-width="0.4217in"/>
    </style:style>
    <style:style style:name="co15" style:family="table-column">
      <style:table-column-properties fo:break-before="auto" style:column-width="0.6354in"/>
    </style:style>
    <style:style style:name="co16" style:family="table-column">
      <style:table-column-properties fo:break-before="auto" style:column-width="0.5283in"/>
    </style:style>
    <style:style style:name="co17" style:family="table-column">
      <style:table-column-properties fo:break-before="auto" style:column-width="0.3457in"/>
    </style:style>
    <style:style style:name="co18" style:family="table-column">
      <style:table-column-properties fo:break-before="auto" style:column-width="0.4in"/>
    </style:style>
    <style:style style:name="co19" style:family="table-column">
      <style:table-column-properties fo:break-before="auto" style:column-width="0.6571in"/>
    </style:style>
    <style:style style:name="co20" style:family="table-column">
      <style:table-column-properties fo:break-before="auto" style:column-width="0.7535in"/>
    </style:style>
    <style:style style:name="co21" style:family="table-column">
      <style:table-column-properties fo:break-before="auto" style:column-width="1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43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log_v2_051424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ce3"/>
        <table:table-column table:style-name="co6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number-columns-repeated="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8" table:default-cell-style-name="Default"/>
        <table:table-column table:style-name="co11" table:default-cell-style-name="Default"/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18M09S" calcext:value-type="time">
            <text:p>07:18:0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156" calcext:value-type="percentage">
            <text:p>15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279" calcext:value-type="percentage">
            <text:p>22.7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6.64" calcext:value-type="float">
            <text:p>6.64</text:p>
          </table:table-cell>
          <table:table-cell/>
          <table:table-cell office:value-type="float" office:value="6.66" calcext:value-type="float">
            <text:p>6.66</text:p>
          </table:table-cell>
          <table:table-cell/>
          <table:table-cell office:value-type="float" office:value="3.35" calcext:value-type="float">
            <text:p>3.3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324" calcext:value-type="float">
            <text:p>324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66/1.878/1.985/0.09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18M14S" calcext:value-type="time">
            <text:p>07:18:1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938" calcext:value-type="percentage">
            <text:p>93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334" calcext:value-type="percentage">
            <text:p>23.34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6.1" calcext:value-type="float">
            <text:p>6.1</text:p>
          </table:table-cell>
          <table:table-cell/>
          <table:table-cell office:value-type="float" office:value="6.54" calcext:value-type="float">
            <text:p>6.54</text:p>
          </table:table-cell>
          <table:table-cell/>
          <table:table-cell office:value-type="float" office:value="3.33" calcext:value-type="float">
            <text:p>3.3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57/1.828/2.200/0.19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18M19S" calcext:value-type="time">
            <text:p>07:18:1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57" calcext:value-type="percentage">
            <text:p>45.7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342" calcext:value-type="percentage">
            <text:p>23.42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6.34" calcext:value-type="float">
            <text:p>6.34</text:p>
          </table:table-cell>
          <table:table-cell/>
          <table:table-cell office:value-type="float" office:value="6.59" calcext:value-type="float">
            <text:p>6.59</text:p>
          </table:table-cell>
          <table:table-cell/>
          <table:table-cell office:value-type="float" office:value="3.36" calcext:value-type="float">
            <text:p>3.3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58/1.784/2.055/0.20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18M24S" calcext:value-type="time">
            <text:p>07:18:2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735" calcext:value-type="percentage">
            <text:p>73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345" calcext:value-type="percentage">
            <text:p>23.4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5.91" calcext:value-type="float">
            <text:p>5.91</text:p>
          </table:table-cell>
          <table:table-cell/>
          <table:table-cell office:value-type="float" office:value="6.49" calcext:value-type="float">
            <text:p>6.49</text:p>
          </table:table-cell>
          <table:table-cell/>
          <table:table-cell office:value-type="float" office:value="3.35" calcext:value-type="float">
            <text:p>3.3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04/1.819/1.985/0.13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18M30S" calcext:value-type="time">
            <text:p>07:18:3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06" calcext:value-type="percentage">
            <text:p>40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35" calcext:value-type="percentage">
            <text:p>23.50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6.16" calcext:value-type="float">
            <text:p>6.16</text:p>
          </table:table-cell>
          <table:table-cell/>
          <table:table-cell office:value-type="float" office:value="6.53" calcext:value-type="float">
            <text:p>6.53</text:p>
          </table:table-cell>
          <table:table-cell/>
          <table:table-cell office:value-type="float" office:value="3.38" calcext:value-type="float">
            <text:p>3.3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51/1.638/1.698/0.04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18M35S" calcext:value-type="time">
            <text:p>07:18:3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735" calcext:value-type="percentage">
            <text:p>73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351" calcext:value-type="percentage">
            <text:p>23.51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5.74" calcext:value-type="float">
            <text:p>5.74</text:p>
          </table:table-cell>
          <table:table-cell/>
          <table:table-cell office:value-type="float" office:value="6.44" calcext:value-type="float">
            <text:p>6.44</text:p>
          </table:table-cell>
          <table:table-cell/>
          <table:table-cell office:value-type="float" office:value="3.37" calcext:value-type="float">
            <text:p>3.3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324" calcext:value-type="float">
            <text:p>324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72/1.701/1.916/0.15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18M40S" calcext:value-type="time">
            <text:p>07:18:4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857" calcext:value-type="percentage">
            <text:p>85.7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354" calcext:value-type="percentage">
            <text:p>23.54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7.21" calcext:value-type="float">
            <text:p>7.21</text:p>
          </table:table-cell>
          <table:table-cell/>
          <table:table-cell office:value-type="float" office:value="6.73" calcext:value-type="float">
            <text:p>6.73</text:p>
          </table:table-cell>
          <table:table-cell/>
          <table:table-cell office:value-type="float" office:value="3.48" calcext:value-type="float">
            <text:p>3.4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326" calcext:value-type="float">
            <text:p>326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82/1.731/2.004/0.15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18M45S" calcext:value-type="time">
            <text:p>07:18:4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344" calcext:value-type="percentage">
            <text:p>34.4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356" calcext:value-type="percentage">
            <text:p>23.5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6.95" calcext:value-type="float">
            <text:p>6.95</text:p>
          </table:table-cell>
          <table:table-cell/>
          <table:table-cell office:value-type="float" office:value="6.69" calcext:value-type="float">
            <text:p>6.69</text:p>
          </table:table-cell>
          <table:table-cell/>
          <table:table-cell office:value-type="float" office:value="3.48" calcext:value-type="float">
            <text:p>3.4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14/1.752/1.908/0.12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18M51S" calcext:value-type="time">
            <text:p>07:18:5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357" calcext:value-type="percentage">
            <text:p>23.5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6.87" calcext:value-type="float">
            <text:p>6.87</text:p>
          </table:table-cell>
          <table:table-cell/>
          <table:table-cell office:value-type="float" office:value="6.68" calcext:value-type="float">
            <text:p>6.68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326" calcext:value-type="float">
            <text:p>326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287/1.594/1.868/0.20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18M56S" calcext:value-type="time">
            <text:p>07:18:5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919" calcext:value-type="percentage">
            <text:p>91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36" calcext:value-type="percentage">
            <text:p>23.60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6.32" calcext:value-type="float">
            <text:p>6.32</text:p>
          </table:table-cell>
          <table:table-cell/>
          <table:table-cell office:value-type="float" office:value="6.57" calcext:value-type="float">
            <text:p>6.57</text:p>
          </table:table-cell>
          <table:table-cell/>
          <table:table-cell office:value-type="float" office:value="3.48" calcext:value-type="float">
            <text:p>3.4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51/1.859/2.097/0.18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19M01S" calcext:value-type="time">
            <text:p>07:19:0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55" calcext:value-type="percentage">
            <text:p>45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362" calcext:value-type="percentage">
            <text:p>23.62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6.14" calcext:value-type="float">
            <text:p>6.14</text:p>
          </table:table-cell>
          <table:table-cell/>
          <table:table-cell office:value-type="float" office:value="6.52" calcext:value-type="float">
            <text:p>6.52</text:p>
          </table:table-cell>
          <table:table-cell/>
          <table:table-cell office:value-type="float" office:value="3.48" calcext:value-type="float">
            <text:p>3.4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324" calcext:value-type="float">
            <text:p>324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05/1.723/2.074/0.20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19M06S" calcext:value-type="time">
            <text:p>07:19:0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303" calcext:value-type="percentage">
            <text:p>30.3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365" calcext:value-type="percentage">
            <text:p>23.6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5.8" calcext:value-type="float">
            <text:p>5.8</text:p>
          </table:table-cell>
          <table:table-cell/>
          <table:table-cell office:value-type="float" office:value="6.45" calcext:value-type="float">
            <text:p>6.45</text:p>
          </table:table-cell>
          <table:table-cell/>
          <table:table-cell office:value-type="float" office:value="3.47" calcext:value-type="float">
            <text:p>3.4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87/1.769/1.958/0.17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19M12S" calcext:value-type="time">
            <text:p>07:19:1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" calcext:value-type="percentage">
            <text:p>40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366" calcext:value-type="percentage">
            <text:p>23.6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5.42" calcext:value-type="float">
            <text:p>5.42</text:p>
          </table:table-cell>
          <table:table-cell/>
          <table:table-cell office:value-type="float" office:value="6.36" calcext:value-type="float">
            <text:p>6.36</text:p>
          </table:table-cell>
          <table:table-cell/>
          <table:table-cell office:value-type="float" office:value="3.46" calcext:value-type="float">
            <text:p>3.4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05/1.643/1.954/0.20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19M17S" calcext:value-type="time">
            <text:p>07:19:1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706" calcext:value-type="percentage">
            <text:p>70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365" calcext:value-type="percentage">
            <text:p>23.6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4.74" calcext:value-type="float">
            <text:p>4.74</text:p>
          </table:table-cell>
          <table:table-cell/>
          <table:table-cell office:value-type="float" office:value="6.18" calcext:value-type="float">
            <text:p>6.18</text:p>
          </table:table-cell>
          <table:table-cell/>
          <table:table-cell office:value-type="float" office:value="3.43" calcext:value-type="float">
            <text:p>3.4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321" calcext:value-type="float">
            <text:p>32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24/1.685/1.926/0.14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19M22S" calcext:value-type="time">
            <text:p>07:19:2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06" calcext:value-type="percentage">
            <text:p>40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365" calcext:value-type="percentage">
            <text:p>23.6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4.36" calcext:value-type="float">
            <text:p>4.36</text:p>
          </table:table-cell>
          <table:table-cell/>
          <table:table-cell office:value-type="float" office:value="6.08" calcext:value-type="float">
            <text:p>6.08</text:p>
          </table:table-cell>
          <table:table-cell/>
          <table:table-cell office:value-type="float" office:value="3.41" calcext:value-type="float">
            <text:p>3.4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55/1.744/2.027/0.18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19M27S" calcext:value-type="time">
            <text:p>07:19:2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294" calcext:value-type="percentage">
            <text:p>29.4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365" calcext:value-type="percentage">
            <text:p>23.6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4.01" calcext:value-type="float">
            <text:p>4.01</text:p>
          </table:table-cell>
          <table:table-cell/>
          <table:table-cell office:value-type="float" office:value="5.97" calcext:value-type="float">
            <text:p>5.97</text:p>
          </table:table-cell>
          <table:table-cell/>
          <table:table-cell office:value-type="float" office:value="3.39" calcext:value-type="float">
            <text:p>3.3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40/1.664/1.830/0.13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19M33S" calcext:value-type="time">
            <text:p>07:19:3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24" calcext:value-type="percentage">
            <text:p>42.4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365" calcext:value-type="percentage">
            <text:p>23.6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3.69" calcext:value-type="float">
            <text:p>3.69</text:p>
          </table:table-cell>
          <table:table-cell/>
          <table:table-cell office:value-type="float" office:value="5.88" calcext:value-type="float">
            <text:p>5.88</text:p>
          </table:table-cell>
          <table:table-cell/>
          <table:table-cell office:value-type="float" office:value="3.37" calcext:value-type="float">
            <text:p>3.3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24/1.787/1.958/0.11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19M38S" calcext:value-type="time">
            <text:p>07:19:3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36" calcext:value-type="percentage">
            <text:p>43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366" calcext:value-type="percentage">
            <text:p>23.6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3.63" calcext:value-type="float">
            <text:p>3.63</text:p>
          </table:table-cell>
          <table:table-cell/>
          <table:table-cell office:value-type="float" office:value="5.83" calcext:value-type="float">
            <text:p>5.83</text:p>
          </table:table-cell>
          <table:table-cell/>
          <table:table-cell office:value-type="float" office:value="3.37" calcext:value-type="float">
            <text:p>3.3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54/1.578/1.809/0.15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19M43S" calcext:value-type="time">
            <text:p>07:19:4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353" calcext:value-type="percentage">
            <text:p>35.3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366" calcext:value-type="percentage">
            <text:p>23.6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3.34" calcext:value-type="float">
            <text:p>3.34</text:p>
          </table:table-cell>
          <table:table-cell/>
          <table:table-cell office:value-type="float" office:value="5.73" calcext:value-type="float">
            <text:p>5.73</text:p>
          </table:table-cell>
          <table:table-cell/>
          <table:table-cell office:value-type="float" office:value="3.35" calcext:value-type="float">
            <text:p>3.3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319" calcext:value-type="float">
            <text:p>31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55/1.626/1.727/0.13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19M48S" calcext:value-type="time">
            <text:p>07:19:4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281" calcext:value-type="percentage">
            <text:p>28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366" calcext:value-type="percentage">
            <text:p>23.6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3.07" calcext:value-type="float">
            <text:p>3.07</text:p>
          </table:table-cell>
          <table:table-cell/>
          <table:table-cell office:value-type="float" office:value="5.64" calcext:value-type="float">
            <text:p>5.64</text:p>
          </table:table-cell>
          <table:table-cell/>
          <table:table-cell office:value-type="float" office:value="3.34" calcext:value-type="float">
            <text:p>3.3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322" calcext:value-type="float">
            <text:p>322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02/1.771/1.873/0.09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19M54S" calcext:value-type="time">
            <text:p>07:19:5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917" calcext:value-type="percentage">
            <text:p>91.7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369" calcext:value-type="percentage">
            <text:p>23.6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83" calcext:value-type="float">
            <text:p>2.83</text:p>
          </table:table-cell>
          <table:table-cell/>
          <table:table-cell office:value-type="float" office:value="5.54" calcext:value-type="float">
            <text:p>5.54</text:p>
          </table:table-cell>
          <table:table-cell/>
          <table:table-cell office:value-type="float" office:value="3.32" calcext:value-type="float">
            <text:p>3.3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58/1.609/1.805/0.12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19M59S" calcext:value-type="time">
            <text:p>07:19:5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294" calcext:value-type="percentage">
            <text:p>29.4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368" calcext:value-type="percentage">
            <text:p>23.6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76" calcext:value-type="float">
            <text:p>2.76</text:p>
          </table:table-cell>
          <table:table-cell/>
          <table:table-cell office:value-type="float" office:value="5.48" calcext:value-type="float">
            <text:p>5.48</text:p>
          </table:table-cell>
          <table:table-cell/>
          <table:table-cell office:value-type="float" office:value="3.31" calcext:value-type="float">
            <text:p>3.3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319" calcext:value-type="float">
            <text:p>31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17/1.827/1.922/0.07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20M04S" calcext:value-type="time">
            <text:p>07:20:0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41" calcext:value-type="percentage">
            <text:p>44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368" calcext:value-type="percentage">
            <text:p>23.6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54" calcext:value-type="float">
            <text:p>2.54</text:p>
          </table:table-cell>
          <table:table-cell/>
          <table:table-cell office:value-type="float" office:value="5.39" calcext:value-type="float">
            <text:p>5.39</text:p>
          </table:table-cell>
          <table:table-cell/>
          <table:table-cell office:value-type="float" office:value="3.29" calcext:value-type="float">
            <text:p>3.2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28/1.612/2.085/0.26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20M09S" calcext:value-type="time">
            <text:p>07:20:0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281" calcext:value-type="percentage">
            <text:p>28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369" calcext:value-type="percentage">
            <text:p>23.6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5.33" calcext:value-type="float">
            <text:p>5.33</text:p>
          </table:table-cell>
          <table:table-cell/>
          <table:table-cell office:value-type="float" office:value="3.28" calcext:value-type="float">
            <text:p>3.2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77/1.695/1.894/0.12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20M15S" calcext:value-type="time">
            <text:p>07:20:1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242" calcext:value-type="percentage">
            <text:p>24.2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369" calcext:value-type="percentage">
            <text:p>23.6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46" calcext:value-type="float">
            <text:p>2.46</text:p>
          </table:table-cell>
          <table:table-cell/>
          <table:table-cell office:value-type="float" office:value="5.28" calcext:value-type="float">
            <text:p>5.28</text:p>
          </table:table-cell>
          <table:table-cell/>
          <table:table-cell office:value-type="float" office:value="3.28" calcext:value-type="float">
            <text:p>3.2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22/1.674/1.882/0.13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20M20S" calcext:value-type="time">
            <text:p>07:20:2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735" calcext:value-type="percentage">
            <text:p>73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369" calcext:value-type="percentage">
            <text:p>23.6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26" calcext:value-type="float">
            <text:p>2.26</text:p>
          </table:table-cell>
          <table:table-cell/>
          <table:table-cell office:value-type="float" office:value="5.19" calcext:value-type="float">
            <text:p>5.19</text:p>
          </table:table-cell>
          <table:table-cell/>
          <table:table-cell office:value-type="float" office:value="3.26" calcext:value-type="float">
            <text:p>3.2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42/1.716/1.854/0.10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20M25S" calcext:value-type="time">
            <text:p>07:20:2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194" calcext:value-type="percentage">
            <text:p>19.4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369" calcext:value-type="percentage">
            <text:p>23.6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08" calcext:value-type="float">
            <text:p>2.08</text:p>
          </table:table-cell>
          <table:table-cell/>
          <table:table-cell office:value-type="float" office:value="5.1" calcext:value-type="float">
            <text:p>5.1</text:p>
          </table:table-cell>
          <table:table-cell/>
          <table:table-cell office:value-type="float" office:value="3.24" calcext:value-type="float">
            <text:p>3.2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33/1.732/1.912/0.17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20M30S" calcext:value-type="time">
            <text:p>07:20:3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29" calcext:value-type="percentage">
            <text:p>42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369" calcext:value-type="percentage">
            <text:p>23.6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6" calcext:value-type="float">
            <text:p>3.36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99" calcext:value-type="float">
            <text:p>1.99</text:p>
          </table:table-cell>
          <table:table-cell/>
          <table:table-cell office:value-type="float" office:value="5.04" calcext:value-type="float">
            <text:p>5.04</text:p>
          </table:table-cell>
          <table:table-cell/>
          <table:table-cell office:value-type="float" office:value="3.23" calcext:value-type="float">
            <text:p>3.2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6</text:p>
          </table:table-cell>
          <table:table-cell office:value-type="string" calcext:value-type="string">
            <text:p>Write:8.2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81/1.696/1.941/0.18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formula="of:=AVERAGE([.E1:.E28])" office:value-type="percentage" office:value="0.504928571428571" calcext:value-type="percentage">
            <text:p>50.49%</text:p>
          </table:table-cell>
          <table:table-cell table:number-columns-repeated="4"/>
          <table:table-cell table:formula="of:=AVERAGE([.J1:.J28])" office:value-type="percentage" office:value="0.235817857142857" calcext:value-type="percentage">
            <text:p>23.58%</text:p>
          </table:table-cell>
          <table:table-cell table:number-columns-repeated="6"/>
          <table:table-cell table:formula="of:=AVERAGE([.Q1:.Q28])" office:value-type="float" office:value="3.36" calcext:value-type="float">
            <text:p>3.36</text:p>
          </table:table-cell>
          <table:table-cell table:formula="of:=AVERAGE([.R1:.R28])" office:value-type="float" office:value="8.27857142857143" calcext:value-type="float">
            <text:p>8.27857142857143</text:p>
          </table:table-cell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14T19:28:14.980086084</dc:date>
    <meta:editing-duration>PT51S</meta:editing-duration>
    <meta:editing-cycles>1</meta:editing-cycles>
    <meta:document-statistic meta:table-count="1" meta:cell-count="1012" meta:object-count="0"/>
    <meta:generator>LibreOffice/6.4.7.2$Linux_X86_64 LibreOffice_project/40$Build-2</meta:generator>
  </office:meta>
</office:document-meta>
</file>