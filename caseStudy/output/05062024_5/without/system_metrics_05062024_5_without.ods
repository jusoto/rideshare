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9252in"/>
    </style:style>
    <style:style style:name="co14" style:family="table-column">
      <style:table-column-properties fo:break-before="auto" style:column-width="0.6783in"/>
    </style:style>
    <style:style style:name="co15" style:family="table-column">
      <style:table-column-properties fo:break-before="auto" style:column-width="0.6035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7535in"/>
    </style:style>
    <style:style style:name="co19" style:family="table-column">
      <style:table-column-properties fo:break-before="auto" style:column-width="1.8902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order="0.74pt solid #000000"/>
    </style:style>
    <style:style style:name="ce2" style:family="table-cell" style:parent-style-name="Default" style:data-style-name="N4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1">
      <style:table-cell-properties fo:border="0.74pt solid #000000"/>
    </style:style>
    <style:style style:name="ce5" style:family="table-cell" style:parent-style-name="Default" style:data-style-name="N11"/>
    <style:style style:name="ce6" style:family="table-cell" style:parent-style-name="Default" style:data-style-name="N2">
      <style:table-cell-properties fo:border="0.74pt solid #000000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ystem_metrics_05062024_5_with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number-columns-repeated="2" table:default-cell-style-name="ce7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7" table:number-columns-repeated="5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column table:style-name="co19" table:number-columns-repeated="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6" table:default-cell-style-name="Default"/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09M42S" calcext:value-type="time">
            <text:p>06:09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06" calcext:value-type="percentage">
            <text:p>2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279" calcext:value-type="percentage">
            <text:p>22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09M50S" calcext:value-type="time">
            <text:p>06:09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3" calcext:value-type="percentage">
            <text:p>23.3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09M58S" calcext:value-type="time">
            <text:p>06:09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97" calcext:value-type="percentage">
            <text:p>69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35" calcext:value-type="percentage">
            <text:p>23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0M06S" calcext:value-type="time">
            <text:p>06:10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71" calcext:value-type="percentage">
            <text:p>3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35" calcext:value-type="percentage">
            <text:p>23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0M14S" calcext:value-type="time">
            <text:p>06:10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53" calcext:value-type="percentage">
            <text:p>35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35" calcext:value-type="percentage">
            <text:p>23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0M21S" calcext:value-type="time">
            <text:p>06:10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405" calcext:value-type="percentage">
            <text:p>40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34" calcext:value-type="percentage">
            <text:p>23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0M29S" calcext:value-type="time">
            <text:p>06:10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24" calcext:value-type="percentage">
            <text:p>32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36" calcext:value-type="percentage">
            <text:p>23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0M37S" calcext:value-type="time">
            <text:p>06:10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12" calcext:value-type="percentage">
            <text:p>3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38" calcext:value-type="percentage">
            <text:p>23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0M45S" calcext:value-type="time">
            <text:p>06:10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12" calcext:value-type="percentage">
            <text:p>3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41" calcext:value-type="percentage">
            <text:p>23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0M53S" calcext:value-type="time">
            <text:p>06:10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8" calcext:value-type="percentage">
            <text:p>53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44" calcext:value-type="percentage">
            <text:p>23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01S" calcext:value-type="time">
            <text:p>06:11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03" calcext:value-type="percentage">
            <text:p>30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47" calcext:value-type="percentage">
            <text:p>23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09S" calcext:value-type="time">
            <text:p>06:11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419" calcext:value-type="percentage">
            <text:p>4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46" calcext:value-type="percentage">
            <text:p>23.4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17S" calcext:value-type="time">
            <text:p>06:11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455" calcext:value-type="percentage">
            <text:p>45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49" calcext:value-type="percentage">
            <text:p>23.4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24S" calcext:value-type="time">
            <text:p>06:11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12" calcext:value-type="percentage">
            <text:p>3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53" calcext:value-type="percentage">
            <text:p>23.5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32S" calcext:value-type="time">
            <text:p>06:11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94" calcext:value-type="percentage">
            <text:p>2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52" calcext:value-type="percentage">
            <text:p>23.5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40S" calcext:value-type="time">
            <text:p>06:11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4" calcext:value-type="percentage">
            <text:p>4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57" calcext:value-type="percentage">
            <text:p>23.5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48S" calcext:value-type="time">
            <text:p>06:11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43" calcext:value-type="percentage">
            <text:p>3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57" calcext:value-type="percentage">
            <text:p>23.5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1M56S" calcext:value-type="time">
            <text:p>06:11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88" calcext:value-type="percentage">
            <text:p>1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59" calcext:value-type="percentage">
            <text:p>23.5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2M04S" calcext:value-type="time">
            <text:p>06:12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6" calcext:value-type="percentage">
            <text:p>23.6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2M12S" calcext:value-type="time">
            <text:p>06:12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71" calcext:value-type="percentage">
            <text:p>3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61" calcext:value-type="percentage">
            <text:p>23.6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2M19S" calcext:value-type="time">
            <text:p>06:12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26" calcext:value-type="percentage">
            <text:p>22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62" calcext:value-type="percentage">
            <text:p>23.6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1:.E21])" office:value-type="percentage" office:value="0.386809523809524" calcext:value-type="percentage">
            <text:p>38.68%</text:p>
          </table:table-cell>
          <table:table-cell table:style-name="ce3" table:number-columns-repeated="3"/>
          <table:table-cell table:style-name="ce4" table:formula="of:=AVERAGE([.I1:.I21])" office:value-type="percentage" office:value="0.234333333333333" calcext:value-type="percentage">
            <text:p>23.43%</text:p>
          </table:table-cell>
          <table:table-cell table:style-name="ce3" table:number-columns-repeated="6"/>
          <table:table-cell table:style-name="ce6" table:formula="of:=AVERAGE([.P1:.P21])" office:value-type="float" office:value="3.38" calcext:value-type="float">
            <text:p>3.38</text:p>
          </table:table-cell>
          <table:table-cell table:style-name="ce6" table:formula="of:=AVERAGE([.Q1:.Q21])" office:value-type="float" office:value="8.9" calcext:value-type="float">
            <text:p>8.90</text:p>
          </table:table-cell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2M28S" calcext:value-type="time">
            <text:p>06:12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09" calcext:value-type="percentage">
            <text:p>90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77" calcext:value-type="percentage">
            <text:p>23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2M37S" calcext:value-type="time">
            <text:p>06:12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12" calcext:value-type="percentage">
            <text:p>8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" calcext:value-type="percentage">
            <text:p>23.8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2M45S" calcext:value-type="time">
            <text:p>06:12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4" calcext:value-type="percentage">
            <text:p>94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5" calcext:value-type="percentage">
            <text:p>23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2M54S" calcext:value-type="time">
            <text:p>06:12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4" calcext:value-type="percentage">
            <text:p>94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9" calcext:value-type="percentage">
            <text:p>23.8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3M02S" calcext:value-type="time">
            <text:p>06:13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29" calcext:value-type="percentage">
            <text:p>8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8" calcext:value-type="percentage">
            <text:p>23.8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3M11S" calcext:value-type="time">
            <text:p>06:13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4" calcext:value-type="percentage">
            <text:p>97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2" calcext:value-type="percentage">
            <text:p>23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3M19S" calcext:value-type="time">
            <text:p>06:13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2" calcext:value-type="percentage">
            <text:p>97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9" calcext:value-type="percentage">
            <text:p>23.8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3M28S" calcext:value-type="time">
            <text:p>06:13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6" calcext:value-type="percentage">
            <text:p>23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3M36S" calcext:value-type="time">
            <text:p>06:13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42" calcext:value-type="percentage">
            <text:p>84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8" calcext:value-type="percentage">
            <text:p>23.8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3M44S" calcext:value-type="time">
            <text:p>06:13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4" calcext:value-type="percentage">
            <text:p>97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9" calcext:value-type="percentage">
            <text:p>23.8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3M52S" calcext:value-type="time">
            <text:p>06:13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1" calcext:value-type="percentage">
            <text:p>9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7" calcext:value-type="percentage">
            <text:p>23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01S" calcext:value-type="time">
            <text:p>06:14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7" calcext:value-type="percentage">
            <text:p>23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09S" calcext:value-type="time">
            <text:p>06:14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3" calcext:value-type="percentage">
            <text:p>9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9" calcext:value-type="percentage">
            <text:p>23.8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17S" calcext:value-type="time">
            <text:p>06:14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5" calcext:value-type="percentage">
            <text:p>23.9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26S" calcext:value-type="time">
            <text:p>06:14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4" calcext:value-type="percentage">
            <text:p>94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6" calcext:value-type="percentage">
            <text:p>23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34S" calcext:value-type="time">
            <text:p>06:14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29" calcext:value-type="percentage">
            <text:p>8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1" calcext:value-type="percentage">
            <text:p>23.9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43S" calcext:value-type="time">
            <text:p>06:14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6" calcext:value-type="percentage">
            <text:p>94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7" calcext:value-type="percentage">
            <text:p>23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51S" calcext:value-type="time">
            <text:p>06:14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3" calcext:value-type="percentage">
            <text:p>9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5" calcext:value-type="percentage">
            <text:p>23.9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24:.E41])" office:value-type="percentage" office:value="0.922444444444444" calcext:value-type="percentage">
            <text:p>92.24%</text:p>
          </table:table-cell>
          <table:table-cell table:style-name="ce3" table:number-columns-repeated="3"/>
          <table:table-cell table:style-name="ce4" table:formula="of:=AVERAGE([.I24:.I41])" office:value-type="percentage" office:value="0.238722222222222" calcext:value-type="percentage">
            <text:p>23.87%</text:p>
          </table:table-cell>
          <table:table-cell table:style-name="ce3" table:number-columns-repeated="6"/>
          <table:table-cell table:style-name="ce6" table:formula="of:=AVERAGE([.P24:.P41])" office:value-type="float" office:value="3.38388888888889" calcext:value-type="float">
            <text:p>3.38</text:p>
          </table:table-cell>
          <table:table-cell table:style-name="ce6" table:formula="of:=AVERAGE([.Q24:.Q41])" office:value-type="float" office:value="8.9" calcext:value-type="float">
            <text:p>8.90</text:p>
          </table:table-cell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4M59S" calcext:value-type="time">
            <text:p>06:14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3" calcext:value-type="percentage">
            <text:p>97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7" calcext:value-type="percentage">
            <text:p>23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5M07S" calcext:value-type="time">
            <text:p>06:15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79" calcext:value-type="percentage">
            <text:p>87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7" calcext:value-type="percentage">
            <text:p>23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5M15S" calcext:value-type="time">
            <text:p>06:15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5" calcext:value-type="percentage">
            <text:p>23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6" calcext:value-type="percentage">
            <text:p>23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5M23S" calcext:value-type="time">
            <text:p>06:15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5" calcext:value-type="percentage">
            <text:p>1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9" calcext:value-type="percentage">
            <text:p>23.8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5M31S" calcext:value-type="time">
            <text:p>06:15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1" calcext:value-type="percentage">
            <text:p>12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" calcext:value-type="percentage">
            <text:p>23.9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5M39S" calcext:value-type="time">
            <text:p>06:15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438" calcext:value-type="percentage">
            <text:p>43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" calcext:value-type="percentage">
            <text:p>23.9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5M46S" calcext:value-type="time">
            <text:p>06:15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56" calcext:value-type="percentage">
            <text:p>1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1" calcext:value-type="percentage">
            <text:p>23.9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5M54S" calcext:value-type="time">
            <text:p>06:15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2" calcext:value-type="percentage">
            <text:p>2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9" calcext:value-type="percentage">
            <text:p>23.8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02S" calcext:value-type="time">
            <text:p>06:16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9" calcext:value-type="percentage">
            <text:p>1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7" calcext:value-type="percentage">
            <text:p>23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10S" calcext:value-type="time">
            <text:p>06:16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9" calcext:value-type="percentage">
            <text:p>2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6" calcext:value-type="percentage">
            <text:p>23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18S" calcext:value-type="time">
            <text:p>06:16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88" calcext:value-type="percentage">
            <text:p>1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5" calcext:value-type="percentage">
            <text:p>23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26S" calcext:value-type="time">
            <text:p>06:16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5" calcext:value-type="percentage">
            <text:p>23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33S" calcext:value-type="time">
            <text:p>06:16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06" calcext:value-type="percentage">
            <text:p>2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85" calcext:value-type="percentage">
            <text:p>23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44:.E56])" office:value-type="percentage" office:value="0.346076923076923" calcext:value-type="percentage">
            <text:p>34.61%</text:p>
          </table:table-cell>
          <table:table-cell table:style-name="ce3" table:number-columns-repeated="3"/>
          <table:table-cell table:style-name="ce4" table:formula="of:=AVERAGE([.I44:.I56])" office:value-type="percentage" office:value="0.238746153846154" calcext:value-type="percentage">
            <text:p>23.87%</text:p>
          </table:table-cell>
          <table:table-cell table:style-name="ce3" table:number-columns-repeated="6"/>
          <table:table-cell table:style-name="ce6" table:formula="of:=AVERAGE([.P44:.P56])" office:value-type="float" office:value="3.39" calcext:value-type="float">
            <text:p>3.39</text:p>
          </table:table-cell>
          <table:table-cell table:style-name="ce6" table:formula="of:=AVERAGE([.Q44:.Q56])" office:value-type="float" office:value="8.9" calcext:value-type="float">
            <text:p>8.90</text:p>
          </table:table-cell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42S" calcext:value-type="time">
            <text:p>06:16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01" calcext:value-type="percentage">
            <text:p>24.0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51S" calcext:value-type="time">
            <text:p>06:16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03" calcext:value-type="percentage">
            <text:p>24.0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6M59S" calcext:value-type="time">
            <text:p>06:16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95" calcext:value-type="percentage">
            <text:p>89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6" calcext:value-type="percentage">
            <text:p>23.9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7M08S" calcext:value-type="time">
            <text:p>06:17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01" calcext:value-type="percentage">
            <text:p>24.0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7M16S" calcext:value-type="time">
            <text:p>06:17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6" calcext:value-type="percentage">
            <text:p>8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99" calcext:value-type="percentage">
            <text:p>23.9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7M24S" calcext:value-type="time">
            <text:p>06:17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" calcext:value-type="percentage">
            <text:p>24.0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1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7M32S" calcext:value-type="time">
            <text:p>06:17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2" calcext:value-type="percentage">
            <text:p>88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06" calcext:value-type="percentage">
            <text:p>24.0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7M40S" calcext:value-type="time">
            <text:p>06:17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92" calcext:value-type="percentage">
            <text:p>89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08" calcext:value-type="percentage">
            <text:p>24.0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7M49S" calcext:value-type="time">
            <text:p>06:17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42" calcext:value-type="percentage">
            <text:p>84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" calcext:value-type="percentage">
            <text:p>24.1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7M57S" calcext:value-type="time">
            <text:p>06:17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61" calcext:value-type="percentage">
            <text:p>86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" calcext:value-type="percentage">
            <text:p>24.1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8M05S" calcext:value-type="time">
            <text:p>06:18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61" calcext:value-type="percentage">
            <text:p>86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4" calcext:value-type="percentage">
            <text:p>24.1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8M13S" calcext:value-type="time">
            <text:p>06:18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48" calcext:value-type="percentage">
            <text:p>8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4" calcext:value-type="percentage">
            <text:p>24.1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8M21S" calcext:value-type="time">
            <text:p>06:18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4" calcext:value-type="percentage">
            <text:p>97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9" calcext:value-type="percentage">
            <text:p>24.1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8M29S" calcext:value-type="time">
            <text:p>06:18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9" calcext:value-type="percentage">
            <text:p>9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8" calcext:value-type="percentage">
            <text:p>24.1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8M37S" calcext:value-type="time">
            <text:p>06:18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4" calcext:value-type="percentage">
            <text:p>94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9" calcext:value-type="percentage">
            <text:p>24.1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8M45S" calcext:value-type="time">
            <text:p>06:18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6" calcext:value-type="percentage">
            <text:p>8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1" calcext:value-type="percentage">
            <text:p>24.2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8M53S" calcext:value-type="time">
            <text:p>06:18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94" calcext:value-type="percentage">
            <text:p>7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8" calcext:value-type="percentage">
            <text:p>24.1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01S" calcext:value-type="time">
            <text:p>06:19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1" calcext:value-type="percentage">
            <text:p>71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9" calcext:value-type="percentage">
            <text:p>24.1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09S" calcext:value-type="time">
            <text:p>06:19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94" calcext:value-type="percentage">
            <text:p>7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6" calcext:value-type="percentage">
            <text:p>24.1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17S" calcext:value-type="time">
            <text:p>06:19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68" calcext:value-type="percentage">
            <text:p>86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3" calcext:value-type="percentage">
            <text:p>24.2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25S" calcext:value-type="time">
            <text:p>06:19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4" calcext:value-type="percentage">
            <text:p>24.2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33S" calcext:value-type="time">
            <text:p>06:19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48" calcext:value-type="percentage">
            <text:p>8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19" calcext:value-type="percentage">
            <text:p>24.1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41S" calcext:value-type="time">
            <text:p>06:19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" calcext:value-type="percentage">
            <text:p>8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" calcext:value-type="percentage">
            <text:p>24.2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49S" calcext:value-type="time">
            <text:p>06:19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5" calcext:value-type="percentage">
            <text:p>24.2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19M57S" calcext:value-type="time">
            <text:p>06:19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18" calcext:value-type="percentage">
            <text:p>8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4" calcext:value-type="percentage">
            <text:p>24.2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0M05S" calcext:value-type="time">
            <text:p>06:20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78" calcext:value-type="percentage">
            <text:p>77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4" calcext:value-type="percentage">
            <text:p>24.2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0M13S" calcext:value-type="time">
            <text:p>06:20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5" calcext:value-type="percentage">
            <text:p>24.2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0M21S" calcext:value-type="time">
            <text:p>06:20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65" calcext:value-type="percentage">
            <text:p>76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4" calcext:value-type="percentage">
            <text:p>24.2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0M29S" calcext:value-type="time">
            <text:p>06:20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9" calcext:value-type="percentage">
            <text:p>7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7" calcext:value-type="percentage">
            <text:p>24.2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0M37S" calcext:value-type="time">
            <text:p>06:20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06" calcext:value-type="percentage">
            <text:p>7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6" calcext:value-type="percentage">
            <text:p>24.2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0M45S" calcext:value-type="time">
            <text:p>06:20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75" calcext:value-type="percentage">
            <text:p>87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7" calcext:value-type="percentage">
            <text:p>24.2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0M53S" calcext:value-type="time">
            <text:p>06:20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94" calcext:value-type="percentage">
            <text:p>7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3" calcext:value-type="percentage">
            <text:p>24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01S" calcext:value-type="time">
            <text:p>06:21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64" calcext:value-type="percentage">
            <text:p>86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" calcext:value-type="percentage">
            <text:p>24.3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09S" calcext:value-type="time">
            <text:p>06:21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7" calcext:value-type="percentage">
            <text:p>72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" calcext:value-type="percentage">
            <text:p>24.3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17S" calcext:value-type="time">
            <text:p>06:21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71" calcext:value-type="percentage">
            <text:p>7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3" calcext:value-type="percentage">
            <text:p>24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25S" calcext:value-type="time">
            <text:p>06:21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35" calcext:value-type="percentage">
            <text:p>73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2" calcext:value-type="percentage">
            <text:p>24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33S" calcext:value-type="time">
            <text:p>06:21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" calcext:value-type="percentage">
            <text:p>24.3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40S" calcext:value-type="time">
            <text:p>06:21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2" calcext:value-type="percentage">
            <text:p>97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6" calcext:value-type="percentage">
            <text:p>24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48S" calcext:value-type="time">
            <text:p>06:21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8" calcext:value-type="percentage">
            <text:p>7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" calcext:value-type="percentage">
            <text:p>24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1M56S" calcext:value-type="time">
            <text:p>06:21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12" calcext:value-type="percentage">
            <text:p>8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2" calcext:value-type="percentage">
            <text:p>24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2M04S" calcext:value-type="time">
            <text:p>06:22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8" calcext:value-type="percentage">
            <text:p>75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1" calcext:value-type="percentage">
            <text:p>24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2M12S" calcext:value-type="time">
            <text:p>06:22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71" calcext:value-type="percentage">
            <text:p>7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6" calcext:value-type="percentage">
            <text:p>24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2M20S" calcext:value-type="time">
            <text:p>06:22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24" calcext:value-type="percentage">
            <text:p>82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38" calcext:value-type="percentage">
            <text:p>24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2M28S" calcext:value-type="time">
            <text:p>06:22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06" calcext:value-type="percentage">
            <text:p>8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5" calcext:value-type="percentage">
            <text:p>24.4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2M36S" calcext:value-type="time">
            <text:p>06:22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09" calcext:value-type="percentage">
            <text:p>90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2" calcext:value-type="percentage">
            <text:p>24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2M44S" calcext:value-type="time">
            <text:p>06:22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4" calcext:value-type="percentage">
            <text:p>24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2M52S" calcext:value-type="time">
            <text:p>06:22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1" calcext:value-type="percentage">
            <text:p>24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00S" calcext:value-type="time">
            <text:p>06:23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94" calcext:value-type="percentage">
            <text:p>7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4" calcext:value-type="percentage">
            <text:p>24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08S" calcext:value-type="time">
            <text:p>06:23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71" calcext:value-type="percentage">
            <text:p>7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1" calcext:value-type="percentage">
            <text:p>24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16S" calcext:value-type="time">
            <text:p>06:23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06" calcext:value-type="percentage">
            <text:p>8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4" calcext:value-type="percentage">
            <text:p>24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24S" calcext:value-type="time">
            <text:p>06:23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" calcext:value-type="percentage">
            <text:p>24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31S" calcext:value-type="time">
            <text:p>06:23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1" calcext:value-type="percentage">
            <text:p>9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2" calcext:value-type="percentage">
            <text:p>24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39S" calcext:value-type="time">
            <text:p>06:23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4" calcext:value-type="percentage">
            <text:p>78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5" calcext:value-type="percentage">
            <text:p>24.4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47S" calcext:value-type="time">
            <text:p>06:23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03" calcext:value-type="percentage">
            <text:p>70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" calcext:value-type="percentage">
            <text:p>24.5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3M55S" calcext:value-type="time">
            <text:p>06:23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4" calcext:value-type="percentage">
            <text:p>78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6" calcext:value-type="percentage">
            <text:p>24.4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03S" calcext:value-type="time">
            <text:p>06:24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" calcext:value-type="percentage">
            <text:p>75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1" calcext:value-type="percentage">
            <text:p>24.5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11S" calcext:value-type="time">
            <text:p>06:24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8" calcext:value-type="percentage">
            <text:p>7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2" calcext:value-type="percentage">
            <text:p>24.5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19S" calcext:value-type="time">
            <text:p>06:24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7" calcext:value-type="percentage">
            <text:p>24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27S" calcext:value-type="time">
            <text:p>06:24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6" calcext:value-type="percentage">
            <text:p>24.5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35S" calcext:value-type="time">
            <text:p>06:24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1" calcext:value-type="percentage">
            <text:p>24.5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43S" calcext:value-type="time">
            <text:p>06:24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53" calcext:value-type="percentage">
            <text:p>85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2" calcext:value-type="percentage">
            <text:p>24.5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51S" calcext:value-type="time">
            <text:p>06:24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9" calcext:value-type="percentage">
            <text:p>7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49" calcext:value-type="percentage">
            <text:p>24.4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4M59S" calcext:value-type="time">
            <text:p>06:24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35" calcext:value-type="percentage">
            <text:p>73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" calcext:value-type="percentage">
            <text:p>24.6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5M06S" calcext:value-type="time">
            <text:p>06:25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3" calcext:value-type="percentage">
            <text:p>24.5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5M14S" calcext:value-type="time">
            <text:p>06:25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8" calcext:value-type="percentage">
            <text:p>6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4" calcext:value-type="percentage">
            <text:p>24.5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5M22S" calcext:value-type="time">
            <text:p>06:25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06" calcext:value-type="percentage">
            <text:p>8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8" calcext:value-type="percentage">
            <text:p>24.5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5M30S" calcext:value-type="time">
            <text:p>06:25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43" calcext:value-type="percentage">
            <text:p>7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8" calcext:value-type="percentage">
            <text:p>24.5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5M38S" calcext:value-type="time">
            <text:p>06:25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8" calcext:value-type="percentage">
            <text:p>24.5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5M46S" calcext:value-type="time">
            <text:p>06:25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71" calcext:value-type="percentage">
            <text:p>7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" calcext:value-type="percentage">
            <text:p>24.6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5M54S" calcext:value-type="time">
            <text:p>06:25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1" calcext:value-type="percentage">
            <text:p>78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9" calcext:value-type="percentage">
            <text:p>24.5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02S" calcext:value-type="time">
            <text:p>06:26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2" calcext:value-type="percentage">
            <text:p>24.6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10S" calcext:value-type="time">
            <text:p>06:26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1" calcext:value-type="percentage">
            <text:p>24.6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18S" calcext:value-type="time">
            <text:p>06:26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9" calcext:value-type="percentage">
            <text:p>7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4" calcext:value-type="percentage">
            <text:p>24.6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25S" calcext:value-type="time">
            <text:p>06:26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6" calcext:value-type="percentage">
            <text:p>8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6" calcext:value-type="percentage">
            <text:p>24.6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33S" calcext:value-type="time">
            <text:p>06:26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75" calcext:value-type="percentage">
            <text:p>87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59" calcext:value-type="percentage">
            <text:p>24.5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41S" calcext:value-type="time">
            <text:p>06:26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3" calcext:value-type="percentage">
            <text:p>24.6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49S" calcext:value-type="time">
            <text:p>06:26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" calcext:value-type="percentage">
            <text:p>24.7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6M57S" calcext:value-type="time">
            <text:p>06:26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94" calcext:value-type="percentage">
            <text:p>7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4" calcext:value-type="percentage">
            <text:p>24.6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7M05S" calcext:value-type="time">
            <text:p>06:27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4" calcext:value-type="percentage">
            <text:p>24.6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7M13S" calcext:value-type="time">
            <text:p>06:27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7" calcext:value-type="percentage">
            <text:p>24.6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7M21S" calcext:value-type="time">
            <text:p>06:27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9" calcext:value-type="percentage">
            <text:p>7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6" calcext:value-type="percentage">
            <text:p>24.6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7M29S" calcext:value-type="time">
            <text:p>06:27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4" calcext:value-type="percentage">
            <text:p>24.6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7M37S" calcext:value-type="time">
            <text:p>06:27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03" calcext:value-type="percentage">
            <text:p>70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7" calcext:value-type="percentage">
            <text:p>24.6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7M45S" calcext:value-type="time">
            <text:p>06:27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8" calcext:value-type="percentage">
            <text:p>24.6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7M53S" calcext:value-type="time">
            <text:p>06:27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9" calcext:value-type="percentage">
            <text:p>78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2" calcext:value-type="percentage">
            <text:p>24.7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01S" calcext:value-type="time">
            <text:p>06:28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94" calcext:value-type="percentage">
            <text:p>6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4" calcext:value-type="percentage">
            <text:p>24.7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08S" calcext:value-type="time">
            <text:p>06:28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67" calcext:value-type="percentage">
            <text:p>24.6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16S" calcext:value-type="time">
            <text:p>06:28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53" calcext:value-type="percentage">
            <text:p>85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2" calcext:value-type="percentage">
            <text:p>24.7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24S" calcext:value-type="time">
            <text:p>06:28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94" calcext:value-type="percentage">
            <text:p>7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4" calcext:value-type="percentage">
            <text:p>24.7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32S" calcext:value-type="time">
            <text:p>06:28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" calcext:value-type="percentage">
            <text:p>24.8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40S" calcext:value-type="time">
            <text:p>06:28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8" calcext:value-type="percentage">
            <text:p>75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7" calcext:value-type="percentage">
            <text:p>24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48S" calcext:value-type="time">
            <text:p>06:28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18" calcext:value-type="percentage">
            <text:p>8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6" calcext:value-type="percentage">
            <text:p>24.7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8M56S" calcext:value-type="time">
            <text:p>06:28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7" calcext:value-type="percentage">
            <text:p>24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04S" calcext:value-type="time">
            <text:p>06:29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8" calcext:value-type="percentage">
            <text:p>24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12S" calcext:value-type="time">
            <text:p>06:29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06" calcext:value-type="percentage">
            <text:p>9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9" calcext:value-type="percentage">
            <text:p>24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19S" calcext:value-type="time">
            <text:p>06:29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77" calcext:value-type="percentage">
            <text:p>24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27S" calcext:value-type="time">
            <text:p>06:29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9" calcext:value-type="percentage">
            <text:p>7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5" calcext:value-type="percentage">
            <text:p>24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35S" calcext:value-type="time">
            <text:p>06:29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5" calcext:value-type="percentage">
            <text:p>24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43S" calcext:value-type="time">
            <text:p>06:29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8" calcext:value-type="percentage">
            <text:p>24.8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51S" calcext:value-type="time">
            <text:p>06:29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3" calcext:value-type="percentage">
            <text:p>24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29M59S" calcext:value-type="time">
            <text:p>06:29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35" calcext:value-type="percentage">
            <text:p>73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1" calcext:value-type="percentage">
            <text:p>24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0M07S" calcext:value-type="time">
            <text:p>06:30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" calcext:value-type="percentage">
            <text:p>75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6" calcext:value-type="percentage">
            <text:p>24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0M15S" calcext:value-type="time">
            <text:p>06:30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94" calcext:value-type="percentage">
            <text:p>7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84" calcext:value-type="percentage">
            <text:p>24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0M23S" calcext:value-type="time">
            <text:p>06:30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" calcext:value-type="percentage">
            <text:p>75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98" calcext:value-type="percentage">
            <text:p>24.9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0M31S" calcext:value-type="time">
            <text:p>06:30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8" calcext:value-type="percentage">
            <text:p>25.0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0M39S" calcext:value-type="time">
            <text:p>06:30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06" calcext:value-type="percentage">
            <text:p>7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2" calcext:value-type="percentage">
            <text:p>25.0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0M47S" calcext:value-type="time">
            <text:p>06:30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35" calcext:value-type="percentage">
            <text:p>73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97" calcext:value-type="percentage">
            <text:p>24.9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0M54S" calcext:value-type="time">
            <text:p>06:30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02S" calcext:value-type="time">
            <text:p>06:31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95" calcext:value-type="percentage">
            <text:p>24.9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10S" calcext:value-type="time">
            <text:p>06:31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65" calcext:value-type="percentage">
            <text:p>76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99" calcext:value-type="percentage">
            <text:p>24.9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18S" calcext:value-type="time">
            <text:p>06:31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2" calcext:value-type="percentage">
            <text:p>25.0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26S" calcext:value-type="time">
            <text:p>06:31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34S" calcext:value-type="time">
            <text:p>06:31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97" calcext:value-type="percentage">
            <text:p>24.9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42S" calcext:value-type="time">
            <text:p>06:31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8" calcext:value-type="percentage">
            <text:p>6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98" calcext:value-type="percentage">
            <text:p>24.9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50S" calcext:value-type="time">
            <text:p>06:31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2" calcext:value-type="percentage">
            <text:p>25.0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1M58S" calcext:value-type="time">
            <text:p>06:31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78" calcext:value-type="percentage">
            <text:p>77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4" calcext:value-type="percentage">
            <text:p>25.0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2M06S" calcext:value-type="time">
            <text:p>06:32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4" calcext:value-type="percentage">
            <text:p>25.0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2M13S" calcext:value-type="time">
            <text:p>06:32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7" calcext:value-type="percentage">
            <text:p>72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2" calcext:value-type="percentage">
            <text:p>25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2M21S" calcext:value-type="time">
            <text:p>06:32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6" calcext:value-type="percentage">
            <text:p>25.0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2M29S" calcext:value-type="time">
            <text:p>06:32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7" calcext:value-type="percentage">
            <text:p>25.0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2M37S" calcext:value-type="time">
            <text:p>06:32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5" calcext:value-type="percentage">
            <text:p>25.0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2M45S" calcext:value-type="time">
            <text:p>06:32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2" calcext:value-type="percentage">
            <text:p>25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2M53S" calcext:value-type="time">
            <text:p>06:32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06" calcext:value-type="percentage">
            <text:p>8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1" calcext:value-type="percentage">
            <text:p>25.1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01S" calcext:value-type="time">
            <text:p>06:33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9" calcext:value-type="percentage">
            <text:p>7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09" calcext:value-type="percentage">
            <text:p>25.0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09S" calcext:value-type="time">
            <text:p>06:33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1" calcext:value-type="percentage">
            <text:p>25.1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17S" calcext:value-type="time">
            <text:p>06:33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2" calcext:value-type="percentage">
            <text:p>25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24S" calcext:value-type="time">
            <text:p>06:33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3" calcext:value-type="percentage">
            <text:p>25.1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32S" calcext:value-type="time">
            <text:p>06:33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5" calcext:value-type="percentage">
            <text:p>25.1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40S" calcext:value-type="time">
            <text:p>06:33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9" calcext:value-type="percentage">
            <text:p>64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2" calcext:value-type="percentage">
            <text:p>25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48S" calcext:value-type="time">
            <text:p>06:33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43" calcext:value-type="percentage">
            <text:p>7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4" calcext:value-type="percentage">
            <text:p>25.1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3M56S" calcext:value-type="time">
            <text:p>06:33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2" calcext:value-type="percentage">
            <text:p>97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6" calcext:value-type="percentage">
            <text:p>25.1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04S" calcext:value-type="time">
            <text:p>06:34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4" calcext:value-type="percentage">
            <text:p>25.1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12S" calcext:value-type="time">
            <text:p>06:34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4" calcext:value-type="percentage">
            <text:p>25.1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20S" calcext:value-type="time">
            <text:p>06:34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2" calcext:value-type="percentage">
            <text:p>25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27S" calcext:value-type="time">
            <text:p>06:34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5" calcext:value-type="percentage">
            <text:p>25.1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35S" calcext:value-type="time">
            <text:p>06:34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6" calcext:value-type="percentage">
            <text:p>25.1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43S" calcext:value-type="time">
            <text:p>06:34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16" calcext:value-type="percentage">
            <text:p>25.1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51S" calcext:value-type="time">
            <text:p>06:34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28" calcext:value-type="percentage">
            <text:p>25.2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4M59S" calcext:value-type="time">
            <text:p>06:34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29" calcext:value-type="percentage">
            <text:p>25.2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5M07S" calcext:value-type="time">
            <text:p>06:35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1" calcext:value-type="percentage">
            <text:p>25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5M15S" calcext:value-type="time">
            <text:p>06:35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8" calcext:value-type="percentage">
            <text:p>25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5M22S" calcext:value-type="time">
            <text:p>06:35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7" calcext:value-type="percentage">
            <text:p>67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9" calcext:value-type="percentage">
            <text:p>25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5M30S" calcext:value-type="time">
            <text:p>06:35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9" calcext:value-type="percentage">
            <text:p>25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5M38S" calcext:value-type="time">
            <text:p>06:35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9" calcext:value-type="percentage">
            <text:p>25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5M46S" calcext:value-type="time">
            <text:p>06:35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7" calcext:value-type="percentage">
            <text:p>25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5M54S" calcext:value-type="time">
            <text:p>06:35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95" calcext:value-type="percentage">
            <text:p>89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4" calcext:value-type="percentage">
            <text:p>25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02S" calcext:value-type="time">
            <text:p>06:36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5" calcext:value-type="percentage">
            <text:p>25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10S" calcext:value-type="time">
            <text:p>06:36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5" calcext:value-type="percentage">
            <text:p>25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17S" calcext:value-type="time">
            <text:p>06:36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7" calcext:value-type="percentage">
            <text:p>25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25S" calcext:value-type="time">
            <text:p>06:36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6" calcext:value-type="percentage">
            <text:p>25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33S" calcext:value-type="time">
            <text:p>06:36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06" calcext:value-type="percentage">
            <text:p>7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6" calcext:value-type="percentage">
            <text:p>25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41S" calcext:value-type="time">
            <text:p>06:36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7" calcext:value-type="percentage">
            <text:p>25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49S" calcext:value-type="time">
            <text:p>06:36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8" calcext:value-type="percentage">
            <text:p>5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7" calcext:value-type="percentage">
            <text:p>25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6M57S" calcext:value-type="time">
            <text:p>06:36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1" calcext:value-type="percentage">
            <text:p>61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8" calcext:value-type="percentage">
            <text:p>25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7M05S" calcext:value-type="time">
            <text:p>06:37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8" calcext:value-type="percentage">
            <text:p>25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7M12S" calcext:value-type="time">
            <text:p>06:37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8" calcext:value-type="percentage">
            <text:p>25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7M20S" calcext:value-type="time">
            <text:p>06:37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1" calcext:value-type="percentage">
            <text:p>25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7M28S" calcext:value-type="time">
            <text:p>06:37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9" calcext:value-type="percentage">
            <text:p>25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7M36S" calcext:value-type="time">
            <text:p>06:37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38" calcext:value-type="percentage">
            <text:p>25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7M44S" calcext:value-type="time">
            <text:p>06:37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4" calcext:value-type="percentage">
            <text:p>94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" calcext:value-type="percentage">
            <text:p>25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7M52S" calcext:value-type="time">
            <text:p>06:37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3" calcext:value-type="percentage">
            <text:p>25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00S" calcext:value-type="time">
            <text:p>06:38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2" calcext:value-type="percentage">
            <text:p>25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08S" calcext:value-type="time">
            <text:p>06:38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3" calcext:value-type="percentage">
            <text:p>25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15S" calcext:value-type="time">
            <text:p>06:38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4" calcext:value-type="percentage">
            <text:p>25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23S" calcext:value-type="time">
            <text:p>06:38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7" calcext:value-type="percentage">
            <text:p>25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31S" calcext:value-type="time">
            <text:p>06:38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94" calcext:value-type="percentage">
            <text:p>6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7" calcext:value-type="percentage">
            <text:p>25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39S" calcext:value-type="time">
            <text:p>06:38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29" calcext:value-type="percentage">
            <text:p>5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7" calcext:value-type="percentage">
            <text:p>25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47S" calcext:value-type="time">
            <text:p>06:38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4" calcext:value-type="percentage">
            <text:p>25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8M55S" calcext:value-type="time">
            <text:p>06:38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8" calcext:value-type="percentage">
            <text:p>25.4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03S" calcext:value-type="time">
            <text:p>06:39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9" calcext:value-type="percentage">
            <text:p>25.4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10S" calcext:value-type="time">
            <text:p>06:39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3" calcext:value-type="percentage">
            <text:p>97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8" calcext:value-type="percentage">
            <text:p>25.4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18S" calcext:value-type="time">
            <text:p>06:39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7" calcext:value-type="percentage">
            <text:p>25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26S" calcext:value-type="time">
            <text:p>06:39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7" calcext:value-type="percentage">
            <text:p>67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6" calcext:value-type="percentage">
            <text:p>25.4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style-name="ce3" office:value-type="string" calcext:value-type="string">
            <text:p>PID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34S" calcext:value-type="time">
            <text:p>06:39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6" calcext:value-type="percentage">
            <text:p>25.4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42S" calcext:value-type="time">
            <text:p>06:39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6" calcext:value-type="percentage">
            <text:p>25.4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50S" calcext:value-type="time">
            <text:p>06:39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8" calcext:value-type="percentage">
            <text:p>6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7" calcext:value-type="percentage">
            <text:p>25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39M58S" calcext:value-type="time">
            <text:p>06:39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7" calcext:value-type="percentage">
            <text:p>25.4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0M05S" calcext:value-type="time">
            <text:p>06:40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3" calcext:value-type="percentage">
            <text:p>25.5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0M13S" calcext:value-type="time">
            <text:p>06:40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49" calcext:value-type="percentage">
            <text:p>25.4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0M21S" calcext:value-type="time">
            <text:p>06:40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1" calcext:value-type="percentage">
            <text:p>25.5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0M29S" calcext:value-type="time">
            <text:p>06:40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1" calcext:value-type="percentage">
            <text:p>25.5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0M37S" calcext:value-type="time">
            <text:p>06:40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9" calcext:value-type="percentage">
            <text:p>88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3" calcext:value-type="percentage">
            <text:p>25.5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0M45S" calcext:value-type="time">
            <text:p>06:40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" calcext:value-type="percentage">
            <text:p>25.5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0M53S" calcext:value-type="time">
            <text:p>06:40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1" calcext:value-type="percentage">
            <text:p>25.5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00S" calcext:value-type="time">
            <text:p>06:41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3" calcext:value-type="percentage">
            <text:p>25.5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08S" calcext:value-type="time">
            <text:p>06:41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8" calcext:value-type="percentage">
            <text:p>5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1" calcext:value-type="percentage">
            <text:p>25.5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16S" calcext:value-type="time">
            <text:p>06:41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2" calcext:value-type="percentage">
            <text:p>63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5" calcext:value-type="percentage">
            <text:p>25.5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24S" calcext:value-type="time">
            <text:p>06:41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4" calcext:value-type="percentage">
            <text:p>25.5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32S" calcext:value-type="time">
            <text:p>06:41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1" calcext:value-type="percentage">
            <text:p>58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4" calcext:value-type="percentage">
            <text:p>25.5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4"/>
          <table:table-cell table:style-name="ce3" office:value-type="string" calcext:value-type="string">
            <text:p>PID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40S" calcext:value-type="time">
            <text:p>06:41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2" calcext:value-type="percentage">
            <text:p>25.5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48S" calcext:value-type="time">
            <text:p>06:41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4" calcext:value-type="percentage">
            <text:p>25.5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1M56S" calcext:value-type="time">
            <text:p>06:41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5" calcext:value-type="percentage">
            <text:p>25.5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03S" calcext:value-type="time">
            <text:p>06:42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43" calcext:value-type="percentage">
            <text:p>7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5" calcext:value-type="percentage">
            <text:p>25.5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11S" calcext:value-type="time">
            <text:p>06:42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29" calcext:value-type="percentage">
            <text:p>5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4" calcext:value-type="percentage">
            <text:p>25.5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19S" calcext:value-type="time">
            <text:p>06:42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9" calcext:value-type="percentage">
            <text:p>25.5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27S" calcext:value-type="time">
            <text:p>06:42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8" calcext:value-type="percentage">
            <text:p>25.5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35S" calcext:value-type="time">
            <text:p>06:42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8" calcext:value-type="percentage">
            <text:p>25.5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43S" calcext:value-type="time">
            <text:p>06:42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" calcext:value-type="percentage">
            <text:p>25.6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51S" calcext:value-type="time">
            <text:p>06:42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1" calcext:value-type="percentage">
            <text:p>25.6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2M59S" calcext:value-type="time">
            <text:p>06:42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8" calcext:value-type="percentage">
            <text:p>25.5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3M06S" calcext:value-type="time">
            <text:p>06:43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58" calcext:value-type="percentage">
            <text:p>25.5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3M14S" calcext:value-type="time">
            <text:p>06:43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8" calcext:value-type="percentage">
            <text:p>5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" calcext:value-type="percentage">
            <text:p>25.6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3M22S" calcext:value-type="time">
            <text:p>06:43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3" calcext:value-type="percentage">
            <text:p>25.6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3M30S" calcext:value-type="time">
            <text:p>06:43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3" calcext:value-type="percentage">
            <text:p>25.6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3M38S" calcext:value-type="time">
            <text:p>06:43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37" calcext:value-type="percentage">
            <text:p>73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4" calcext:value-type="percentage">
            <text:p>25.6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4"/>
          <table:table-cell table:style-name="ce3" office:value-type="string" calcext:value-type="string">
            <text:p>PID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3M46S" calcext:value-type="time">
            <text:p>06:43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5" calcext:value-type="percentage">
            <text:p>25.6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3M54S" calcext:value-type="time">
            <text:p>06:43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8" calcext:value-type="percentage">
            <text:p>25.6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02S" calcext:value-type="time">
            <text:p>06:44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16" calcext:value-type="percentage">
            <text:p>51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2" calcext:value-type="percentage">
            <text:p>25.6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09S" calcext:value-type="time">
            <text:p>06:44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8" calcext:value-type="percentage">
            <text:p>25.6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17S" calcext:value-type="time">
            <text:p>06:44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3" calcext:value-type="percentage">
            <text:p>61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7" calcext:value-type="percentage">
            <text:p>25.6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25S" calcext:value-type="time">
            <text:p>06:44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9" calcext:value-type="percentage">
            <text:p>25.6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33S" calcext:value-type="time">
            <text:p>06:44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7" calcext:value-type="percentage">
            <text:p>91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4" calcext:value-type="percentage">
            <text:p>25.6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41S" calcext:value-type="time">
            <text:p>06:44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5" calcext:value-type="percentage">
            <text:p>25.6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49S" calcext:value-type="time">
            <text:p>06:44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4" calcext:value-type="percentage">
            <text:p>25.6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4M57S" calcext:value-type="time">
            <text:p>06:44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38" calcext:value-type="percentage">
            <text:p>93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5" calcext:value-type="percentage">
            <text:p>25.6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04S" calcext:value-type="time">
            <text:p>06:45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6" calcext:value-type="percentage">
            <text:p>25.6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12S" calcext:value-type="time">
            <text:p>06:45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8" calcext:value-type="percentage">
            <text:p>25.6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20S" calcext:value-type="time">
            <text:p>06:45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8" calcext:value-type="percentage">
            <text:p>75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3" calcext:value-type="percentage">
            <text:p>25.7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28S" calcext:value-type="time">
            <text:p>06:45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3" calcext:value-type="percentage">
            <text:p>25.7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1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36S" calcext:value-type="time">
            <text:p>06:45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3" calcext:value-type="percentage">
            <text:p>61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2" calcext:value-type="percentage">
            <text:p>25.7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44S" calcext:value-type="time">
            <text:p>06:45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" calcext:value-type="percentage">
            <text:p>25.7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4"/>
          <table:table-cell table:style-name="ce3" office:value-type="string" calcext:value-type="string">
            <text:p>PID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52S" calcext:value-type="time">
            <text:p>06:45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" calcext:value-type="percentage">
            <text:p>25.7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5M59S" calcext:value-type="time">
            <text:p>06:45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" calcext:value-type="percentage">
            <text:p>25.7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6M07S" calcext:value-type="time">
            <text:p>06:46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" calcext:value-type="percentage">
            <text:p>25.7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6M15S" calcext:value-type="time">
            <text:p>06:46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7" calcext:value-type="percentage">
            <text:p>25.6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6M23S" calcext:value-type="time">
            <text:p>06:46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2" calcext:value-type="percentage">
            <text:p>72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69" calcext:value-type="percentage">
            <text:p>25.6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6M31S" calcext:value-type="time">
            <text:p>06:46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2" calcext:value-type="percentage">
            <text:p>25.7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6M39S" calcext:value-type="time">
            <text:p>06:46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" calcext:value-type="percentage">
            <text:p>25.7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6M47S" calcext:value-type="time">
            <text:p>06:46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3" calcext:value-type="percentage">
            <text:p>61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1" calcext:value-type="percentage">
            <text:p>25.7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6M54S" calcext:value-type="time">
            <text:p>06:46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1" calcext:value-type="percentage">
            <text:p>58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1" calcext:value-type="percentage">
            <text:p>25.7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02S" calcext:value-type="time">
            <text:p>06:47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6" calcext:value-type="percentage">
            <text:p>25.7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10S" calcext:value-type="time">
            <text:p>06:47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3" calcext:value-type="percentage">
            <text:p>25.7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18S" calcext:value-type="time">
            <text:p>06:47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3" calcext:value-type="percentage">
            <text:p>25.7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26S" calcext:value-type="time">
            <text:p>06:47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6" calcext:value-type="percentage">
            <text:p>25.7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34S" calcext:value-type="time">
            <text:p>06:47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6" calcext:value-type="percentage">
            <text:p>25.7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42S" calcext:value-type="time">
            <text:p>06:47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16" calcext:value-type="percentage">
            <text:p>51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5" calcext:value-type="percentage">
            <text:p>25.7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49S" calcext:value-type="time">
            <text:p>06:47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5" calcext:value-type="percentage">
            <text:p>25.7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4"/>
          <table:table-cell table:style-name="ce3" office:value-type="string" calcext:value-type="string">
            <text:p>PID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7M57S" calcext:value-type="time">
            <text:p>06:47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2" calcext:value-type="percentage">
            <text:p>25.7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8M05S" calcext:value-type="time">
            <text:p>06:48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4" calcext:value-type="percentage">
            <text:p>25.7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8M13S" calcext:value-type="time">
            <text:p>06:48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8M21S" calcext:value-type="time">
            <text:p>06:48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7" calcext:value-type="percentage">
            <text:p>25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8M29S" calcext:value-type="time">
            <text:p>06:48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8M36S" calcext:value-type="time">
            <text:p>06:48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3" calcext:value-type="percentage">
            <text:p>97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7" calcext:value-type="percentage">
            <text:p>25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8M44S" calcext:value-type="time">
            <text:p>06:48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1" calcext:value-type="percentage">
            <text:p>9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8M52S" calcext:value-type="time">
            <text:p>06:48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00S" calcext:value-type="time">
            <text:p>06:49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42" calcext:value-type="percentage">
            <text:p>74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08S" calcext:value-type="time">
            <text:p>06:49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16S" calcext:value-type="time">
            <text:p>06:49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5" calcext:value-type="percentage">
            <text:p>6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24S" calcext:value-type="time">
            <text:p>06:49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" calcext:value-type="percentage">
            <text:p>25.8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32S" calcext:value-type="time">
            <text:p>06:49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39S" calcext:value-type="time">
            <text:p>06:49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47S" calcext:value-type="time">
            <text:p>06:49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7" calcext:value-type="percentage">
            <text:p>25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49M55S" calcext:value-type="time">
            <text:p>06:49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4"/>
          <table:table-cell table:style-name="ce3" office:value-type="string" calcext:value-type="string">
            <text:p>PID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03S" calcext:value-type="time">
            <text:p>06:50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11S" calcext:value-type="time">
            <text:p>06:50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19S" calcext:value-type="time">
            <text:p>06:50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26S" calcext:value-type="time">
            <text:p>06:50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34S" calcext:value-type="time">
            <text:p>06:50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7" calcext:value-type="percentage">
            <text:p>72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42S" calcext:value-type="time">
            <text:p>06:50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53" calcext:value-type="percentage">
            <text:p>85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50S" calcext:value-type="time">
            <text:p>06:50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0M58S" calcext:value-type="time">
            <text:p>06:50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1M06S" calcext:value-type="time">
            <text:p>06:51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1M14S" calcext:value-type="time">
            <text:p>06:51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1M22S" calcext:value-type="time">
            <text:p>06:51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1M29S" calcext:value-type="time">
            <text:p>06:51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1M37S" calcext:value-type="time">
            <text:p>06:51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3" calcext:value-type="percentage">
            <text:p>9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1M45S" calcext:value-type="time">
            <text:p>06:51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1M53S" calcext:value-type="time">
            <text:p>06:51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01S" calcext:value-type="time">
            <text:p>06:52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09S" calcext:value-type="time">
            <text:p>06:52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16S" calcext:value-type="time">
            <text:p>06:52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24S" calcext:value-type="time">
            <text:p>06:52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32S" calcext:value-type="time">
            <text:p>06:52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7" calcext:value-type="percentage">
            <text:p>25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40S" calcext:value-type="time">
            <text:p>06:52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48S" calcext:value-type="time">
            <text:p>06:52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2M56S" calcext:value-type="time">
            <text:p>06:52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04S" calcext:value-type="time">
            <text:p>06:53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" calcext:value-type="percentage">
            <text:p>25.8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12S" calcext:value-type="time">
            <text:p>06:53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19S" calcext:value-type="time">
            <text:p>06:53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7" calcext:value-type="percentage">
            <text:p>72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27S" calcext:value-type="time">
            <text:p>06:53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1" calcext:value-type="percentage">
            <text:p>61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6" calcext:value-type="percentage">
            <text:p>25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35S" calcext:value-type="time">
            <text:p>06:53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43S" calcext:value-type="time">
            <text:p>06:53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15" calcext:value-type="percentage">
            <text:p>51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51S" calcext:value-type="time">
            <text:p>06:53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3M59S" calcext:value-type="time">
            <text:p>06:53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1" calcext:value-type="percentage">
            <text:p>61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4M07S" calcext:value-type="time">
            <text:p>06:54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7" calcext:value-type="percentage">
            <text:p>25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4M14S" calcext:value-type="time">
            <text:p>06:54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4M22S" calcext:value-type="time">
            <text:p>06:54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4M30S" calcext:value-type="time">
            <text:p>06:54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4M38S" calcext:value-type="time">
            <text:p>06:54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4M46S" calcext:value-type="time">
            <text:p>06:54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4M54S" calcext:value-type="time">
            <text:p>06:54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02S" calcext:value-type="time">
            <text:p>06:55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29" calcext:value-type="percentage">
            <text:p>5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10S" calcext:value-type="time">
            <text:p>06:55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17S" calcext:value-type="time">
            <text:p>06:55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1" calcext:value-type="percentage">
            <text:p>61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25S" calcext:value-type="time">
            <text:p>06:55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9" calcext:value-type="percentage">
            <text:p>25.8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33S" calcext:value-type="time">
            <text:p>06:55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41S" calcext:value-type="time">
            <text:p>06:55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" calcext:value-type="percentage">
            <text:p>25.8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49S" calcext:value-type="time">
            <text:p>06:55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5M57S" calcext:value-type="time">
            <text:p>06:55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1" calcext:value-type="percentage">
            <text:p>9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6M05S" calcext:value-type="time">
            <text:p>06:56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7" calcext:value-type="percentage">
            <text:p>25.7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6M12S" calcext:value-type="time">
            <text:p>06:56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6M20S" calcext:value-type="time">
            <text:p>06:56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6M28S" calcext:value-type="time">
            <text:p>06:56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7" calcext:value-type="percentage">
            <text:p>25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6M36S" calcext:value-type="time">
            <text:p>06:56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7" calcext:value-type="percentage">
            <text:p>72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7" calcext:value-type="percentage">
            <text:p>25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6M44S" calcext:value-type="time">
            <text:p>06:56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6M52S" calcext:value-type="time">
            <text:p>06:56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00S" calcext:value-type="time">
            <text:p>06:57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07S" calcext:value-type="time">
            <text:p>06:57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" calcext:value-type="percentage">
            <text:p>25.8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15S" calcext:value-type="time">
            <text:p>06:57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8" calcext:value-type="percentage">
            <text:p>7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23S" calcext:value-type="time">
            <text:p>06:57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69" calcext:value-type="percentage">
            <text:p>96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" calcext:value-type="percentage">
            <text:p>25.8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31S" calcext:value-type="time">
            <text:p>06:57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39S" calcext:value-type="time">
            <text:p>06:57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8" calcext:value-type="percentage">
            <text:p>6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47S" calcext:value-type="time">
            <text:p>06:57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8" calcext:value-type="percentage">
            <text:p>25.8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7M55S" calcext:value-type="time">
            <text:p>06:57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7" calcext:value-type="percentage">
            <text:p>25.8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02S" calcext:value-type="time">
            <text:p>06:58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10S" calcext:value-type="time">
            <text:p>06:58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18S" calcext:value-type="time">
            <text:p>06:58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26S" calcext:value-type="time">
            <text:p>06:58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34S" calcext:value-type="time">
            <text:p>06:58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42S" calcext:value-type="time">
            <text:p>06:58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49S" calcext:value-type="time">
            <text:p>06:58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8M57S" calcext:value-type="time">
            <text:p>06:58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9M05S" calcext:value-type="time">
            <text:p>06:59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9M13S" calcext:value-type="time">
            <text:p>06:59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9M21S" calcext:value-type="time">
            <text:p>06:59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9M29S" calcext:value-type="time">
            <text:p>06:59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9M37S" calcext:value-type="time">
            <text:p>06:59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9M45S" calcext:value-type="time">
            <text:p>06:59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65" calcext:value-type="percentage">
            <text:p>76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8H59M52S" calcext:value-type="time">
            <text:p>06:59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00S" calcext:value-type="time">
            <text:p>07:00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08S" calcext:value-type="time">
            <text:p>07:00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16S" calcext:value-type="time">
            <text:p>07:00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94" calcext:value-type="percentage">
            <text:p>6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6" calcext:value-type="percentage">
            <text:p>25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24S" calcext:value-type="time">
            <text:p>07:00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6" calcext:value-type="percentage">
            <text:p>25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32S" calcext:value-type="time">
            <text:p>07:00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39S" calcext:value-type="time">
            <text:p>07:00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2" calcext:value-type="percentage">
            <text:p>25.8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47S" calcext:value-type="time">
            <text:p>07:00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0M55S" calcext:value-type="time">
            <text:p>07:00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03S" calcext:value-type="time">
            <text:p>07:01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8" calcext:value-type="percentage">
            <text:p>5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8" calcext:value-type="percentage">
            <text:p>25.7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11S" calcext:value-type="time">
            <text:p>07:01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6" calcext:value-type="percentage">
            <text:p>94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79" calcext:value-type="percentage">
            <text:p>25.7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2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19S" calcext:value-type="time">
            <text:p>07:01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27S" calcext:value-type="time">
            <text:p>07:01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34S" calcext:value-type="time">
            <text:p>07:01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42S" calcext:value-type="time">
            <text:p>07:01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50S" calcext:value-type="time">
            <text:p>07:01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8" calcext:value-type="percentage">
            <text:p>5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6" calcext:value-type="percentage">
            <text:p>25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1M58S" calcext:value-type="time">
            <text:p>07:01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2M06S" calcext:value-type="time">
            <text:p>07:02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18" calcext:value-type="percentage">
            <text:p>8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1" calcext:value-type="percentage">
            <text:p>25.8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2M14S" calcext:value-type="time">
            <text:p>07:02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59:.E405])" office:value-type="percentage" office:value="0.681893371757923" calcext:value-type="percentage">
            <text:p>68.19%</text:p>
          </table:table-cell>
          <table:table-cell table:style-name="ce3" table:number-columns-repeated="3"/>
          <table:table-cell table:style-name="ce4" table:formula="of:=AVERAGE([.I59:.I405])" office:value-type="percentage" office:value="0.252587896253603" calcext:value-type="percentage">
            <text:p>25.26%</text:p>
          </table:table-cell>
          <table:table-cell table:style-name="ce3" table:number-columns-repeated="6"/>
          <table:table-cell table:style-name="ce6" table:formula="of:=AVERAGE([.P59:.P405])" office:value-type="float" office:value="3.39469740634006" calcext:value-type="float">
            <text:p>3.39</text:p>
          </table:table-cell>
          <table:table-cell table:style-name="ce6" table:formula="of:=AVERAGE([.Q59:.Q405])" office:value-type="float" office:value="8.90000000000006" calcext:value-type="float">
            <text:p>8.90</text:p>
          </table:table-cell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2M22S" calcext:value-type="time">
            <text:p>07:02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48" calcext:value-type="percentage">
            <text:p>8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3" calcext:value-type="percentage">
            <text:p>25.8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2M29S" calcext:value-type="time">
            <text:p>07:02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9" calcext:value-type="percentage">
            <text:p>2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2M37S" calcext:value-type="time">
            <text:p>07:02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2M45S" calcext:value-type="time">
            <text:p>07:02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2M53S" calcext:value-type="time">
            <text:p>07:02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65" calcext:value-type="percentage">
            <text:p>26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01S" calcext:value-type="time">
            <text:p>07:03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88" calcext:value-type="percentage">
            <text:p>1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09S" calcext:value-type="time">
            <text:p>07:03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16S" calcext:value-type="time">
            <text:p>07:03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069" calcext:value-type="percentage">
            <text:p>6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24S" calcext:value-type="time">
            <text:p>07:03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2" calcext:value-type="percentage">
            <text:p>2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32S" calcext:value-type="time">
            <text:p>07:03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43" calcext:value-type="percentage">
            <text:p>3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40S" calcext:value-type="time">
            <text:p>07:03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42" calcext:value-type="percentage">
            <text:p>24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48S" calcext:value-type="time">
            <text:p>07:03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8" calcext:value-type="percentage">
            <text:p>27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3M56S" calcext:value-type="time">
            <text:p>07:03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9" calcext:value-type="percentage">
            <text:p>1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4" calcext:value-type="percentage">
            <text:p>25.8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4M03S" calcext:value-type="time">
            <text:p>07:04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38" calcext:value-type="percentage">
            <text:p>83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6" calcext:value-type="percentage">
            <text:p>25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4M11S" calcext:value-type="time">
            <text:p>07:04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06" calcext:value-type="percentage">
            <text:p>2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6" calcext:value-type="percentage">
            <text:p>25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19H04M19S" calcext:value-type="time">
            <text:p>07:04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76" calcext:value-type="percentage">
            <text:p>1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86" calcext:value-type="percentage">
            <text:p>25.8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" calcext:value-type="float">
            <text:p>3.40</text:p>
          </table:table-cell>
          <table:table-cell table:style-name="ce6" office:value-type="float" office:value="8.9" calcext:value-type="float">
            <text:p>8.90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ce5" table:formula="of:=AVERAGE([.E408:.E423])" office:value-type="percentage" office:value="0.3644375" calcext:value-type="percentage">
            <text:p>36.44%</text:p>
          </table:table-cell>
          <table:table-cell table:number-columns-repeated="3"/>
          <table:table-cell table:style-name="ce5" table:formula="of:=AVERAGE([.I408:.I423])" office:value-type="percentage" office:value="0.25844375" calcext:value-type="percentage">
            <text:p>25.84%</text:p>
          </table:table-cell>
          <table:table-cell table:number-columns-repeated="6"/>
          <table:table-cell table:formula="of:=AVERAGE([.P408:.P423])" office:value-type="float" office:value="3.4" calcext:value-type="float">
            <text:p>3.40</text:p>
          </table:table-cell>
          <table:table-cell table:formula="of:=AVERAGE([.Q408:.Q423])" office:value-type="float" office:value="8.9" calcext:value-type="float">
            <text:p>8.90</text:p>
          </table:table-cell>
          <table:table-cell table:number-columns-repeated="68"/>
        </table:table-row>
        <table:table-row table:style-name="ro1" table:number-rows-repeated="1048151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  <table:database-ranges>
        <table:database-range table:name="__Anonymous_Sheet_DB__0" table:target-range-address="system_metrics_05062024_5_without.A1:system_metrics_05062024_5_without.BZ4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16:49:37.160112672</dc:date>
    <meta:editing-duration>PT22M50S</meta:editing-duration>
    <meta:editing-cycles>2</meta:editing-cycles>
    <meta:generator>LibreOffice/6.4.7.2$Linux_X86_64 LibreOffice_project/40$Build-2</meta:generator>
    <meta:document-statistic meta:table-count="1" meta:cell-count="12911" meta:object-count="0"/>
  </office:meta>
</office:document-meta>
</file>