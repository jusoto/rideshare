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4102in"/>
    </style:style>
    <style:style style:name="co4" style:family="table-column">
      <style:table-column-properties fo:break-before="auto" style:column-width="1.461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0.5602in"/>
    </style:style>
    <style:style style:name="co9" style:family="table-column">
      <style:table-column-properties fo:break-before="auto" style:column-width="0.5929in"/>
    </style:style>
    <style:style style:name="co10" style:family="table-column">
      <style:table-column-properties fo:break-before="auto" style:column-width="0.7102in"/>
    </style:style>
    <style:style style:name="co11" style:family="table-column">
      <style:table-column-properties fo:break-before="auto" style:column-width="0.4965in"/>
    </style:style>
    <style:style style:name="co12" style:family="table-column">
      <style:table-column-properties fo:break-before="auto" style:column-width="0.7in"/>
    </style:style>
    <style:style style:name="co13" style:family="table-column">
      <style:table-column-properties fo:break-before="auto" style:column-width="0.9252in"/>
    </style:style>
    <style:style style:name="co14" style:family="table-column">
      <style:table-column-properties fo:break-before="auto" style:column-width="0.6035in"/>
    </style:style>
    <style:style style:name="co15" style:family="table-column">
      <style:table-column-properties fo:break-before="auto" style:column-width="0.6354in"/>
    </style:style>
    <style:style style:name="co16" style:family="table-column">
      <style:table-column-properties fo:break-before="auto" style:column-width="0.6571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1.8902in"/>
    </style:style>
    <style:style style:name="co19" style:family="table-column">
      <style:table-column-properties fo:break-before="auto" style:column-width="1.8791in"/>
    </style:style>
    <style:style style:name="co20" style:family="table-column">
      <style:table-column-properties fo:break-before="auto" style:column-width="1.9543in"/>
    </style:style>
    <style:style style:name="co21" style:family="table-column">
      <style:table-column-properties fo:break-before="auto" style:column-width="0.4319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4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fo:border="0.74pt solid #000000"/>
    </style:style>
    <style:style style:name="ce2" style:family="table-cell" style:parent-style-name="Default" style:data-style-name="N43">
      <style:table-cell-properties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11">
      <style:table-cell-properties fo:border="0.74pt solid #000000"/>
    </style:style>
    <style:style style:name="ce5" style:family="table-cell" style:parent-style-name="Default" style:data-style-name="N11"/>
    <style:style style:name="ce6" style:family="table-cell" style:parent-style-name="Default" style:data-style-name="N2">
      <style:table-cell-properties fo:border="0.74pt solid #000000"/>
    </style:style>
    <style:style style:name="ce7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ystem_metrics_05062024_5_wi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2" table:number-columns-repeated="2" table:default-cell-style-name="ce7"/>
        <table:table-column table:style-name="co10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4" table:number-columns-repeated="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5" table:number-columns-repeated="7" table:default-cell-style-name="Default"/>
        <table:table-column table:style-name="co8" table:number-columns-repeated="2" table:default-cell-style-name="Default"/>
        <table:table-column table:style-name="co15" table:number-columns-repeated="5" table:default-cell-style-name="Default"/>
        <table:table-column table:style-name="co7" table:number-columns-repeated="7" table:default-cell-style-name="Default"/>
        <table:table-column table:style-name="co16" table:default-cell-style-name="Default"/>
        <table:table-column table:style-name="co17" table:number-columns-repeated="6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2" table:number-columns-repeated="4" table:default-cell-style-name="Default"/>
        <table:table-column table:style-name="co23" table:number-columns-repeated="4" table:default-cell-style-name="Default"/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49M51S" calcext:value-type="time">
            <text:p>08:49:5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182" calcext:value-type="percentage">
            <text:p>18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06" calcext:value-type="percentage">
            <text:p>27.0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5"/>
          <table:table-cell table:style-name="ce3" office:value-type="string" calcext:value-type="string">
            <text:p>PIDS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49M59S" calcext:value-type="time">
            <text:p>08:49:5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167" calcext:value-type="percentage">
            <text:p>16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16" calcext:value-type="percentage">
            <text:p>27.1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0M07S" calcext:value-type="time">
            <text:p>08:50:0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5" calcext:value-type="percentage">
            <text:p>62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16" calcext:value-type="percentage">
            <text:p>27.1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0M15S" calcext:value-type="time">
            <text:p>08:50:1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19" calcext:value-type="percentage">
            <text:p>21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1" calcext:value-type="percentage">
            <text:p>27.1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0M22S" calcext:value-type="time">
            <text:p>08:50:2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86" calcext:value-type="percentage">
            <text:p>28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11" calcext:value-type="percentage">
            <text:p>27.1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0M30S" calcext:value-type="time">
            <text:p>08:50:3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35" calcext:value-type="percentage">
            <text:p>23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11" calcext:value-type="percentage">
            <text:p>27.1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0M38S" calcext:value-type="time">
            <text:p>08:50:3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06" calcext:value-type="percentage">
            <text:p>2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11" calcext:value-type="percentage">
            <text:p>27.1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0M46S" calcext:value-type="time">
            <text:p>08:50:4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" calcext:value-type="percentage">
            <text:p>27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12" calcext:value-type="percentage">
            <text:p>27.1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0M54S" calcext:value-type="time">
            <text:p>08:50:5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65" calcext:value-type="percentage">
            <text:p>26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13" calcext:value-type="percentage">
            <text:p>27.1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1M02S" calcext:value-type="time">
            <text:p>08:51:0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12" calcext:value-type="percentage">
            <text:p>21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12" calcext:value-type="percentage">
            <text:p>27.1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1M09S" calcext:value-type="time">
            <text:p>08:51:0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19" calcext:value-type="percentage">
            <text:p>21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12" calcext:value-type="percentage">
            <text:p>27.1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1M17S" calcext:value-type="time">
            <text:p>08:51:1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306" calcext:value-type="percentage">
            <text:p>3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13" calcext:value-type="percentage">
            <text:p>27.1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1M25S" calcext:value-type="time">
            <text:p>08:51:2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5" calcext:value-type="percentage">
            <text:p>25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15" calcext:value-type="percentage">
            <text:p>27.1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1M33S" calcext:value-type="time">
            <text:p>08:51:3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7" calcext:value-type="percentage">
            <text:p>64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13" calcext:value-type="percentage">
            <text:p>27.1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1M41S" calcext:value-type="time">
            <text:p>08:51:4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65" calcext:value-type="percentage">
            <text:p>26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15" calcext:value-type="percentage">
            <text:p>27.1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1M49S" calcext:value-type="time">
            <text:p>08:51:4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167" calcext:value-type="percentage">
            <text:p>16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15" calcext:value-type="percentage">
            <text:p>27.1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1M56S" calcext:value-type="time">
            <text:p>08:51:5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19" calcext:value-type="percentage">
            <text:p>21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18" calcext:value-type="percentage">
            <text:p>27.1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5"/>
          <table:table-cell table:style-name="ce3" office:value-type="string" calcext:value-type="string">
            <text:p>PID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4" table:formula="of:=AVERAGE([.E1:.E17])" office:value-type="percentage" office:value="0.279" calcext:value-type="percentage">
            <text:p>27.90%</text:p>
          </table:table-cell>
          <table:table-cell table:style-name="ce3" table:number-columns-repeated="3"/>
          <table:table-cell table:style-name="ce4" table:formula="of:=AVERAGE([.I1:.I17])" office:value-type="percentage" office:value="0.271288235294118" calcext:value-type="percentage">
            <text:p>27.13%</text:p>
          </table:table-cell>
          <table:table-cell table:style-name="ce3" table:number-columns-repeated="6"/>
          <table:table-cell table:style-name="ce6" table:formula="of:=AVERAGE([.P1:.P17])" office:value-type="float" office:value="3.41" calcext:value-type="float">
            <text:p>3.41</text:p>
          </table:table-cell>
          <table:table-cell table:style-name="ce6" table:formula="of:=AVERAGE([.Q1:.Q17])" office:value-type="float" office:value="8.89" calcext:value-type="float">
            <text:p>8.89</text:p>
          </table:table-cell>
          <table:table-cell table:style-name="ce3" table:number-columns-repeated="66"/>
          <table:table-cell table:number-columns-repeated="3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4"/>
          <table:table-cell table:style-name="ce3" table:number-columns-repeated="3"/>
          <table:table-cell table:style-name="ce4"/>
          <table:table-cell table:style-name="ce3" table:number-columns-repeated="6"/>
          <table:table-cell table:style-name="ce6" table:number-columns-repeated="2"/>
          <table:table-cell table:style-name="ce3" table:number-columns-repeated="6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2M05S" calcext:value-type="time">
            <text:p>08:52:0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46" calcext:value-type="percentage">
            <text:p>94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25" calcext:value-type="percentage">
            <text:p>27.2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2M14S" calcext:value-type="time">
            <text:p>08:52:1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72" calcext:value-type="percentage">
            <text:p>97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1" calcext:value-type="percentage">
            <text:p>27.3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2M22S" calcext:value-type="time">
            <text:p>08:52:2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92" calcext:value-type="percentage">
            <text:p>89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2" calcext:value-type="percentage">
            <text:p>27.3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2M31S" calcext:value-type="time">
            <text:p>08:52:3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46" calcext:value-type="percentage">
            <text:p>84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3" calcext:value-type="percentage">
            <text:p>27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2M39S" calcext:value-type="time">
            <text:p>08:52:3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14" calcext:value-type="percentage">
            <text:p>91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" calcext:value-type="percentage">
            <text:p>27.3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2M47S" calcext:value-type="time">
            <text:p>08:52:4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39" calcext:value-type="percentage">
            <text:p>93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3" calcext:value-type="percentage">
            <text:p>27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2M56S" calcext:value-type="time">
            <text:p>08:52:5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79" calcext:value-type="percentage">
            <text:p>87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7" calcext:value-type="percentage">
            <text:p>27.3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3M04S" calcext:value-type="time">
            <text:p>08:53:0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06" calcext:value-type="percentage">
            <text:p>8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3" calcext:value-type="percentage">
            <text:p>27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3M13S" calcext:value-type="time">
            <text:p>08:53:1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43" calcext:value-type="percentage">
            <text:p>94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8" calcext:value-type="percentage">
            <text:p>27.3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3M21S" calcext:value-type="time">
            <text:p>08:53:2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57" calcext:value-type="percentage">
            <text:p>85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2" calcext:value-type="percentage">
            <text:p>27.3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3M30S" calcext:value-type="time">
            <text:p>08:53:3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92" calcext:value-type="percentage">
            <text:p>89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7" calcext:value-type="percentage">
            <text:p>27.3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3M38S" calcext:value-type="time">
            <text:p>08:53:3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12" calcext:value-type="percentage">
            <text:p>91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9" calcext:value-type="percentage">
            <text:p>27.3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3M46S" calcext:value-type="time">
            <text:p>08:53:4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73" calcext:value-type="percentage">
            <text:p>97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3" calcext:value-type="percentage">
            <text:p>27.4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3M54S" calcext:value-type="time">
            <text:p>08:53:5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12" calcext:value-type="percentage">
            <text:p>91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5" calcext:value-type="percentage">
            <text:p>27.3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4M03S" calcext:value-type="time">
            <text:p>08:54:0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14" calcext:value-type="percentage">
            <text:p>91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9" calcext:value-type="percentage">
            <text:p>27.3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4M12S" calcext:value-type="time">
            <text:p>08:54:1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71" calcext:value-type="percentage">
            <text:p>97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7" calcext:value-type="percentage">
            <text:p>27.3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5"/>
          <table:table-cell table:style-name="ce3" office:value-type="string" calcext:value-type="string">
            <text:p>PIDS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4M20S" calcext:value-type="time">
            <text:p>08:54:2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8" calcext:value-type="percentage">
            <text:p>27.3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4" table:formula="of:=AVERAGE([.E20:.E36])" office:value-type="percentage" office:value="0.915764705882353" calcext:value-type="percentage">
            <text:p>91.58%</text:p>
          </table:table-cell>
          <table:table-cell table:style-name="ce3" table:number-columns-repeated="3"/>
          <table:table-cell table:style-name="ce4" table:formula="of:=AVERAGE([.I20:.I36])" office:value-type="percentage" office:value="0.273482352941176" calcext:value-type="percentage">
            <text:p>27.35%</text:p>
          </table:table-cell>
          <table:table-cell table:style-name="ce3" table:number-columns-repeated="6"/>
          <table:table-cell table:style-name="ce6" table:formula="of:=AVERAGE([.P20:.P36])" office:value-type="float" office:value="3.41" calcext:value-type="float">
            <text:p>3.41</text:p>
          </table:table-cell>
          <table:table-cell table:style-name="ce6" table:formula="of:=AVERAGE([.Q20:.Q36])" office:value-type="float" office:value="8.89" calcext:value-type="float">
            <text:p>8.89</text:p>
          </table:table-cell>
          <table:table-cell table:style-name="ce3" table:number-columns-repeated="66"/>
          <table:table-cell table:number-columns-repeated="3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4"/>
          <table:table-cell table:style-name="ce3" table:number-columns-repeated="3"/>
          <table:table-cell table:style-name="ce4"/>
          <table:table-cell table:style-name="ce3" table:number-columns-repeated="6"/>
          <table:table-cell table:style-name="ce6" table:number-columns-repeated="2"/>
          <table:table-cell table:style-name="ce3" table:number-columns-repeated="6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4M28S" calcext:value-type="time">
            <text:p>08:54:2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38" calcext:value-type="percentage">
            <text:p>83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7" calcext:value-type="percentage">
            <text:p>27.3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4M36S" calcext:value-type="time">
            <text:p>08:54:3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156" calcext:value-type="percentage">
            <text:p>15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5" calcext:value-type="percentage">
            <text:p>27.3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4M43S" calcext:value-type="time">
            <text:p>08:54:4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182" calcext:value-type="percentage">
            <text:p>18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6" calcext:value-type="percentage">
            <text:p>27.3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4M51S" calcext:value-type="time">
            <text:p>08:54:5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161" calcext:value-type="percentage">
            <text:p>16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6" calcext:value-type="percentage">
            <text:p>27.3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4M59S" calcext:value-type="time">
            <text:p>08:54:5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161" calcext:value-type="percentage">
            <text:p>16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7" calcext:value-type="percentage">
            <text:p>27.3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5M07S" calcext:value-type="time">
            <text:p>08:55:0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429" calcext:value-type="percentage">
            <text:p>4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7" calcext:value-type="percentage">
            <text:p>27.3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5M15S" calcext:value-type="time">
            <text:p>08:55:1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182" calcext:value-type="percentage">
            <text:p>18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7" calcext:value-type="percentage">
            <text:p>27.3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5M23S" calcext:value-type="time">
            <text:p>08:55:2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129" calcext:value-type="percentage">
            <text:p>1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28" calcext:value-type="percentage">
            <text:p>27.2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5M30S" calcext:value-type="time">
            <text:p>08:55:3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125" calcext:value-type="percentage">
            <text:p>12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27" calcext:value-type="percentage">
            <text:p>27.2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5M38S" calcext:value-type="time">
            <text:p>08:55:3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152" calcext:value-type="percentage">
            <text:p>15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26" calcext:value-type="percentage">
            <text:p>27.2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5M46S" calcext:value-type="time">
            <text:p>08:55:4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441" calcext:value-type="percentage">
            <text:p>44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27" calcext:value-type="percentage">
            <text:p>27.2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5M54S" calcext:value-type="time">
            <text:p>08:55:5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129" calcext:value-type="percentage">
            <text:p>1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28" calcext:value-type="percentage">
            <text:p>27.2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4" table:formula="of:=AVERAGE([.E39:.E50])" office:value-type="percentage" office:value="0.257083333333333" calcext:value-type="percentage">
            <text:p>25.71%</text:p>
          </table:table-cell>
          <table:table-cell table:style-name="ce3" table:number-columns-repeated="3"/>
          <table:table-cell table:style-name="ce4" table:formula="of:=AVERAGE([.I39:.I50])" office:value-type="percentage" office:value="0.273258333333333" calcext:value-type="percentage">
            <text:p>27.33%</text:p>
          </table:table-cell>
          <table:table-cell table:style-name="ce3" table:number-columns-repeated="6"/>
          <table:table-cell table:style-name="ce6" table:formula="of:=AVERAGE([.P39:.P50])" office:value-type="float" office:value="3.41" calcext:value-type="float">
            <text:p>3.41</text:p>
          </table:table-cell>
          <table:table-cell table:style-name="ce6" table:formula="of:=AVERAGE([.Q39:.Q50])" office:value-type="float" office:value="8.89" calcext:value-type="float">
            <text:p>8.89</text:p>
          </table:table-cell>
          <table:table-cell table:style-name="ce3" table:number-columns-repeated="66"/>
          <table:table-cell table:number-columns-repeated="3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4"/>
          <table:table-cell table:style-name="ce3" table:number-columns-repeated="3"/>
          <table:table-cell table:style-name="ce4"/>
          <table:table-cell table:style-name="ce3" table:number-columns-repeated="6"/>
          <table:table-cell table:style-name="ce6" table:number-columns-repeated="2"/>
          <table:table-cell table:style-name="ce3" table:number-columns-repeated="6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6M02S" calcext:value-type="time">
            <text:p>08:56:0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69" calcext:value-type="percentage">
            <text:p>96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5" calcext:value-type="percentage">
            <text:p>27.3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6M11S" calcext:value-type="time">
            <text:p>08:56:1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24" calcext:value-type="percentage">
            <text:p>82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2" calcext:value-type="percentage">
            <text:p>27.3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6M19S" calcext:value-type="time">
            <text:p>08:56:1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5" calcext:value-type="percentage">
            <text:p>27.3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5"/>
          <table:table-cell table:style-name="ce3" office:value-type="string" calcext:value-type="string">
            <text:p>PIDS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6M27S" calcext:value-type="time">
            <text:p>08:56:2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06" calcext:value-type="percentage">
            <text:p>8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2" calcext:value-type="percentage">
            <text:p>27.3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6M34S" calcext:value-type="time">
            <text:p>08:56:3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63" calcext:value-type="percentage">
            <text:p>76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1" calcext:value-type="percentage">
            <text:p>27.3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6M42S" calcext:value-type="time">
            <text:p>08:56:4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29" calcext:value-type="percentage">
            <text:p>8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1" calcext:value-type="percentage">
            <text:p>27.3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6M50S" calcext:value-type="time">
            <text:p>08:56:5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78" calcext:value-type="percentage">
            <text:p>77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2" calcext:value-type="percentage">
            <text:p>27.3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6M58S" calcext:value-type="time">
            <text:p>08:56:5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88" calcext:value-type="percentage">
            <text:p>6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2" calcext:value-type="percentage">
            <text:p>27.3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7M06S" calcext:value-type="time">
            <text:p>08:57:0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7" calcext:value-type="percentage">
            <text:p>64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1" calcext:value-type="percentage">
            <text:p>27.3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7M14S" calcext:value-type="time">
            <text:p>08:57:1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89" calcext:value-type="percentage">
            <text:p>88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2" calcext:value-type="percentage">
            <text:p>27.3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7M22S" calcext:value-type="time">
            <text:p>08:57:2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7" calcext:value-type="percentage">
            <text:p>64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2" calcext:value-type="percentage">
            <text:p>27.3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7M30S" calcext:value-type="time">
            <text:p>08:57:3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14" calcext:value-type="percentage">
            <text:p>71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2" calcext:value-type="percentage">
            <text:p>27.3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7M38S" calcext:value-type="time">
            <text:p>08:57:3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36" calcext:value-type="percentage">
            <text:p>63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1" calcext:value-type="percentage">
            <text:p>27.3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7M46S" calcext:value-type="time">
            <text:p>08:57:4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24" calcext:value-type="percentage">
            <text:p>82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3" calcext:value-type="percentage">
            <text:p>27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7M54S" calcext:value-type="time">
            <text:p>08:57:5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06" calcext:value-type="percentage">
            <text:p>6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3" calcext:value-type="percentage">
            <text:p>27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8M01S" calcext:value-type="time">
            <text:p>08:58:0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13" calcext:value-type="percentage">
            <text:p>61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3" calcext:value-type="percentage">
            <text:p>27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8M09S" calcext:value-type="time">
            <text:p>08:58:0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14" calcext:value-type="percentage">
            <text:p>91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2" calcext:value-type="percentage">
            <text:p>27.3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8M17S" calcext:value-type="time">
            <text:p>08:58:1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27" calcext:value-type="percentage">
            <text:p>72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3" calcext:value-type="percentage">
            <text:p>27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8M25S" calcext:value-type="time">
            <text:p>08:58:2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67" calcext:value-type="percentage">
            <text:p>66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3" calcext:value-type="percentage">
            <text:p>27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5"/>
          <table:table-cell table:style-name="ce3" office:value-type="string" calcext:value-type="string">
            <text:p>PIDS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8M33S" calcext:value-type="time">
            <text:p>08:58:3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36" calcext:value-type="percentage">
            <text:p>63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2" calcext:value-type="percentage">
            <text:p>27.3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8M41S" calcext:value-type="time">
            <text:p>08:58:4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77" calcext:value-type="percentage">
            <text:p>67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2" calcext:value-type="percentage">
            <text:p>27.3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8M49S" calcext:value-type="time">
            <text:p>08:58:4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" calcext:value-type="percentage">
            <text:p>6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3" calcext:value-type="percentage">
            <text:p>27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8M57S" calcext:value-type="time">
            <text:p>08:58:5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11" calcext:value-type="percentage">
            <text:p>71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4" calcext:value-type="percentage">
            <text:p>27.3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9M05S" calcext:value-type="time">
            <text:p>08:59:0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" calcext:value-type="percentage">
            <text:p>6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3" calcext:value-type="percentage">
            <text:p>27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9M13S" calcext:value-type="time">
            <text:p>08:59:1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57" calcext:value-type="percentage">
            <text:p>65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2" calcext:value-type="percentage">
            <text:p>27.3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9M20S" calcext:value-type="time">
            <text:p>08:59:2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86" calcext:value-type="percentage">
            <text:p>68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3" calcext:value-type="percentage">
            <text:p>27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9M28S" calcext:value-type="time">
            <text:p>08:59:2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06" calcext:value-type="percentage">
            <text:p>6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3" calcext:value-type="percentage">
            <text:p>27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9M36S" calcext:value-type="time">
            <text:p>08:59:3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" calcext:value-type="percentage">
            <text:p>8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3" calcext:value-type="percentage">
            <text:p>27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9M44S" calcext:value-type="time">
            <text:p>08:59:4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5" calcext:value-type="percentage">
            <text:p>54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3" calcext:value-type="percentage">
            <text:p>27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0H59M52S" calcext:value-type="time">
            <text:p>08:59:5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5" calcext:value-type="percentage">
            <text:p>62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3" calcext:value-type="percentage">
            <text:p>27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0M00S" calcext:value-type="time">
            <text:p>09:00:0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5" calcext:value-type="percentage">
            <text:p>62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4" calcext:value-type="percentage">
            <text:p>27.3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0M08S" calcext:value-type="time">
            <text:p>09:00:0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7" calcext:value-type="percentage">
            <text:p>64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3" calcext:value-type="percentage">
            <text:p>27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0M16S" calcext:value-type="time">
            <text:p>09:00:1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57" calcext:value-type="percentage">
            <text:p>65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3" calcext:value-type="percentage">
            <text:p>27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0M23S" calcext:value-type="time">
            <text:p>09:00:2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06" calcext:value-type="percentage">
            <text:p>6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4" calcext:value-type="percentage">
            <text:p>27.3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0M31S" calcext:value-type="time">
            <text:p>09:00:3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7" calcext:value-type="percentage">
            <text:p>97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3" calcext:value-type="percentage">
            <text:p>27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5"/>
          <table:table-cell table:style-name="ce3" office:value-type="string" calcext:value-type="string">
            <text:p>PIDS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0M39S" calcext:value-type="time">
            <text:p>09:00:3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5" calcext:value-type="percentage">
            <text:p>62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2" calcext:value-type="percentage">
            <text:p>27.3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0M47S" calcext:value-type="time">
            <text:p>09:00:4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9" calcext:value-type="percentage">
            <text:p>6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2" calcext:value-type="percentage">
            <text:p>27.3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0M55S" calcext:value-type="time">
            <text:p>09:00:5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89" calcext:value-type="percentage">
            <text:p>78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4" calcext:value-type="percentage">
            <text:p>27.3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1M03S" calcext:value-type="time">
            <text:p>09:01:0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9" calcext:value-type="percentage">
            <text:p>64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3" calcext:value-type="percentage">
            <text:p>27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1M11S" calcext:value-type="time">
            <text:p>09:01:1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3" calcext:value-type="percentage">
            <text:p>27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1M19S" calcext:value-type="time">
            <text:p>09:01:1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06" calcext:value-type="percentage">
            <text:p>6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3" calcext:value-type="percentage">
            <text:p>27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1M27S" calcext:value-type="time">
            <text:p>09:01:2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18" calcext:value-type="percentage">
            <text:p>61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4" calcext:value-type="percentage">
            <text:p>27.3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1M34S" calcext:value-type="time">
            <text:p>09:01:3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1" calcext:value-type="percentage">
            <text:p>58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2" calcext:value-type="percentage">
            <text:p>27.3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1M42S" calcext:value-type="time">
            <text:p>09:01:4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94" calcext:value-type="percentage">
            <text:p>59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3" calcext:value-type="percentage">
            <text:p>27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1M50S" calcext:value-type="time">
            <text:p>09:01:5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76" calcext:value-type="percentage">
            <text:p>6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4" calcext:value-type="percentage">
            <text:p>27.3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1M58S" calcext:value-type="time">
            <text:p>09:01:5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89" calcext:value-type="percentage">
            <text:p>88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3" calcext:value-type="percentage">
            <text:p>27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2M06S" calcext:value-type="time">
            <text:p>09:02:0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36" calcext:value-type="percentage">
            <text:p>63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3" calcext:value-type="percentage">
            <text:p>27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2M14S" calcext:value-type="time">
            <text:p>09:02:1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39" calcext:value-type="percentage">
            <text:p>63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3" calcext:value-type="percentage">
            <text:p>27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2M22S" calcext:value-type="time">
            <text:p>09:02:2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06" calcext:value-type="percentage">
            <text:p>6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5" calcext:value-type="percentage">
            <text:p>27.3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2M30S" calcext:value-type="time">
            <text:p>09:02:3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4" calcext:value-type="percentage">
            <text:p>27.3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2M37S" calcext:value-type="time">
            <text:p>09:02:3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67" calcext:value-type="percentage">
            <text:p>66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4" calcext:value-type="percentage">
            <text:p>27.3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5"/>
          <table:table-cell table:style-name="ce3" office:value-type="string" calcext:value-type="string">
            <text:p>PIDS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2M45S" calcext:value-type="time">
            <text:p>09:02:4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4" calcext:value-type="percentage">
            <text:p>27.3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2M53S" calcext:value-type="time">
            <text:p>09:02:5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57" calcext:value-type="percentage">
            <text:p>65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5" calcext:value-type="percentage">
            <text:p>27.3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3M01S" calcext:value-type="time">
            <text:p>09:03:0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3" calcext:value-type="percentage">
            <text:p>58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4" calcext:value-type="percentage">
            <text:p>27.3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3M09S" calcext:value-type="time">
            <text:p>09:03:0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94" calcext:value-type="percentage">
            <text:p>59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3" calcext:value-type="percentage">
            <text:p>27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3M17S" calcext:value-type="time">
            <text:p>09:03:1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31" calcext:value-type="percentage">
            <text:p>53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4" calcext:value-type="percentage">
            <text:p>27.3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3M25S" calcext:value-type="time">
            <text:p>09:03:2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62" calcext:value-type="percentage">
            <text:p>56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4" calcext:value-type="percentage">
            <text:p>27.3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3M33S" calcext:value-type="time">
            <text:p>09:03:3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7" calcext:value-type="percentage">
            <text:p>64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4" calcext:value-type="percentage">
            <text:p>27.3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3M40S" calcext:value-type="time">
            <text:p>09:03:4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9" calcext:value-type="percentage">
            <text:p>6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2" calcext:value-type="percentage">
            <text:p>27.3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3M48S" calcext:value-type="time">
            <text:p>09:03:4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5" calcext:value-type="percentage">
            <text:p>27.3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3M56S" calcext:value-type="time">
            <text:p>09:03:5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18" calcext:value-type="percentage">
            <text:p>61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4" calcext:value-type="percentage">
            <text:p>27.3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4M04S" calcext:value-type="time">
            <text:p>09:04:0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9" calcext:value-type="percentage">
            <text:p>6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4" calcext:value-type="percentage">
            <text:p>27.3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4M12S" calcext:value-type="time">
            <text:p>09:04:1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3" calcext:value-type="percentage">
            <text:p>58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4" calcext:value-type="percentage">
            <text:p>27.3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4M20S" calcext:value-type="time">
            <text:p>09:04:2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43" calcext:value-type="percentage">
            <text:p>94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4" calcext:value-type="percentage">
            <text:p>27.3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4M28S" calcext:value-type="time">
            <text:p>09:04:2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29" calcext:value-type="percentage">
            <text:p>5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5" calcext:value-type="percentage">
            <text:p>27.3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4M35S" calcext:value-type="time">
            <text:p>09:04:3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67" calcext:value-type="percentage">
            <text:p>66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3" calcext:value-type="percentage">
            <text:p>27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4M43S" calcext:value-type="time">
            <text:p>09:04:4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94" calcext:value-type="percentage">
            <text:p>59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4" calcext:value-type="percentage">
            <text:p>27.3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5"/>
          <table:table-cell table:style-name="ce3" office:value-type="string" calcext:value-type="string">
            <text:p>PIDS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4M51S" calcext:value-type="time">
            <text:p>09:04:5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" calcext:value-type="percentage">
            <text:p>6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5" calcext:value-type="percentage">
            <text:p>27.3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4M59S" calcext:value-type="time">
            <text:p>09:04:5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4" calcext:value-type="percentage">
            <text:p>27.3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5M07S" calcext:value-type="time">
            <text:p>09:05:0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5" calcext:value-type="percentage">
            <text:p>54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3" calcext:value-type="percentage">
            <text:p>27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5M15S" calcext:value-type="time">
            <text:p>09:05:1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62" calcext:value-type="percentage">
            <text:p>56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5" calcext:value-type="percentage">
            <text:p>27.3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5M23S" calcext:value-type="time">
            <text:p>09:05:2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3" calcext:value-type="percentage">
            <text:p>27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5M31S" calcext:value-type="time">
            <text:p>09:05:3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7" calcext:value-type="percentage">
            <text:p>64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4" calcext:value-type="percentage">
            <text:p>27.3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5M38S" calcext:value-type="time">
            <text:p>09:05:3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5" calcext:value-type="percentage">
            <text:p>64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2" calcext:value-type="percentage">
            <text:p>27.3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5M46S" calcext:value-type="time">
            <text:p>09:05:4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71" calcext:value-type="percentage">
            <text:p>97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4" calcext:value-type="percentage">
            <text:p>27.3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5M54S" calcext:value-type="time">
            <text:p>09:05:5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18" calcext:value-type="percentage">
            <text:p>61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3" calcext:value-type="percentage">
            <text:p>27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6M02S" calcext:value-type="time">
            <text:p>09:06:0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3" calcext:value-type="percentage">
            <text:p>58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3" calcext:value-type="percentage">
            <text:p>27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6M10S" calcext:value-type="time">
            <text:p>09:06:1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36" calcext:value-type="percentage">
            <text:p>63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3" calcext:value-type="percentage">
            <text:p>27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6M18S" calcext:value-type="time">
            <text:p>09:06:1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5" calcext:value-type="percentage">
            <text:p>62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5" calcext:value-type="percentage">
            <text:p>27.3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6M26S" calcext:value-type="time">
            <text:p>09:06:2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4" calcext:value-type="percentage">
            <text:p>27.3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6M33S" calcext:value-type="time">
            <text:p>09:06:3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4" calcext:value-type="percentage">
            <text:p>27.3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6M41S" calcext:value-type="time">
            <text:p>09:06:4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7" calcext:value-type="percentage">
            <text:p>64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3" calcext:value-type="percentage">
            <text:p>27.3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6M49S" calcext:value-type="time">
            <text:p>09:06:4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67" calcext:value-type="percentage">
            <text:p>66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5" calcext:value-type="percentage">
            <text:p>27.3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5"/>
          <table:table-cell table:style-name="ce3" office:value-type="string" calcext:value-type="string">
            <text:p>PIDS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6M57S" calcext:value-type="time">
            <text:p>09:06:5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62" calcext:value-type="percentage">
            <text:p>56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5" calcext:value-type="percentage">
            <text:p>27.3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7M05S" calcext:value-type="time">
            <text:p>09:07:0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4" calcext:value-type="percentage">
            <text:p>27.3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7M13S" calcext:value-type="time">
            <text:p>09:07:1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4" calcext:value-type="percentage">
            <text:p>27.3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7M21S" calcext:value-type="time">
            <text:p>09:07:2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18" calcext:value-type="percentage">
            <text:p>61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5" calcext:value-type="percentage">
            <text:p>27.3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7M28S" calcext:value-type="time">
            <text:p>09:07:2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4" calcext:value-type="percentage">
            <text:p>27.3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7M36S" calcext:value-type="time">
            <text:p>09:07:3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18" calcext:value-type="percentage">
            <text:p>61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4" calcext:value-type="percentage">
            <text:p>27.3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7M44S" calcext:value-type="time">
            <text:p>09:07:4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9" calcext:value-type="percentage">
            <text:p>6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5" calcext:value-type="percentage">
            <text:p>27.3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7M52S" calcext:value-type="time">
            <text:p>09:07:5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" calcext:value-type="percentage">
            <text:p>6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5" calcext:value-type="percentage">
            <text:p>27.3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8M00S" calcext:value-type="time">
            <text:p>09:08:0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4" calcext:value-type="percentage">
            <text:p>27.3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8M08S" calcext:value-type="time">
            <text:p>09:08:0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44" calcext:value-type="percentage">
            <text:p>94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5" calcext:value-type="percentage">
            <text:p>27.3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8M16S" calcext:value-type="time">
            <text:p>09:08:1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39" calcext:value-type="percentage">
            <text:p>63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6" calcext:value-type="percentage">
            <text:p>27.3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8M24S" calcext:value-type="time">
            <text:p>09:08:2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76" calcext:value-type="percentage">
            <text:p>6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7" calcext:value-type="percentage">
            <text:p>27.3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8M32S" calcext:value-type="time">
            <text:p>09:08:3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18" calcext:value-type="percentage">
            <text:p>61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7" calcext:value-type="percentage">
            <text:p>27.3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8M39S" calcext:value-type="time">
            <text:p>09:08:3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5" calcext:value-type="percentage">
            <text:p>27.3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8M47S" calcext:value-type="time">
            <text:p>09:08:4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7" calcext:value-type="percentage">
            <text:p>64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6" calcext:value-type="percentage">
            <text:p>27.3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8M55S" calcext:value-type="time">
            <text:p>09:08:5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" calcext:value-type="percentage">
            <text:p>5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7" calcext:value-type="percentage">
            <text:p>27.3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5"/>
          <table:table-cell table:style-name="ce3" office:value-type="string" calcext:value-type="string">
            <text:p>PIDS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9M03S" calcext:value-type="time">
            <text:p>09:09:0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1" calcext:value-type="percentage">
            <text:p>57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5" calcext:value-type="percentage">
            <text:p>27.3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9M11S" calcext:value-type="time">
            <text:p>09:09:1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14" calcext:value-type="percentage">
            <text:p>71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7" calcext:value-type="percentage">
            <text:p>27.3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9M19S" calcext:value-type="time">
            <text:p>09:09:1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7" calcext:value-type="percentage">
            <text:p>27.3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9M27S" calcext:value-type="time">
            <text:p>09:09:2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1" calcext:value-type="percentage">
            <text:p>58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8" calcext:value-type="percentage">
            <text:p>27.3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9M34S" calcext:value-type="time">
            <text:p>09:09:3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43" calcext:value-type="percentage">
            <text:p>94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6" calcext:value-type="percentage">
            <text:p>27.3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9M42S" calcext:value-type="time">
            <text:p>09:09:4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18" calcext:value-type="percentage">
            <text:p>61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8" calcext:value-type="percentage">
            <text:p>27.3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9M50S" calcext:value-type="time">
            <text:p>09:09:5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8" calcext:value-type="percentage">
            <text:p>27.3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09M58S" calcext:value-type="time">
            <text:p>09:09:5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62" calcext:value-type="percentage">
            <text:p>56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9" calcext:value-type="percentage">
            <text:p>27.3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0M06S" calcext:value-type="time">
            <text:p>09:10:0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6" calcext:value-type="percentage">
            <text:p>27.3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0M14S" calcext:value-type="time">
            <text:p>09:10:1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5" calcext:value-type="percentage">
            <text:p>54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8" calcext:value-type="percentage">
            <text:p>27.3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0M22S" calcext:value-type="time">
            <text:p>09:10:2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3" calcext:value-type="percentage">
            <text:p>58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9" calcext:value-type="percentage">
            <text:p>27.3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0M29S" calcext:value-type="time">
            <text:p>09:10:2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" calcext:value-type="percentage">
            <text:p>6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8" calcext:value-type="percentage">
            <text:p>27.3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0M37S" calcext:value-type="time">
            <text:p>09:10:3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9" calcext:value-type="percentage">
            <text:p>27.3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0M45S" calcext:value-type="time">
            <text:p>09:10:4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9" calcext:value-type="percentage">
            <text:p>27.3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0M53S" calcext:value-type="time">
            <text:p>09:10:5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" calcext:value-type="percentage">
            <text:p>8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1M01S" calcext:value-type="time">
            <text:p>09:11:0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9" calcext:value-type="percentage">
            <text:p>27.3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5"/>
          <table:table-cell table:style-name="ce3" office:value-type="string" calcext:value-type="string">
            <text:p>PIDS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1M09S" calcext:value-type="time">
            <text:p>09:11:0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67" calcext:value-type="percentage">
            <text:p>66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8" calcext:value-type="percentage">
            <text:p>27.3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1M17S" calcext:value-type="time">
            <text:p>09:11:1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9" calcext:value-type="percentage">
            <text:p>27.3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1M25S" calcext:value-type="time">
            <text:p>09:11:2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94" calcext:value-type="percentage">
            <text:p>59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9" calcext:value-type="percentage">
            <text:p>27.3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1M32S" calcext:value-type="time">
            <text:p>09:11:3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06" calcext:value-type="percentage">
            <text:p>6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8" calcext:value-type="percentage">
            <text:p>27.3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1M40S" calcext:value-type="time">
            <text:p>09:11:4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06" calcext:value-type="percentage">
            <text:p>6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1M48S" calcext:value-type="time">
            <text:p>09:11:4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62" calcext:value-type="percentage">
            <text:p>56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1M56S" calcext:value-type="time">
            <text:p>09:11:5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2M04S" calcext:value-type="time">
            <text:p>09:12:0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5" calcext:value-type="percentage">
            <text:p>62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9" calcext:value-type="percentage">
            <text:p>27.3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2M12S" calcext:value-type="time">
            <text:p>09:12:1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56" calcext:value-type="percentage">
            <text:p>65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9" calcext:value-type="percentage">
            <text:p>27.3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2M19S" calcext:value-type="time">
            <text:p>09:12:1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2M27S" calcext:value-type="time">
            <text:p>09:12:2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46" calcext:value-type="percentage">
            <text:p>94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2M35S" calcext:value-type="time">
            <text:p>09:12:3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86" calcext:value-type="percentage">
            <text:p>68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9" calcext:value-type="percentage">
            <text:p>27.3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2M43S" calcext:value-type="time">
            <text:p>09:12:4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1" calcext:value-type="percentage">
            <text:p>57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8" calcext:value-type="percentage">
            <text:p>27.3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2M51S" calcext:value-type="time">
            <text:p>09:12:5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39" calcext:value-type="percentage">
            <text:p>63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9" calcext:value-type="percentage">
            <text:p>27.3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2M59S" calcext:value-type="time">
            <text:p>09:12:5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06" calcext:value-type="percentage">
            <text:p>6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3M07S" calcext:value-type="time">
            <text:p>09:13:0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1" calcext:value-type="percentage">
            <text:p>57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9" calcext:value-type="percentage">
            <text:p>27.3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5"/>
          <table:table-cell table:style-name="ce3" office:value-type="string" calcext:value-type="string">
            <text:p>PIDS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3M15S" calcext:value-type="time">
            <text:p>09:13:1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1" calcext:value-type="percentage">
            <text:p>57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9" calcext:value-type="percentage">
            <text:p>27.3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3M22S" calcext:value-type="time">
            <text:p>09:13:2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3M30S" calcext:value-type="time">
            <text:p>09:13:3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3M38S" calcext:value-type="time">
            <text:p>09:13:3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3M46S" calcext:value-type="time">
            <text:p>09:13:4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3" calcext:value-type="percentage">
            <text:p>58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3M54S" calcext:value-type="time">
            <text:p>09:13:5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76" calcext:value-type="percentage">
            <text:p>6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4M02S" calcext:value-type="time">
            <text:p>09:14:0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8" calcext:value-type="percentage">
            <text:p>27.3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4M10S" calcext:value-type="time">
            <text:p>09:14:1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4M17S" calcext:value-type="time">
            <text:p>09:14:1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67" calcext:value-type="percentage">
            <text:p>66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4M25S" calcext:value-type="time">
            <text:p>09:14:2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9" calcext:value-type="percentage">
            <text:p>6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4M33S" calcext:value-type="time">
            <text:p>09:14:3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67" calcext:value-type="percentage">
            <text:p>66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9" calcext:value-type="percentage">
            <text:p>27.3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4M41S" calcext:value-type="time">
            <text:p>09:14:4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4M49S" calcext:value-type="time">
            <text:p>09:14:4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7" calcext:value-type="percentage">
            <text:p>97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4M57S" calcext:value-type="time">
            <text:p>09:14:5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3" calcext:value-type="percentage">
            <text:p>27.4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5M05S" calcext:value-type="time">
            <text:p>09:15:0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5M12S" calcext:value-type="time">
            <text:p>09:15:1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36" calcext:value-type="percentage">
            <text:p>63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5"/>
          <table:table-cell table:style-name="ce3" office:value-type="string" calcext:value-type="string">
            <text:p>PIDS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5M20S" calcext:value-type="time">
            <text:p>09:15:2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56" calcext:value-type="percentage">
            <text:p>65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5M28S" calcext:value-type="time">
            <text:p>09:15:2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7" calcext:value-type="percentage">
            <text:p>27.3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5M36S" calcext:value-type="time">
            <text:p>09:15:3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18" calcext:value-type="percentage">
            <text:p>61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5" calcext:value-type="percentage">
            <text:p>27.3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5M44S" calcext:value-type="time">
            <text:p>09:15:4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94" calcext:value-type="percentage">
            <text:p>59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6" calcext:value-type="percentage">
            <text:p>27.3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5M52S" calcext:value-type="time">
            <text:p>09:15:5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39" calcext:value-type="percentage">
            <text:p>63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8" calcext:value-type="percentage">
            <text:p>27.3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6M00S" calcext:value-type="time">
            <text:p>09:16:0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1" calcext:value-type="percentage">
            <text:p>57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6" calcext:value-type="percentage">
            <text:p>27.3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6M07S" calcext:value-type="time">
            <text:p>09:16:0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1" calcext:value-type="percentage">
            <text:p>57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5" calcext:value-type="percentage">
            <text:p>27.3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6M15S" calcext:value-type="time">
            <text:p>09:16:1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72" calcext:value-type="percentage">
            <text:p>97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7" calcext:value-type="percentage">
            <text:p>27.3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6M23S" calcext:value-type="time">
            <text:p>09:16:2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67" calcext:value-type="percentage">
            <text:p>66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6" calcext:value-type="percentage">
            <text:p>27.3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6M31S" calcext:value-type="time">
            <text:p>09:16:3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8" calcext:value-type="percentage">
            <text:p>27.3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6M39S" calcext:value-type="time">
            <text:p>09:16:3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1" calcext:value-type="percentage">
            <text:p>57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7" calcext:value-type="percentage">
            <text:p>27.3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6M47S" calcext:value-type="time">
            <text:p>09:16:4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5" calcext:value-type="percentage">
            <text:p>54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8" calcext:value-type="percentage">
            <text:p>27.3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6M55S" calcext:value-type="time">
            <text:p>09:16:5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62" calcext:value-type="percentage">
            <text:p>56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8" calcext:value-type="percentage">
            <text:p>27.3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7M02S" calcext:value-type="time">
            <text:p>09:17:0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8" calcext:value-type="percentage">
            <text:p>27.3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7M10S" calcext:value-type="time">
            <text:p>09:17:1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9" calcext:value-type="percentage">
            <text:p>27.3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7M18S" calcext:value-type="time">
            <text:p>09:17:1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94" calcext:value-type="percentage">
            <text:p>59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5"/>
          <table:table-cell table:style-name="ce3" office:value-type="string" calcext:value-type="string">
            <text:p>PIDS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7M26S" calcext:value-type="time">
            <text:p>09:17:2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67" calcext:value-type="percentage">
            <text:p>66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7M34S" calcext:value-type="time">
            <text:p>09:17:3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9" calcext:value-type="percentage">
            <text:p>27.3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7M42S" calcext:value-type="time">
            <text:p>09:17:4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9" calcext:value-type="percentage">
            <text:p>27.3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7M50S" calcext:value-type="time">
            <text:p>09:17:5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36" calcext:value-type="percentage">
            <text:p>63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7M57S" calcext:value-type="time">
            <text:p>09:17:5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86" calcext:value-type="percentage">
            <text:p>68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8M05S" calcext:value-type="time">
            <text:p>09:18:0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1" calcext:value-type="percentage">
            <text:p>58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8M13S" calcext:value-type="time">
            <text:p>09:18:1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76" calcext:value-type="percentage">
            <text:p>6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8M21S" calcext:value-type="time">
            <text:p>09:18:2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31" calcext:value-type="percentage">
            <text:p>53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7" calcext:value-type="percentage">
            <text:p>27.3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8M29S" calcext:value-type="time">
            <text:p>09:18:2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7" calcext:value-type="percentage">
            <text:p>27.3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8M37S" calcext:value-type="time">
            <text:p>09:18:3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2" calcext:value-type="percentage">
            <text:p>62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6" calcext:value-type="percentage">
            <text:p>27.3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8M45S" calcext:value-type="time">
            <text:p>09:18:4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7" calcext:value-type="percentage">
            <text:p>27.3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8M52S" calcext:value-type="time">
            <text:p>09:18:5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8" calcext:value-type="percentage">
            <text:p>27.3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9M00S" calcext:value-type="time">
            <text:p>09:19:0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9" calcext:value-type="percentage">
            <text:p>6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6" calcext:value-type="percentage">
            <text:p>27.3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9M08S" calcext:value-type="time">
            <text:p>09:19:0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88" calcext:value-type="percentage">
            <text:p>7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6" calcext:value-type="percentage">
            <text:p>27.3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9M16S" calcext:value-type="time">
            <text:p>09:19:1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5" calcext:value-type="percentage">
            <text:p>54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5" calcext:value-type="percentage">
            <text:p>27.3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9M24S" calcext:value-type="time">
            <text:p>09:19:2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7" calcext:value-type="percentage">
            <text:p>27.3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5"/>
          <table:table-cell table:style-name="ce3" office:value-type="string" calcext:value-type="string">
            <text:p>PIDS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9M32S" calcext:value-type="time">
            <text:p>09:19:3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7" calcext:value-type="percentage">
            <text:p>27.3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9M40S" calcext:value-type="time">
            <text:p>09:19:4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06" calcext:value-type="percentage">
            <text:p>6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7" calcext:value-type="percentage">
            <text:p>27.3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9M47S" calcext:value-type="time">
            <text:p>09:19:4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48" calcext:value-type="percentage">
            <text:p>84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19M55S" calcext:value-type="time">
            <text:p>09:19:5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3" calcext:value-type="percentage">
            <text:p>54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7" calcext:value-type="percentage">
            <text:p>27.3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0M03S" calcext:value-type="time">
            <text:p>09:20:0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9" calcext:value-type="percentage">
            <text:p>6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7" calcext:value-type="percentage">
            <text:p>27.3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0M11S" calcext:value-type="time">
            <text:p>09:20:1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06" calcext:value-type="percentage">
            <text:p>6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8" calcext:value-type="percentage">
            <text:p>27.3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0M19S" calcext:value-type="time">
            <text:p>09:20:1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9" calcext:value-type="percentage">
            <text:p>27.3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0M27S" calcext:value-type="time">
            <text:p>09:20:2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9" calcext:value-type="percentage">
            <text:p>6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8" calcext:value-type="percentage">
            <text:p>27.3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0M35S" calcext:value-type="time">
            <text:p>09:20:3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8" calcext:value-type="percentage">
            <text:p>27.3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0M43S" calcext:value-type="time">
            <text:p>09:20:4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5" calcext:value-type="percentage">
            <text:p>62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9" calcext:value-type="percentage">
            <text:p>27.3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0M50S" calcext:value-type="time">
            <text:p>09:20:5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8" calcext:value-type="percentage">
            <text:p>27.3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0M58S" calcext:value-type="time">
            <text:p>09:20:5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1M06S" calcext:value-type="time">
            <text:p>09:21:0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29" calcext:value-type="percentage">
            <text:p>5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8" calcext:value-type="percentage">
            <text:p>27.3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1M14S" calcext:value-type="time">
            <text:p>09:21:1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06" calcext:value-type="percentage">
            <text:p>6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9" calcext:value-type="percentage">
            <text:p>27.3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1M22S" calcext:value-type="time">
            <text:p>09:21:2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06" calcext:value-type="percentage">
            <text:p>6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1M30S" calcext:value-type="time">
            <text:p>09:21:3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7" calcext:value-type="percentage">
            <text:p>27.3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/>
          <table:table-cell office:value-type="string" calcext:value-type="string">
            <text:p>PIDS</text:p>
          </table:table-cell>
          <table:table-cell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1M37S" calcext:value-type="time">
            <text:p>09:21:3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67" calcext:value-type="percentage">
            <text:p>66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9" calcext:value-type="percentage">
            <text:p>27.3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1M45S" calcext:value-type="time">
            <text:p>09:21:4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2" calcext:value-type="percentage">
            <text:p>62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1M53S" calcext:value-type="time">
            <text:p>09:21:5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57" calcext:value-type="percentage">
            <text:p>65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2M01S" calcext:value-type="time">
            <text:p>09:22:0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2M09S" calcext:value-type="time">
            <text:p>09:22:0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5" calcext:value-type="percentage">
            <text:p>54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8" calcext:value-type="percentage">
            <text:p>27.38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2M17S" calcext:value-type="time">
            <text:p>09:22:1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67" calcext:value-type="percentage">
            <text:p>66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2M25S" calcext:value-type="time">
            <text:p>09:22:2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18" calcext:value-type="percentage">
            <text:p>61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2M32S" calcext:value-type="time">
            <text:p>09:22:3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5" calcext:value-type="percentage">
            <text:p>62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2M40S" calcext:value-type="time">
            <text:p>09:22:4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36" calcext:value-type="percentage">
            <text:p>63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2M48S" calcext:value-type="time">
            <text:p>09:22:4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" calcext:value-type="percentage">
            <text:p>6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2M56S" calcext:value-type="time">
            <text:p>09:22:5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3M04S" calcext:value-type="time">
            <text:p>09:23:0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5" calcext:value-type="percentage">
            <text:p>64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3M12S" calcext:value-type="time">
            <text:p>09:23:1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18" calcext:value-type="percentage">
            <text:p>61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3M20S" calcext:value-type="time">
            <text:p>09:23:2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3" calcext:value-type="percentage">
            <text:p>54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3M27S" calcext:value-type="time">
            <text:p>09:23:2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3M35S" calcext:value-type="time">
            <text:p>09:23:3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18" calcext:value-type="percentage">
            <text:p>61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/>
          <table:table-cell office:value-type="string" calcext:value-type="string">
            <text:p>PIDS</text:p>
          </table:table-cell>
          <table:table-cell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3M43S" calcext:value-type="time">
            <text:p>09:23:4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6" calcext:value-type="percentage">
            <text:p>55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3M51S" calcext:value-type="time">
            <text:p>09:23:5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5" calcext:value-type="percentage">
            <text:p>54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3M59S" calcext:value-type="time">
            <text:p>09:23:5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18" calcext:value-type="percentage">
            <text:p>61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4M07S" calcext:value-type="time">
            <text:p>09:24:0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2" calcext:value-type="percentage">
            <text:p>62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4M15S" calcext:value-type="time">
            <text:p>09:24:1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36" calcext:value-type="percentage">
            <text:p>63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4M22S" calcext:value-type="time">
            <text:p>09:24:2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73" calcext:value-type="percentage">
            <text:p>97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4M30S" calcext:value-type="time">
            <text:p>09:24:3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22" calcext:value-type="percentage">
            <text:p>72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4M38S" calcext:value-type="time">
            <text:p>09:24:3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9" calcext:value-type="percentage">
            <text:p>27.3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4M46S" calcext:value-type="time">
            <text:p>09:24:4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" calcext:value-type="percentage">
            <text:p>6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4M54S" calcext:value-type="time">
            <text:p>09:24:5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95" calcext:value-type="percentage">
            <text:p>59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5M02S" calcext:value-type="time">
            <text:p>09:25:0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06" calcext:value-type="percentage">
            <text:p>6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5M10S" calcext:value-type="time">
            <text:p>09:25:1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1" calcext:value-type="percentage">
            <text:p>57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5M17S" calcext:value-type="time">
            <text:p>09:25:1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" calcext:value-type="percentage">
            <text:p>6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5M25S" calcext:value-type="time">
            <text:p>09:25:2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94" calcext:value-type="percentage">
            <text:p>59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5M33S" calcext:value-type="time">
            <text:p>09:25:3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5M41S" calcext:value-type="time">
            <text:p>09:25:4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62" calcext:value-type="percentage">
            <text:p>56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/>
          <table:table-cell office:value-type="string" calcext:value-type="string">
            <text:p>PIDS</text:p>
          </table:table-cell>
          <table:table-cell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5M49S" calcext:value-type="time">
            <text:p>09:25:4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31" calcext:value-type="percentage">
            <text:p>53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5M57S" calcext:value-type="time">
            <text:p>09:25:5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6M05S" calcext:value-type="time">
            <text:p>09:26:0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6M13S" calcext:value-type="time">
            <text:p>09:26:1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06" calcext:value-type="percentage">
            <text:p>6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6M20S" calcext:value-type="time">
            <text:p>09:26:2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94" calcext:value-type="percentage">
            <text:p>59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6M28S" calcext:value-type="time">
            <text:p>09:26:2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6M36S" calcext:value-type="time">
            <text:p>09:26:3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41" calcext:value-type="percentage">
            <text:p>94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6M44S" calcext:value-type="time">
            <text:p>09:26:4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89" calcext:value-type="percentage">
            <text:p>88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6M52S" calcext:value-type="time">
            <text:p>09:26:5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" calcext:value-type="percentage">
            <text:p>6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7M00S" calcext:value-type="time">
            <text:p>09:27:0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56" calcext:value-type="percentage">
            <text:p>65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7M08S" calcext:value-type="time">
            <text:p>09:27:0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5" calcext:value-type="percentage">
            <text:p>64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7M15S" calcext:value-type="time">
            <text:p>09:27:1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14" calcext:value-type="percentage">
            <text:p>71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7M23S" calcext:value-type="time">
            <text:p>09:27:2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67" calcext:value-type="percentage">
            <text:p>66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7M31S" calcext:value-type="time">
            <text:p>09:27:3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88" calcext:value-type="percentage">
            <text:p>6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7M39S" calcext:value-type="time">
            <text:p>09:27:3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7M47S" calcext:value-type="time">
            <text:p>09:27:4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5" calcext:value-type="percentage">
            <text:p>75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/>
          <table:table-cell office:value-type="string" calcext:value-type="string">
            <text:p>PIDS</text:p>
          </table:table-cell>
          <table:table-cell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7M55S" calcext:value-type="time">
            <text:p>09:27:5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9" calcext:value-type="percentage">
            <text:p>64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8M03S" calcext:value-type="time">
            <text:p>09:28:0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9" calcext:value-type="percentage">
            <text:p>64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8M10S" calcext:value-type="time">
            <text:p>09:28:1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49" calcext:value-type="percentage">
            <text:p>94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8M18S" calcext:value-type="time">
            <text:p>09:28:1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8M26S" calcext:value-type="time">
            <text:p>09:28:2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36" calcext:value-type="percentage">
            <text:p>63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8M34S" calcext:value-type="time">
            <text:p>09:28:3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9" calcext:value-type="percentage">
            <text:p>27.3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8M42S" calcext:value-type="time">
            <text:p>09:28:4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67" calcext:value-type="percentage">
            <text:p>66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8M50S" calcext:value-type="time">
            <text:p>09:28:5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18" calcext:value-type="percentage">
            <text:p>61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8M58S" calcext:value-type="time">
            <text:p>09:28:5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9M06S" calcext:value-type="time">
            <text:p>09:29:0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7" calcext:value-type="percentage">
            <text:p>27.3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9M13S" calcext:value-type="time">
            <text:p>09:29:1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3" calcext:value-type="percentage">
            <text:p>58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9M21S" calcext:value-type="time">
            <text:p>09:29:2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9M29S" calcext:value-type="time">
            <text:p>09:29:2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95" calcext:value-type="percentage">
            <text:p>59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9M37S" calcext:value-type="time">
            <text:p>09:29:3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9M45S" calcext:value-type="time">
            <text:p>09:29:4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62" calcext:value-type="percentage">
            <text:p>56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29M53S" calcext:value-type="time">
            <text:p>09:29:5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56" calcext:value-type="percentage">
            <text:p>65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3" calcext:value-type="percentage">
            <text:p>27.4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/>
          <table:table-cell office:value-type="string" calcext:value-type="string">
            <text:p>PIDS</text:p>
          </table:table-cell>
          <table:table-cell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0M01S" calcext:value-type="time">
            <text:p>09:30:0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18" calcext:value-type="percentage">
            <text:p>61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0M08S" calcext:value-type="time">
            <text:p>09:30:0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7" calcext:value-type="percentage">
            <text:p>64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0M16S" calcext:value-type="time">
            <text:p>09:30:1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0M24S" calcext:value-type="time">
            <text:p>09:30:2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5" calcext:value-type="percentage">
            <text:p>54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0M32S" calcext:value-type="time">
            <text:p>09:30:3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62" calcext:value-type="percentage">
            <text:p>56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0M40S" calcext:value-type="time">
            <text:p>09:30:4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62" calcext:value-type="percentage">
            <text:p>56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0M48S" calcext:value-type="time">
            <text:p>09:30:4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94" calcext:value-type="percentage">
            <text:p>59.4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0M56S" calcext:value-type="time">
            <text:p>09:30:5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5" calcext:value-type="percentage">
            <text:p>62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1M03S" calcext:value-type="time">
            <text:p>09:31:0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971" calcext:value-type="percentage">
            <text:p>97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1M11S" calcext:value-type="time">
            <text:p>09:31:1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36" calcext:value-type="percentage">
            <text:p>63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1M19S" calcext:value-type="time">
            <text:p>09:31:1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29" calcext:value-type="percentage">
            <text:p>8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1M27S" calcext:value-type="time">
            <text:p>09:31:2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56" calcext:value-type="percentage">
            <text:p>65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1M35S" calcext:value-type="time">
            <text:p>09:31:3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9" calcext:value-type="percentage">
            <text:p>6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1M43S" calcext:value-type="time">
            <text:p>09:31:4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7" calcext:value-type="percentage">
            <text:p>64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1M51S" calcext:value-type="time">
            <text:p>09:31:5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18" calcext:value-type="percentage">
            <text:p>61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5" calcext:value-type="percentage">
            <text:p>27.4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1M58S" calcext:value-type="time">
            <text:p>09:31:5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7" calcext:value-type="percentage">
            <text:p>64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/>
          <table:table-cell office:value-type="string" calcext:value-type="string">
            <text:p>PIDS</text:p>
          </table:table-cell>
          <table:table-cell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2M06S" calcext:value-type="time">
            <text:p>09:32:0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67" calcext:value-type="percentage">
            <text:p>66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2M14S" calcext:value-type="time">
            <text:p>09:32:1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7" calcext:value-type="percentage">
            <text:p>64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2M22S" calcext:value-type="time">
            <text:p>09:32:2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3" calcext:value-type="percentage">
            <text:p>27.4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2M30S" calcext:value-type="time">
            <text:p>09:32:3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7" calcext:value-type="percentage">
            <text:p>64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2M38S" calcext:value-type="time">
            <text:p>09:32:3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9" calcext:value-type="percentage">
            <text:p>27.39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2M46S" calcext:value-type="time">
            <text:p>09:32:4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1" calcext:value-type="percentage">
            <text:p>57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2M53S" calcext:value-type="time">
            <text:p>09:32:5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62" calcext:value-type="percentage">
            <text:p>56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3M01S" calcext:value-type="time">
            <text:p>09:33:0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67" calcext:value-type="percentage">
            <text:p>66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3M09S" calcext:value-type="time">
            <text:p>09:33:0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7" calcext:value-type="percentage">
            <text:p>64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3" calcext:value-type="percentage">
            <text:p>27.4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3M17S" calcext:value-type="time">
            <text:p>09:33:1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3M25S" calcext:value-type="time">
            <text:p>09:33:2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3" calcext:value-type="percentage">
            <text:p>27.4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3M33S" calcext:value-type="time">
            <text:p>09:33:3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3M40S" calcext:value-type="time">
            <text:p>09:33:4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3" calcext:value-type="percentage">
            <text:p>27.4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3M48S" calcext:value-type="time">
            <text:p>09:33:4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27" calcext:value-type="percentage">
            <text:p>72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3M56S" calcext:value-type="time">
            <text:p>09:33:5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5" calcext:value-type="percentage">
            <text:p>54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4M04S" calcext:value-type="time">
            <text:p>09:34:0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62" calcext:value-type="percentage">
            <text:p>56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/>
          <table:table-cell office:value-type="string" calcext:value-type="string">
            <text:p>PIDS</text:p>
          </table:table-cell>
          <table:table-cell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4M12S" calcext:value-type="time">
            <text:p>09:34:1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7" calcext:value-type="percentage">
            <text:p>64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4M20S" calcext:value-type="time">
            <text:p>09:34:2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06" calcext:value-type="percentage">
            <text:p>7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4M28S" calcext:value-type="time">
            <text:p>09:34:2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47" calcext:value-type="percentage">
            <text:p>64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4M36S" calcext:value-type="time">
            <text:p>09:34:3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56" calcext:value-type="percentage">
            <text:p>65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4M43S" calcext:value-type="time">
            <text:p>09:34:4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31" calcext:value-type="percentage">
            <text:p>53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4M51S" calcext:value-type="time">
            <text:p>09:34:5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4M59S" calcext:value-type="time">
            <text:p>09:34:5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5M07S" calcext:value-type="time">
            <text:p>09:35:0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5" calcext:value-type="percentage">
            <text:p>54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5M15S" calcext:value-type="time">
            <text:p>09:35:1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5" calcext:value-type="percentage">
            <text:p>54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5M23S" calcext:value-type="time">
            <text:p>09:35:2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86" calcext:value-type="percentage">
            <text:p>68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5M31S" calcext:value-type="time">
            <text:p>09:35:3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56" calcext:value-type="percentage">
            <text:p>65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4" calcext:value-type="percentage">
            <text:p>27.4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5M38S" calcext:value-type="time">
            <text:p>09:35:3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5" calcext:value-type="percentage">
            <text:p>54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5M46S" calcext:value-type="time">
            <text:p>09:35:4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88" calcext:value-type="percentage">
            <text:p>58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5M54S" calcext:value-type="time">
            <text:p>09:35:5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62" calcext:value-type="percentage">
            <text:p>56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3" calcext:value-type="percentage">
            <text:p>27.4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6M02S" calcext:value-type="time">
            <text:p>09:36:0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5" calcext:value-type="percentage">
            <text:p>75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6M10S" calcext:value-type="time">
            <text:p>09:36:1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816" calcext:value-type="percentage">
            <text:p>81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/>
          <table:table-cell office:value-type="string" calcext:value-type="string">
            <text:p>PIDS</text:p>
          </table:table-cell>
          <table:table-cell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6M18S" calcext:value-type="time">
            <text:p>09:36:1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3" calcext:value-type="percentage">
            <text:p>27.4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6M26S" calcext:value-type="time">
            <text:p>09:36:2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5" calcext:value-type="percentage">
            <text:p>54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3" calcext:value-type="percentage">
            <text:p>27.4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6M33S" calcext:value-type="time">
            <text:p>09:36:3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6M41S" calcext:value-type="time">
            <text:p>09:36:4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1" calcext:value-type="percentage">
            <text:p>57.1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6M49S" calcext:value-type="time">
            <text:p>09:36:4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67" calcext:value-type="percentage">
            <text:p>66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6M57S" calcext:value-type="time">
            <text:p>09:36:5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29" calcext:value-type="percentage">
            <text:p>5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3" calcext:value-type="percentage">
            <text:p>27.4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7M05S" calcext:value-type="time">
            <text:p>09:37:0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18" calcext:value-type="percentage">
            <text:p>61.8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7M13S" calcext:value-type="time">
            <text:p>09:37:1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57" calcext:value-type="percentage">
            <text:p>65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7M21S" calcext:value-type="time">
            <text:p>09:37:2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7M29S" calcext:value-type="time">
            <text:p>09:37:2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19" calcext:value-type="percentage">
            <text:p>71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3" calcext:value-type="percentage">
            <text:p>27.4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7M36S" calcext:value-type="time">
            <text:p>09:37:3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9" calcext:value-type="percentage">
            <text:p>6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7M44S" calcext:value-type="time">
            <text:p>09:37:4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4" calcext:value-type="percentage">
            <text:p>27.44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7M52S" calcext:value-type="time">
            <text:p>09:37:5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36" calcext:value-type="percentage">
            <text:p>63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3" calcext:value-type="percentage">
            <text:p>27.4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8M00S" calcext:value-type="time">
            <text:p>09:38:0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8M08S" calcext:value-type="time">
            <text:p>09:38:0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706" calcext:value-type="percentage">
            <text:p>7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8M16S" calcext:value-type="time">
            <text:p>09:38:1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/>
          <table:table-cell office:value-type="string" calcext:value-type="string">
            <text:p>PIDS</text:p>
          </table:table-cell>
          <table:table-cell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8M24S" calcext:value-type="time">
            <text:p>09:38:2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45" calcext:value-type="percentage">
            <text:p>54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8M31S" calcext:value-type="time">
            <text:p>09:38:3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59" calcext:value-type="percentage">
            <text:p>55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8M39S" calcext:value-type="time">
            <text:p>09:38:3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576" calcext:value-type="percentage">
            <text:p>5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3" calcext:value-type="percentage">
            <text:p>27.43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4" table:formula="of:=AVERAGE([.E53:.E378])" office:value-type="percentage" office:value="0.646702453987729" calcext:value-type="percentage">
            <text:p>64.67%</text:p>
          </table:table-cell>
          <table:table-cell table:style-name="ce3" table:number-columns-repeated="3"/>
          <table:table-cell table:style-name="ce4" table:formula="of:=AVERAGE([.I53:.I378])" office:value-type="percentage" office:value="0.273811656441717" calcext:value-type="percentage">
            <text:p>27.38%</text:p>
          </table:table-cell>
          <table:table-cell table:style-name="ce3" table:number-columns-repeated="6"/>
          <table:table-cell table:style-name="ce6" table:formula="of:=AVERAGE([.P53:.P378])" office:value-type="float" office:value="3.41730061349692" calcext:value-type="float">
            <text:p>3.42</text:p>
          </table:table-cell>
          <table:table-cell table:style-name="ce6" table:formula="of:=AVERAGE([.Q53:.Q378])" office:value-type="float" office:value="8.88999999999999" calcext:value-type="float">
            <text:p>8.89</text:p>
          </table:table-cell>
          <table:table-cell table:style-name="ce3" table:number-columns-repeated="66"/>
          <table:table-cell table:number-columns-repeated="3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4"/>
          <table:table-cell table:style-name="ce3" table:number-columns-repeated="3"/>
          <table:table-cell table:style-name="ce4"/>
          <table:table-cell table:style-name="ce3" table:number-columns-repeated="6"/>
          <table:table-cell table:style-name="ce6" table:number-columns-repeated="2"/>
          <table:table-cell table:style-name="ce3" table:number-columns-repeated="6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8M47S" calcext:value-type="time">
            <text:p>09:38:4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176" calcext:value-type="percentage">
            <text:p>17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8M55S" calcext:value-type="time">
            <text:p>09:38:5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06" calcext:value-type="percentage">
            <text:p>20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2" calcext:value-type="percentage">
            <text:p>27.42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9M03S" calcext:value-type="time">
            <text:p>09:39:0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29" calcext:value-type="percentage">
            <text:p>2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1" calcext:value-type="percentage">
            <text:p>27.41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9M11S" calcext:value-type="time">
            <text:p>09:39:1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56" calcext:value-type="percentage">
            <text:p>65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4" calcext:value-type="percentage">
            <text:p>27.40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9M18S" calcext:value-type="time">
            <text:p>09:39:1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57" calcext:value-type="percentage">
            <text:p>65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6" calcext:value-type="percentage">
            <text:p>27.3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9M26S" calcext:value-type="time">
            <text:p>09:39:26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156" calcext:value-type="percentage">
            <text:p>15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6" calcext:value-type="percentage">
            <text:p>27.3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9M34S" calcext:value-type="time">
            <text:p>09:39:34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343" calcext:value-type="percentage">
            <text:p>34.3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6" calcext:value-type="percentage">
            <text:p>27.3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9M42S" calcext:value-type="time">
            <text:p>09:39:42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156" calcext:value-type="percentage">
            <text:p>15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5" calcext:value-type="percentage">
            <text:p>27.35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9M50S" calcext:value-type="time">
            <text:p>09:39:50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097" calcext:value-type="percentage">
            <text:p>9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7" calcext:value-type="percentage">
            <text:p>27.3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39M58S" calcext:value-type="time">
            <text:p>09:39:58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156" calcext:value-type="percentage">
            <text:p>15.6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6" calcext:value-type="percentage">
            <text:p>27.3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40M05S" calcext:value-type="time">
            <text:p>09:40:0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12" calcext:value-type="percentage">
            <text:p>21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6" calcext:value-type="percentage">
            <text:p>27.3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40M13S" calcext:value-type="time">
            <text:p>09:40:13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25" calcext:value-type="percentage">
            <text:p>62.5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6" calcext:value-type="percentage">
            <text:p>27.3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40M21S" calcext:value-type="time">
            <text:p>09:40:21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29" calcext:value-type="percentage">
            <text:p>2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7" calcext:value-type="percentage">
            <text:p>27.3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/>
          <table:table-cell office:value-type="string" calcext:value-type="string">
            <text:p>PIDS</text:p>
          </table:table-cell>
          <table:table-cell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40M29S" calcext:value-type="time">
            <text:p>09:40:29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182" calcext:value-type="percentage">
            <text:p>18.2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6" calcext:value-type="percentage">
            <text:p>27.3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40M37S" calcext:value-type="time">
            <text:p>09:40:37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657" calcext:value-type="percentage">
            <text:p>65.7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7" calcext:value-type="percentage">
            <text:p>27.37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2024-05-06</text:p>
          </table:table-cell>
          <table:table-cell table:style-name="ce2" office:value-type="time" office:time-value="PT21H40M45S" calcext:value-type="time">
            <text:p>09:40:45 P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129" calcext:value-type="percentage">
            <text:p>12.90%</text:p>
          </table:table-cell>
          <table:table-cell table:style-name="ce3"/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Usage:</text:p>
          </table:table-cell>
          <table:table-cell table:style-name="ce4" office:value-type="percentage" office:value="0.2736" calcext:value-type="percentage">
            <text:p>27.36%</text:p>
          </table:table-cell>
          <table:table-cell table:style-name="ce3" table:number-columns-repeated="2"/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(read</text:p>
          </table:table-cell>
          <table:table-cell table:style-name="ce3" office:value-type="string" calcext:value-type="string">
            <text:p>write):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8.89" calcext:value-type="float">
            <text:p>8.89</text:p>
          </table:table-cell>
          <table:table-cell table:style-name="ce3" table:number-columns-repeated="2"/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Stats: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3" office:value-type="string" calcext:value-type="string">
            <text:p>NAME</text:p>
          </table:table-cell>
          <table:table-cell table:style-name="ce3" table:number-columns-repeated="17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LIMIT</text:p>
          </table:table-cell>
          <table:table-cell table:style-name="ce3" table:number-columns-repeated="4"/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4"/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10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table:number-columns-repeated="4"/>
          <table:table-cell table:style-name="ce5" table:formula="of:=AVERAGE([.E381:.E396])" office:value-type="percentage" office:value="0.304125" calcext:value-type="percentage">
            <text:p>30.41%</text:p>
          </table:table-cell>
          <table:table-cell table:number-columns-repeated="3"/>
          <table:table-cell table:style-name="ce5" table:formula="of:=AVERAGE([.I381:.I396])" office:value-type="percentage" office:value="0.2737375" calcext:value-type="percentage">
            <text:p>27.37%</text:p>
          </table:table-cell>
          <table:table-cell table:number-columns-repeated="6"/>
          <table:table-cell table:formula="of:=AVERAGE([.P381:.P396])" office:value-type="float" office:value="3.42" calcext:value-type="float">
            <text:p>3.42</text:p>
          </table:table-cell>
          <table:table-cell table:formula="of:=AVERAGE([.Q381:.Q396])" office:value-type="float" office:value="8.89" calcext:value-type="float">
            <text:p>8.89</text:p>
          </table:table-cell>
          <table:table-cell table:number-columns-repeated="69"/>
        </table:table-row>
        <table:table-row table:style-name="ro1" table:number-rows-repeated="1048178">
          <table:table-cell table:number-columns-repeated="86"/>
        </table:table-row>
        <table:table-row table:style-name="ro1">
          <table:table-cell table:number-columns-repeated="86"/>
        </table:table-row>
      </table:table>
      <table:named-expressions/>
      <table:database-ranges>
        <table:database-range table:name="__Anonymous_Sheet_DB__0" table:target-range-address="system_metrics_05062024_5_with.A1:system_metrics_05062024_5_with.BZ39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4T16:26:25.921998970</dc:date>
    <meta:editing-duration>PT11M1S</meta:editing-duration>
    <meta:editing-cycles>2</meta:editing-cycles>
    <meta:generator>LibreOffice/6.4.7.2$Linux_X86_64 LibreOffice_project/40$Build-2</meta:generator>
    <meta:document-statistic meta:table-count="1" meta:cell-count="12073" meta:object-count="0"/>
  </office:meta>
</office:document-meta>
</file>